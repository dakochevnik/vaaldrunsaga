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geneva"/>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0.1598in"/>
      <style:text-properties style:font-name="Verdana1" fo:font-size="8pt" fo:font-weight="normal" style:font-size-asian="8pt" style:font-weight-asian="normal" style:font-size-complex="8pt" style:font-weight-complex="normal"/>
    </style:style>
    <style:style style:name="P2" style:family="paragraph" style:parent-style-name="Standard">
      <style:paragraph-properties fo:line-height="0.1598in"/>
      <style:text-properties style:font-name="Verdana1" fo:font-size="8pt" fo:font-weight="normal" officeooo:rsid="000cc830" officeooo:paragraph-rsid="0054e0b5" style:font-size-asian="8pt" style:font-weight-asian="normal" style:font-size-complex="8pt" style:font-weight-complex="normal"/>
    </style:style>
    <style:style style:name="P3" style:family="paragraph" style:parent-style-name="Standard">
      <style:paragraph-properties fo:line-height="0.1598in"/>
      <style:text-properties style:font-name="Verdana1" fo:font-size="8pt" fo:font-weight="normal" officeooo:paragraph-rsid="00322e20" style:font-size-asian="8pt" style:font-weight-asian="normal" style:font-size-complex="8pt"/>
    </style:style>
    <style:style style:name="P4" style:family="paragraph" style:parent-style-name="Standard">
      <style:paragraph-properties fo:line-height="0.1598in"/>
      <style:text-properties style:font-name="Verdana1" fo:font-size="8pt" fo:language="en" fo:country="none" fo:font-weight="normal" style:font-size-asian="8pt" style:font-weight-asian="normal" style:font-size-complex="8pt" style:font-weight-complex="normal"/>
    </style:style>
    <style:style style:name="P5" style:family="paragraph" style:parent-style-name="Standard">
      <style:paragraph-properties fo:line-height="0.1598in"/>
      <style:text-properties style:font-name="Verdana1" fo:font-size="8pt" fo:language="en" fo:country="none" fo:font-weight="normal" officeooo:paragraph-rsid="000e8a50" style:font-size-asian="8pt" style:font-weight-asian="normal" style:font-size-complex="8pt" style:font-weight-complex="normal"/>
    </style:style>
    <style:style style:name="P6" style:family="paragraph" style:parent-style-name="Standard">
      <style:paragraph-properties fo:line-height="0.1598in"/>
      <style:text-properties style:font-name="Verdana1" fo:font-size="11pt" fo:font-style="normal" style:text-underline-style="solid" style:text-underline-width="auto" style:text-underline-color="font-color" fo:font-weight="bold" officeooo:paragraph-rsid="000aba20" style:font-size-asian="11pt" style:font-style-asian="normal" style:font-weight-asian="bold" style:font-size-complex="11pt" style:font-style-complex="normal" style:font-weight-complex="bold"/>
    </style:style>
    <style:style style:name="P7" style:family="paragraph" style:parent-style-name="Standard">
      <style:paragraph-properties fo:line-height="0.1598in"/>
      <style:text-properties style:font-name="Verdana1" fo:font-size="11pt" fo:font-style="normal" style:text-underline-style="solid" style:text-underline-width="auto" style:text-underline-color="font-color" fo:font-weight="bold" officeooo:rsid="004e5e1a" officeooo:paragraph-rsid="004e5e1a" style:font-size-asian="11pt" style:font-style-asian="normal" style:font-weight-asian="bold" style:font-size-complex="11pt" style:font-style-complex="normal" style:font-weight-complex="bold"/>
    </style:style>
    <style:style style:name="P8" style:family="paragraph" style:parent-style-name="Standard">
      <style:paragraph-properties fo:line-height="0.1598in"/>
      <style:text-properties style:font-name="Verdana1" fo:font-size="11pt" fo:language="en" fo:country="none" style:text-underline-style="solid" style:text-underline-width="auto" style:text-underline-color="font-color" fo:font-weight="bold" officeooo:paragraph-rsid="0054888f" style:font-size-asian="11pt" style:font-weight-asian="bold" style:font-size-complex="11pt" style:font-weight-complex="bold"/>
    </style:style>
    <style:style style:name="P9" style:family="paragraph" style:parent-style-name="Standard">
      <style:paragraph-properties fo:line-height="0.1598in"/>
      <style:text-properties style:font-name="Verdana1" fo:font-size="11pt" fo:language="en" fo:country="none" style:text-underline-style="solid" style:text-underline-width="auto" style:text-underline-color="font-color" fo:font-weight="bold" officeooo:paragraph-rsid="0054e050" style:font-size-asian="11pt" style:font-weight-asian="bold" style:font-size-complex="11pt"/>
    </style:style>
    <style:style style:name="P10" style:family="paragraph" style:parent-style-name="Standard">
      <style:paragraph-properties fo:line-height="0.1598in"/>
      <style:text-properties fo:font-weight="normal" style:font-weight-asian="normal" style:font-weight-complex="normal"/>
    </style:style>
    <style:style style:name="P11" style:family="paragraph" style:parent-style-name="Standard">
      <style:paragraph-properties fo:line-height="0.1598in"/>
    </style:style>
    <style:style style:name="P12"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0.1598in"/>
      <style:text-properties style:font-name="Verdana" fo:font-size="8pt" fo:language="en" fo:country="none" style:font-size-asian="8pt"/>
    </style:style>
    <style:style style:name="P14" style:family="paragraph" style:parent-style-name="Standard">
      <style:paragraph-properties fo:line-height="0.1598in"/>
      <style:text-properties style:font-name="Verdana" fo:font-size="8pt" fo:language="en" fo:country="none" fo:font-weight="normal" style:font-size-asian="8pt" style:font-weight-asian="normal" style:font-weight-complex="normal"/>
    </style:style>
    <style:style style:name="P15" style:family="paragraph" style:parent-style-name="Standard">
      <style:paragraph-properties fo:line-height="0.1598in"/>
      <style:text-properties style:text-line-through-style="none" style:text-line-through-type="none" style:font-name="Verdana" fo:font-size="8pt" fo:language="en" fo:country="none" fo:font-weight="normal" style:font-size-asian="8pt" style:font-weight-asian="normal" style:font-weight-complex="normal"/>
    </style:style>
    <style:style style:name="P16"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language="en" fo:country="none" fo:font-weight="normal" style:font-size-asian="8pt" style:font-weight-asian="normal" style:font-size-complex="8pt" style:font-weight-complex="normal"/>
    </style:style>
    <style:style style:name="P17"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font-weight="normal" officeooo:paragraph-rsid="004a3882" style:font-size-asian="8pt" style:font-weight-asian="normal" style:font-size-complex="8pt" style:font-weight-complex="normal"/>
    </style:style>
    <style:style style:name="P18" style:family="paragraph" style:parent-style-name="Standard">
      <style:paragraph-properties fo:line-height="0.1598in"/>
      <style:text-properties style:font-name="verdana" fo:font-size="11pt" fo:font-style="normal" style:text-underline-style="solid" style:text-underline-width="auto" style:text-underline-color="font-color" fo:font-weight="bold" officeooo:rsid="004e5e1a" officeooo:paragraph-rsid="004e5e1a" style:font-size-asian="11pt" style:font-style-asian="normal" style:font-weight-asian="bold" style:font-size-complex="11pt" style:font-style-complex="normal" style:font-weight-complex="bold"/>
    </style:style>
    <style:style style:name="P19" style:family="paragraph" style:parent-style-name="Standard">
      <style:paragraph-properties fo:line-height="0.1598in"/>
      <style:text-properties style:font-name="Verdana1" fo:font-size="11pt" fo:language="en" fo:country="none" fo:font-style="normal" style:text-underline-style="solid" style:text-underline-width="auto" style:text-underline-color="font-color" fo:font-weight="bold" officeooo:rsid="000cc830" officeooo:paragraph-rsid="0054e0b5"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in" loext:contextual-spacing="false" fo:line-height="0.1402in"/>
      <style:text-properties style:font-name="Verdana1" fo:font-size="8pt" fo:language="en" fo:country="none" fo:font-weight="normal" officeooo:rsid="0054d04d" officeooo:paragraph-rsid="005ba475" style:font-size-asian="8pt" style:font-weight-asian="normal" style:font-size-complex="8pt" style:font-weight-complex="normal"/>
    </style:style>
    <style:style style:name="P21" style:family="paragraph" style:parent-style-name="Standard">
      <style:paragraph-properties fo:margin-top="0in" fo:margin-bottom="0in" loext:contextual-spacing="false" fo:line-height="0.1402in"/>
      <style:text-properties style:font-name="Verdana1" fo:font-size="8pt" fo:language="en" fo:country="none" officeooo:paragraph-rsid="0059f87b" style:font-size-asian="8pt"/>
    </style:style>
    <style:style style:name="P22" style:family="paragraph" style:parent-style-name="Standard">
      <style:paragraph-properties fo:margin-top="0in" fo:margin-bottom="0in" loext:contextual-spacing="false" fo:line-height="0.1402in"/>
      <style:text-properties style:font-name="Verdana1" fo:font-size="8pt" fo:language="en" fo:country="none" officeooo:paragraph-rsid="005ba475" style:font-size-asian="8pt"/>
    </style:style>
    <style:style style:name="P23" style:family="paragraph" style:parent-style-name="Standard">
      <style:paragraph-properties fo:margin-top="0in" fo:margin-bottom="0in" loext:contextual-spacing="false" fo:line-height="0.1402in"/>
      <style:text-properties style:font-name="Verdana1" fo:font-size="8pt" fo:language="en" fo:country="none" officeooo:paragraph-rsid="005bcc2d" style:font-size-asian="8pt"/>
    </style:style>
    <style:style style:name="P24" style:family="paragraph" style:parent-style-name="Standard">
      <style:paragraph-properties fo:margin-top="0in" fo:margin-bottom="0in" loext:contextual-spacing="false" fo:line-height="0.1402in"/>
      <style:text-properties style:font-name="Verdana1" fo:font-size="8pt" fo:language="en" fo:country="none" officeooo:rsid="00560091" officeooo:paragraph-rsid="0059f87b" style:font-size-asian="8pt"/>
    </style:style>
    <style:style style:name="P25" style:family="paragraph" style:parent-style-name="Standard">
      <style:paragraph-properties fo:margin-top="0in" fo:margin-bottom="0in" loext:contextual-spacing="false" fo:line-height="0.1402in"/>
      <style:text-properties style:font-name="Verdana1" fo:font-size="8pt" fo:font-weight="normal" officeooo:rsid="000cc830" officeooo:paragraph-rsid="0059f87b" style:font-size-asian="8pt" style:font-weight-asian="normal" style:font-size-complex="8pt" style:font-weight-complex="normal"/>
    </style:style>
    <style:style style:name="P26" style:family="paragraph" style:parent-style-name="Standard">
      <style:paragraph-properties fo:margin-top="0in" fo:margin-bottom="0in" loext:contextual-spacing="false" fo:line-height="0.1402in"/>
      <style:text-properties style:font-name="Verdana1" fo:font-size="8pt" fo:font-weight="normal" officeooo:rsid="0054d04d" officeooo:paragraph-rsid="0059f87b" style:font-size-asian="8pt" style:font-weight-asian="normal" style:font-size-complex="8pt" style:font-weight-complex="normal"/>
    </style:style>
    <style:style style:name="P27" style:family="paragraph" style:parent-style-name="Standard">
      <style:paragraph-properties fo:margin-top="0in" fo:margin-bottom="0in" loext:contextual-spacing="false" fo:line-height="0.1402in"/>
      <style:text-properties style:font-name="Verdana1" fo:font-size="8pt" fo:font-weight="normal" officeooo:rsid="00560091" officeooo:paragraph-rsid="0059f87b" style:font-size-asian="8pt" style:font-weight-asian="normal" style:font-size-complex="8pt" style:font-weight-complex="normal"/>
    </style:style>
    <style:style style:name="P28" style:family="paragraph" style:parent-style-name="Standard">
      <style:paragraph-properties fo:margin-top="0in" fo:margin-bottom="0in" loext:contextual-spacing="false" fo:line-height="0.1402in"/>
      <style:text-properties style:font-name="Verdana1" fo:font-size="8pt" officeooo:paragraph-rsid="005ba475" style:font-size-asian="8pt"/>
    </style:style>
    <style:style style:name="P29"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rsid="004e5e1a" officeooo:paragraph-rsid="0059f87b" style:font-size-asian="11pt" style:font-style-asian="normal" style:font-weight-asian="bold" style:font-size-complex="11pt" style:font-style-complex="normal" style:font-weight-complex="bold"/>
    </style:style>
    <style:style style:name="P30"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rsid="004e5e1a" officeooo:paragraph-rsid="005ba475" style:font-size-asian="11pt" style:font-style-asian="normal" style:font-weight-asian="bold" style:font-size-complex="11pt" style:font-style-complex="normal" style:font-weight-complex="bold"/>
    </style:style>
    <style:style style:name="P31"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rsid="004e5e1a" officeooo:paragraph-rsid="005bcc2d" style:font-size-asian="11pt" style:font-style-asian="normal" style:font-weight-asian="bold" style:font-size-complex="11pt" style:font-style-complex="normal" style:font-weight-complex="bold"/>
    </style:style>
    <style:style style:name="P32"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paragraph-rsid="0059f87b" style:font-size-asian="11pt" style:font-style-asian="normal" style:font-weight-asian="bold" style:font-size-complex="11pt" style:font-style-complex="normal" style:font-weight-complex="bold"/>
    </style:style>
    <style:style style:name="P33"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paragraph-rsid="005ba475" style:font-size-asian="11pt" style:font-style-asian="normal" style:font-weight-asian="bold" style:font-size-complex="11pt" style:font-style-complex="normal" style:font-weight-complex="bold"/>
    </style:style>
    <style:style style:name="P34" style:family="paragraph" style:parent-style-name="Standard">
      <style:paragraph-properties fo:margin-top="0in" fo:margin-bottom="0in" loext:contextual-spacing="false" fo:line-height="0.1402in"/>
      <style:text-properties style:font-name="Verdana1" fo:font-size="11pt" fo:font-style="normal" style:text-underline-style="solid" style:text-underline-width="auto" style:text-underline-color="font-color" fo:font-weight="bold" officeooo:paragraph-rsid="005bcc2d" style:font-size-asian="11pt" style:font-style-asian="normal" style:font-weight-asian="bold" style:font-size-complex="11pt" style:font-style-complex="normal" style:font-weight-complex="bold"/>
    </style:style>
    <style:style style:name="P35" style:family="paragraph" style:parent-style-name="Standard">
      <style:paragraph-properties fo:margin-top="0in" fo:margin-bottom="0in" loext:contextual-spacing="false" fo:line-height="0.1402in"/>
      <style:text-properties style:font-name="Verdana1" fo:font-size="11pt" fo:language="en" fo:country="none" fo:font-style="normal" style:text-underline-style="none" fo:font-weight="bold" officeooo:paragraph-rsid="0059f87b" style:font-size-asian="11pt" style:font-style-asian="normal" style:font-weight-asian="bold" style:font-size-complex="11pt" style:font-style-complex="normal" style:font-weight-complex="bold"/>
    </style:style>
    <style:style style:name="P36" style:family="paragraph" style:parent-style-name="Standard">
      <style:paragraph-properties fo:margin-top="0in" fo:margin-bottom="0in" loext:contextual-spacing="false" fo:line-height="0.1402in"/>
      <style:text-properties style:font-name="Verdana1" fo:font-size="10pt" fo:language="en" fo:country="none" fo:font-weight="bold" officeooo:paragraph-rsid="0059f87b" style:font-size-asian="10pt" style:font-weight-asian="bold" style:font-size-complex="10pt" style:font-weight-complex="bold"/>
    </style:style>
    <style:style style:name="P37" style:family="paragraph" style:parent-style-name="Standard">
      <style:paragraph-properties fo:margin-top="0in" fo:margin-bottom="0in" loext:contextual-spacing="false" fo:line-height="0.1402in"/>
      <style:text-properties style:font-name="Verdana" fo:font-size="10.5pt" fo:language="en" fo:country="none" fo:font-weight="bold" officeooo:paragraph-rsid="0059f87b" style:font-size-asian="10.5pt" style:font-weight-asian="bold" style:font-size-complex="10.5pt" style:font-weight-complex="bold"/>
    </style:style>
    <style:style style:name="P38" style:family="paragraph" style:parent-style-name="Standard">
      <style:paragraph-properties fo:margin-top="0in" fo:margin-bottom="0in" loext:contextual-spacing="false" fo:line-height="0.1402in"/>
      <style:text-properties style:font-name="Verdana" fo:font-size="10.5pt" fo:language="en" fo:country="none" fo:font-weight="bold" officeooo:paragraph-rsid="005ba475" style:font-size-asian="10.5pt" style:font-weight-asian="bold" style:font-size-complex="10.5pt" style:font-weight-complex="bold"/>
    </style:style>
    <style:style style:name="P39" style:family="paragraph" style:parent-style-name="Standard">
      <style:paragraph-properties fo:margin-top="0in" fo:margin-bottom="0in" loext:contextual-spacing="false" fo:line-height="0.1402in"/>
      <style:text-properties style:font-name="Verdana" fo:font-size="10.5pt" fo:language="en" fo:country="none" fo:font-weight="bold" officeooo:rsid="0054d04d" officeooo:paragraph-rsid="005ba475" style:font-size-asian="10.5pt" style:font-weight-asian="bold" style:font-size-complex="10.5pt" style:font-weight-complex="bold"/>
    </style:style>
    <style:style style:name="P40" style:family="paragraph" style:parent-style-name="Standard">
      <style:paragraph-properties fo:margin-top="0in" fo:margin-bottom="0in" loext:contextual-spacing="false" fo:line-height="0.1402in"/>
      <style:text-properties style:font-name="Verdana" fo:font-size="10.5pt" fo:language="en" fo:country="none" fo:font-weight="bold" officeooo:paragraph-rsid="005ba475" style:font-size-asian="10.5pt" style:font-weight-asian="bold" style:font-size-complex="10.5pt"/>
    </style:style>
    <style:style style:name="P41" style:family="paragraph" style:parent-style-name="Standard">
      <style:paragraph-properties fo:margin-top="0in" fo:margin-bottom="0in" loext:contextual-spacing="false" fo:line-height="0.1402in"/>
      <style:text-properties style:font-name="Verdana" fo:font-size="10.5pt" fo:language="en" fo:country="none" fo:font-weight="bold" officeooo:paragraph-rsid="005bcc2d" style:font-size-asian="10.5pt" style:font-weight-asian="bold" style:font-size-complex="10.5pt"/>
    </style:style>
    <style:style style:name="P42" style:family="paragraph" style:parent-style-name="Standard">
      <style:paragraph-properties fo:margin-top="0in" fo:margin-bottom="0in" loext:contextual-spacing="false" fo:line-height="0.1402in"/>
      <style:text-properties style:font-name="Verdana" fo:font-size="10.5pt" fo:language="en" fo:country="none" style:text-underline-style="none" fo:font-weight="bold" officeooo:paragraph-rsid="0059f87b" style:font-size-asian="10.5pt" style:font-weight-asian="bold" style:font-size-complex="10.5pt"/>
    </style:style>
    <style:style style:name="P43" style:family="paragraph" style:parent-style-name="Standard">
      <style:paragraph-properties fo:margin-top="0in" fo:margin-bottom="0in" loext:contextual-spacing="false" fo:line-height="0.1402in"/>
      <style:text-properties style:font-name="Verdana" fo:font-size="10.5pt" fo:language="en" fo:country="none" officeooo:paragraph-rsid="005ba475" style:font-size-asian="10.5pt" style:font-size-complex="10.5pt"/>
    </style:style>
    <style:style style:name="P44" style:family="paragraph" style:parent-style-name="Standard">
      <style:paragraph-properties fo:margin-top="0in" fo:margin-bottom="0in" loext:contextual-spacing="false" fo:line-height="0.1402in"/>
      <style:text-properties style:font-name="Verdana" fo:font-size="8pt" fo:language="en" fo:country="none" officeooo:paragraph-rsid="0059f87b" style:font-size-asian="8pt"/>
    </style:style>
    <style:style style:name="P45" style:family="paragraph" style:parent-style-name="Standard">
      <style:paragraph-properties fo:margin-top="0in" fo:margin-bottom="0in" loext:contextual-spacing="false" fo:line-height="0.1402in"/>
      <style:text-properties style:font-name="Verdana" fo:font-size="8pt" fo:language="en" fo:country="none" officeooo:paragraph-rsid="005ba475" style:font-size-asian="8pt"/>
    </style:style>
    <style:style style:name="P46" style:family="paragraph" style:parent-style-name="Standard">
      <style:paragraph-properties fo:margin-top="0in" fo:margin-bottom="0in" loext:contextual-spacing="false" fo:line-height="0.1402in"/>
      <style:text-properties style:font-name="Verdana" fo:font-size="8pt" fo:language="en" fo:country="none" officeooo:rsid="00560091" officeooo:paragraph-rsid="0059f87b" style:font-size-asian="8pt"/>
    </style:style>
    <style:style style:name="P47" style:family="paragraph" style:parent-style-name="Standard">
      <style:paragraph-properties fo:margin-top="0in" fo:margin-bottom="0in" loext:contextual-spacing="false" fo:line-height="0.1402in"/>
      <style:text-properties style:font-name="Verdana" fo:font-size="8pt" fo:language="en" fo:country="none" style:text-underline-style="none" fo:font-weight="normal" officeooo:paragraph-rsid="0059f87b" style:font-size-asian="8pt" style:font-weight-asian="normal"/>
    </style:style>
    <style:style style:name="P48" style:family="paragraph" style:parent-style-name="Standard">
      <style:paragraph-properties fo:margin-top="0in" fo:margin-bottom="0in" loext:contextual-spacing="false" fo:line-height="0.1402in"/>
      <style:text-properties style:font-name="Verdana" fo:font-size="8pt" fo:language="en" fo:country="none" style:text-underline-style="none" fo:font-weight="normal" officeooo:paragraph-rsid="005ba475" style:font-size-asian="8pt" style:font-weight-asian="normal"/>
    </style:style>
    <style:style style:name="P49" style:family="paragraph" style:parent-style-name="Standard">
      <style:paragraph-properties fo:margin-top="0in" fo:margin-bottom="0in" loext:contextual-spacing="false" fo:line-height="0.1402in"/>
      <style:text-properties style:font-name="Verdana" fo:font-size="8pt" fo:language="en" fo:country="none" style:text-underline-style="none" fo:font-weight="normal" officeooo:rsid="00560091" officeooo:paragraph-rsid="0059f87b" style:font-size-asian="8pt" style:font-weight-asian="normal"/>
    </style:style>
    <style:style style:name="P50" style:family="paragraph" style:parent-style-name="Standard">
      <style:paragraph-properties fo:margin-top="0in" fo:margin-bottom="0in" loext:contextual-spacing="false" fo:line-height="0.1402in"/>
      <style:text-properties style:font-name="Verdana" fo:font-size="8pt" fo:language="en" fo:country="none" style:text-underline-style="none" fo:font-weight="bold" officeooo:paragraph-rsid="0059f87b" style:font-size-asian="8pt" style:font-weight-asian="bold"/>
    </style:style>
    <style:style style:name="P51" style:family="paragraph" style:parent-style-name="Standard">
      <style:paragraph-properties fo:margin-top="0in" fo:margin-bottom="0in" loext:contextual-spacing="false" fo:line-height="0.1402in"/>
      <style:text-properties style:font-name="Verdana" fo:font-size="8pt" fo:language="en" fo:country="none" fo:font-weight="normal" officeooo:rsid="0054d04d" officeooo:paragraph-rsid="005ba475" style:font-size-asian="8pt" style:font-weight-asian="normal" style:font-size-complex="8pt" style:font-weight-complex="normal"/>
    </style:style>
    <style:style style:name="P52" style:family="paragraph" style:parent-style-name="Standard">
      <style:paragraph-properties fo:margin-top="0in" fo:margin-bottom="0in" loext:contextual-spacing="false" fo:line-height="0.1402in"/>
      <style:text-properties style:font-name="Verdana" fo:font-size="8pt" fo:language="en" fo:country="none" fo:font-weight="normal" officeooo:rsid="0054d04d" officeooo:paragraph-rsid="005bcc2d" style:font-size-asian="8pt" style:font-weight-asian="normal" style:font-size-complex="8pt" style:font-weight-complex="normal"/>
    </style:style>
    <style:style style:name="P53" style:family="paragraph" style:parent-style-name="Standard">
      <style:paragraph-properties fo:margin-top="0in" fo:margin-bottom="0in" loext:contextual-spacing="false" fo:line-height="0.1402in"/>
      <style:text-properties style:font-name="Verdana" fo:font-size="8pt" fo:language="en" fo:country="none" fo:font-weight="normal" officeooo:paragraph-rsid="005ba475" style:font-size-asian="8pt" style:font-weight-asian="normal"/>
    </style:style>
    <style:style style:name="P54" style:family="paragraph" style:parent-style-name="Standard">
      <style:paragraph-properties fo:margin-top="0in" fo:margin-bottom="0in" loext:contextual-spacing="false" fo:line-height="0.1402in"/>
      <style:text-properties style:font-name="Verdana" fo:font-size="8pt" fo:language="en" fo:country="none" fo:font-weight="normal" officeooo:paragraph-rsid="005bcc2d" style:font-size-asian="8pt" style:font-weight-asian="normal"/>
    </style:style>
    <style:style style:name="P55" style:family="paragraph" style:parent-style-name="Standard">
      <style:paragraph-properties fo:margin-top="0in" fo:margin-bottom="0in" loext:contextual-spacing="false" fo:line-height="0.1402in"/>
      <style:text-properties style:font-name="Verdana" fo:font-size="8pt" fo:language="en" fo:country="none" fo:font-weight="bold" officeooo:paragraph-rsid="005ba475" style:font-size-asian="8pt" style:font-weight-asian="bold"/>
    </style:style>
    <style:style style:name="P56" style:family="paragraph" style:parent-style-name="Standard">
      <style:paragraph-properties fo:margin-top="0in" fo:margin-bottom="0in" loext:contextual-spacing="false" fo:line-height="0.1402in"/>
      <style:text-properties style:font-name="Verdana" fo:font-size="8pt" fo:language="en" fo:country="none" fo:font-weight="bold" officeooo:paragraph-rsid="005bcc2d" style:font-size-asian="8pt" style:font-weight-asian="bold"/>
    </style:style>
    <style:style style:name="P57" style:family="paragraph" style:parent-style-name="Standard">
      <style:paragraph-properties fo:margin-top="0in" fo:margin-bottom="0in" loext:contextual-spacing="false" fo:line-height="0.1402in"/>
      <style:text-properties style:font-name="Verdana" fo:font-size="11pt" fo:language="en" fo:country="none" style:text-underline-style="solid" style:text-underline-width="auto" style:text-underline-color="font-color" fo:font-weight="bold" officeooo:rsid="0054d04d" officeooo:paragraph-rsid="005ba475" style:font-size-asian="11pt" style:font-weight-asian="bold" style:font-size-complex="8pt" style:font-weight-complex="normal"/>
    </style:style>
    <style:style style:name="P58" style:family="paragraph" style:parent-style-name="Standard">
      <style:paragraph-properties fo:margin-top="0in" fo:margin-bottom="0in" loext:contextual-spacing="false" fo:line-height="0.1402in"/>
      <style:text-properties style:font-name="Verdana" fo:font-size="11pt" fo:language="en" fo:country="none" fo:font-weight="bold" officeooo:paragraph-rsid="005bcc2d" style:font-size-asian="11pt" style:font-weight-asian="bold" style:font-size-complex="11pt"/>
    </style:style>
    <style:style style:name="P59" style:family="paragraph" style:parent-style-name="Standard">
      <style:paragraph-properties fo:margin-top="0in" fo:margin-bottom="0in" loext:contextual-spacing="false" fo:line-height="0.1402in"/>
      <style:text-properties officeooo:paragraph-rsid="0059f87b"/>
    </style:style>
    <style:style style:name="P60" style:family="paragraph" style:parent-style-name="Standard">
      <style:paragraph-properties fo:margin-top="0in" fo:margin-bottom="0in" loext:contextual-spacing="false" fo:line-height="0.1402in"/>
      <style:text-properties officeooo:paragraph-rsid="005ba475"/>
    </style:style>
    <style:style style:name="P61" style:family="paragraph" style:parent-style-name="Standard">
      <style:paragraph-properties fo:margin-top="0in" fo:margin-bottom="0in" loext:contextual-spacing="false" fo:line-height="0.1402in"/>
      <style:text-properties officeooo:paragraph-rsid="005bcc2d"/>
    </style:style>
    <style:style style:name="P62" style:family="paragraph" style:parent-style-name="Standard">
      <style:paragraph-properties fo:margin-top="0in" fo:margin-bottom="0in" loext:contextual-spacing="false" fo:line-height="0.1402in"/>
      <style:text-properties style:text-line-through-style="none" style:text-line-through-type="none" style:font-name="Verdana" fo:font-size="8pt" fo:language="en" fo:country="none" officeooo:paragraph-rsid="005ba475" style:font-size-asian="8pt"/>
    </style:style>
    <style:style style:name="P63" style:family="paragraph" style:parent-style-name="Standard">
      <style:paragraph-properties fo:margin-top="0in" fo:margin-bottom="0in" loext:contextual-spacing="false" fo:line-height="0.1402in"/>
      <style:text-properties fo:font-size="10.5pt" officeooo:paragraph-rsid="005bcc2d" style:font-size-asian="10.5pt" style:font-size-complex="10.5pt"/>
    </style:style>
    <style:style style:name="P64"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officeooo:paragraph-rsid="0059f87b" style:font-size-asian="8pt"/>
    </style:style>
    <style:style style:name="P65"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officeooo:paragraph-rsid="005ba475" style:font-size-asian="8pt"/>
    </style:style>
    <style:style style:name="P66"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officeooo:paragraph-rsid="005bcc2d" style:font-size-asian="8pt"/>
    </style:style>
    <style:style style:name="P67"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fo:font-weight="normal" officeooo:rsid="0054d04d" officeooo:paragraph-rsid="0059f87b" style:font-size-asian="8pt" style:font-weight-asian="normal" style:font-size-complex="8pt" style:font-weight-complex="normal"/>
    </style:style>
    <style:style style:name="P68"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fo:font-weight="normal" officeooo:rsid="00560091" officeooo:paragraph-rsid="0059f87b" style:font-size-asian="8pt" style:font-weight-asian="normal" style:font-size-complex="8pt" style:font-weight-complex="normal"/>
    </style:style>
    <style:style style:name="P69"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1" fo:font-size="8pt" fo:language="en" fo:country="none" officeooo:rsid="00560091" officeooo:paragraph-rsid="0059f87b" style:font-size-asian="8pt"/>
    </style:style>
    <style:style style:name="P70" style:family="paragraph" style:parent-style-name="Standard">
      <style:paragraph-properties fo:margin-top="0in" fo:margin-bottom="0in" loext:contextual-spacing="false" fo:line-height="0.1402in" style:border-line-width-bottom="0.0047in 0.0047in 0.0047in" fo:padding="0.0291in" fo:border-left="none" fo:border-right="none" fo:border-top="none" fo:border-bottom="1.05pt double #000000" style:join-border="false"/>
      <style:text-properties style:font-name="Verdana" fo:font-size="8pt" fo:language="en" fo:country="none" officeooo:rsid="00560091" officeooo:paragraph-rsid="0059f87b" style:font-size-asian="8pt"/>
    </style:style>
    <style:style style:name="T1" style:family="text">
      <style:text-properties style:font-name="Verdana" fo:font-size="8pt" fo:language="en" fo:country="none" style:font-size-asian="8pt"/>
    </style:style>
    <style:style style:name="T2" style:family="text">
      <style:text-properties style:font-name="Verdana" fo:font-size="8pt" fo:language="en" fo:country="none" style:text-underline-style="none" fo:font-weight="normal" style:font-size-asian="8pt" style:font-weight-asian="normal"/>
    </style:style>
    <style:style style:name="T3" style:family="text">
      <style:text-properties style:font-name="Verdana" fo:font-size="8pt" fo:language="en" fo:country="none" fo:font-weight="normal" style:font-size-asian="8pt" style:font-weight-asian="normal"/>
    </style:style>
    <style:style style:name="T4" style:family="text">
      <style:text-properties style:font-name="Verdana" fo:font-size="10.5pt" fo:language="en" fo:country="none" fo:font-weight="bold" style:font-size-asian="10.5pt" style:font-weight-asian="bold" style:font-size-complex="10.5pt"/>
    </style:style>
    <style:style style:name="T5" style:family="text">
      <style:text-properties style:font-name="Verdana" fo:font-size="10.5pt" fo:language="en" fo:country="none" fo:font-weight="bold" style:font-size-asian="10.5pt" style:font-weight-asian="bold" style:font-size-complex="10.5pt" style:font-weight-complex="bold"/>
    </style:style>
    <style:style style:name="T6" style:family="text">
      <style:text-properties style:font-name="Verdana" fo:font-size="10.5pt" fo:language="en" fo:country="none" fo:font-weight="bold" officeooo:rsid="00592fef" style:font-size-asian="10.5pt" style:font-weight-asian="bold" style:font-size-complex="10.5pt" style:font-weight-complex="bold"/>
    </style:style>
    <style:style style:name="T7" style:family="text">
      <style:text-properties style:font-name="Verdana" fo:font-size="10.5pt" fo:language="en" fo:country="none" fo:font-weight="bold" officeooo:rsid="005ff78e" style:font-size-asian="10.5pt" style:font-weight-asian="bold" style:font-size-complex="10.5pt"/>
    </style:style>
    <style:style style:name="T8" style:family="text">
      <style:text-properties style:font-name="Verdana" fo:font-size="10.5pt" fo:language="en" fo:country="none" style:font-size-asian="10.5pt" style:font-size-complex="10.5pt"/>
    </style:style>
    <style:style style:name="T9" style:family="text">
      <style:text-properties style:font-name="Verdana" fo:language="en" fo:country="none"/>
    </style:style>
    <style:style style:name="T10" style:family="text">
      <style:text-properties style:font-name="Verdana" fo:language="en" fo:country="none" fo:font-weight="bold" style:font-weight-asian="bold"/>
    </style:style>
    <style:style style:name="T11" style:family="text">
      <style:text-properties style:font-name="Verdana" fo:language="en" fo:country="none" fo:font-weight="bold" officeooo:rsid="0063950c" style:font-weight-asian="bold"/>
    </style:style>
    <style:style style:name="T12" style:family="text">
      <style:text-properties style:font-name="Verdana" fo:language="en" fo:country="none" fo:font-weight="bold" officeooo:rsid="005ca397" style:font-weight-asian="bold"/>
    </style:style>
    <style:style style:name="T13" style:family="text">
      <style:text-properties style:font-name="Verdana" fo:language="en" fo:country="none" fo:font-weight="bold" officeooo:rsid="0065a761" style:font-weight-asian="bold"/>
    </style:style>
    <style:style style:name="T14" style:family="text">
      <style:text-properties officeooo:rsid="000aba20"/>
    </style:style>
    <style:style style:name="T15" style:family="text">
      <style:text-properties fo:language="en" fo:country="none"/>
    </style:style>
    <style:style style:name="T16" style:family="text">
      <style:text-properties fo:language="en" fo:country="none" officeooo:rsid="00308323"/>
    </style:style>
    <style:style style:name="T17" style:family="text">
      <style:text-properties fo:font-size="11pt" style:font-size-asian="11pt" style:font-size-complex="11pt"/>
    </style:style>
    <style:style style:name="T18"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9" style:family="text">
      <style:text-properties fo:font-size="11pt" fo:language="en" fo:country="none"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0" style:family="text">
      <style:text-properties fo:font-size="11pt" fo:language="en" fo:country="none" fo:font-style="normal" style:text-underline-style="solid" style:text-underline-width="auto" style:text-underline-color="font-color" fo:font-weight="bold" officeooo:rsid="0054e0b5" style:font-size-asian="11pt" style:font-style-asian="normal" style:font-weight-asian="bold" style:font-size-complex="11pt" style:font-style-complex="normal" style:font-weight-complex="bold"/>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54888f" style:font-style-asian="normal" style:font-style-complex="normal"/>
    </style:style>
    <style:style style:name="T25" style:family="text">
      <style:text-properties fo:font-style="normal" style:font-style-asian="normal" style:font-style-complex="normal" style:font-weight-complex="bold"/>
    </style:style>
    <style:style style:name="T26" style:family="text">
      <style:text-properties fo:font-style="normal" officeooo:rsid="0054e050" style:font-style-asian="normal" style:font-style-complex="normal" style:font-weight-complex="bold"/>
    </style:style>
    <style:style style:name="T27" style:family="text">
      <style:text-properties fo:font-style="normal" officeooo:rsid="0054e0b5" style:font-style-asian="normal" style:font-style-complex="normal" style:font-weight-complex="bold"/>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592fef" style:font-style-asian="normal" style:font-style-complex="normal"/>
    </style:style>
    <style:style style:name="T30" style:family="text">
      <style:text-properties fo:font-style="normal" style:text-underline-style="none" officeooo:rsid="0051cb31" style:font-style-asian="normal" style:font-style-complex="normal"/>
    </style:style>
    <style:style style:name="T31" style:family="text">
      <style:text-properties style:text-underline-style="none" officeooo:rsid="000aba20"/>
    </style:style>
    <style:style style:name="T32" style:family="text">
      <style:text-properties style:text-line-through-style="none" style:text-line-through-type="none" style:font-name="Verdana" fo:font-size="8pt" fo:language="en" fo:country="none" style:font-size-asian="8pt"/>
    </style:style>
    <style:style style:name="T33" style:family="text">
      <style:text-properties officeooo:rsid="002a18ea"/>
    </style:style>
    <style:style style:name="T34" style:family="text">
      <style:text-properties officeooo:rsid="002ab41c"/>
    </style:style>
    <style:style style:name="T35" style:family="text">
      <style:text-properties officeooo:rsid="002b94cc"/>
    </style:style>
    <style:style style:name="T36" style:family="text">
      <style:text-properties officeooo:rsid="002eefbc"/>
    </style:style>
    <style:style style:name="T37" style:family="text">
      <style:text-properties officeooo:rsid="00308323"/>
    </style:style>
    <style:style style:name="T38" style:family="text">
      <style:text-properties officeooo:rsid="0030b94b"/>
    </style:style>
    <style:style style:name="T39" style:family="text">
      <style:text-properties officeooo:rsid="00311711"/>
    </style:style>
    <style:style style:name="T40" style:family="text">
      <style:text-properties officeooo:rsid="000cc830" style:font-weight-complex="normal"/>
    </style:style>
    <style:style style:name="T41" style:family="text">
      <style:text-properties officeooo:rsid="0033ca89"/>
    </style:style>
    <style:style style:name="T42" style:family="text">
      <style:text-properties officeooo:rsid="00348f45"/>
    </style:style>
    <style:style style:name="T43" style:family="text">
      <style:text-properties officeooo:rsid="003906ef"/>
    </style:style>
    <style:style style:name="T44" style:family="text">
      <style:text-properties officeooo:rsid="003a4b20"/>
    </style:style>
    <style:style style:name="T45" style:family="text">
      <style:text-properties officeooo:rsid="003b3925"/>
    </style:style>
    <style:style style:name="T46" style:family="text">
      <style:text-properties officeooo:rsid="003cb36e"/>
    </style:style>
    <style:style style:name="T47" style:family="text">
      <style:text-properties officeooo:rsid="0042dc2c"/>
    </style:style>
    <style:style style:name="T48" style:family="text">
      <style:text-properties officeooo:rsid="00456693"/>
    </style:style>
    <style:style style:name="T49" style:family="text">
      <style:text-properties officeooo:rsid="0046d36a"/>
    </style:style>
    <style:style style:name="T50" style:family="text">
      <style:text-properties officeooo:rsid="00484bae"/>
    </style:style>
    <style:style style:name="T51" style:family="text">
      <style:text-properties style:font-name="verdana"/>
    </style:style>
    <style:style style:name="T52" style:family="text">
      <style:text-properties officeooo:rsid="00559004"/>
    </style:style>
    <style:style style:name="T53" style:family="text">
      <style:text-properties officeooo:rsid="005646fc"/>
    </style:style>
    <style:style style:name="T54" style:family="text">
      <style:text-properties style:font-name="Verdana1"/>
    </style:style>
    <style:style style:name="T55" style:family="text">
      <style:text-properties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6" style:family="text">
      <style:text-properties fo:font-size="10.5pt" fo:font-style="normal" style:text-underline-style="solid" style:text-underline-width="auto" style:text-underline-color="font-color" fo:font-weight="bold" officeooo:rsid="00592fef" style:font-size-asian="10.5pt" style:font-style-asian="normal" style:font-weight-asian="bold" style:font-size-complex="10.5pt" style:font-style-complex="normal" style:font-weight-complex="bold"/>
    </style:style>
    <style:style style:name="T57" style:family="text">
      <style:text-properties fo:font-size="10.5pt" fo:font-style="normal" style:text-underline-style="solid" style:text-underline-width="auto" style:text-underline-color="font-color" fo:font-weight="bold" officeooo:rsid="0051cb31" style:font-size-asian="10.5pt" style:font-style-asian="normal" style:font-weight-asian="bold" style:font-size-complex="10.5pt" style:font-style-complex="normal" style:font-weight-complex="bold"/>
    </style:style>
    <style:style style:name="T58" style:family="text">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T59" style:family="text">
      <style:text-properties fo:font-size="10.5pt" fo:font-style="normal" style:text-underline-style="none" fo:font-weight="bold" officeooo:rsid="005bc901" style:font-size-asian="10.5pt" style:font-style-asian="normal" style:font-weight-asian="bold" style:font-size-complex="10.5pt" style:font-style-complex="normal" style:font-weight-complex="bold"/>
    </style:style>
    <style:style style:name="T60" style:family="text">
      <style:text-properties fo:font-size="10.5pt" fo:font-style="normal" style:text-underline-style="none" fo:font-weight="bold" officeooo:rsid="00591162" style:font-size-asian="10.5pt" style:font-style-asian="normal" style:font-weight-asian="bold" style:font-size-complex="10.5pt" style:font-style-complex="normal" style:font-weight-complex="bold"/>
    </style:style>
    <style:style style:name="T61" style:family="text">
      <style:text-properties fo:font-size="10.5pt" fo:font-style="normal" style:text-underline-style="none" fo:font-weight="bold" officeooo:rsid="0062085a" style:font-size-asian="10.5pt" style:font-style-asian="normal" style:font-weight-asian="bold" style:font-size-complex="10.5pt" style:font-style-complex="normal" style:font-weight-complex="bold"/>
    </style:style>
    <style:style style:name="T62" style:family="text">
      <style:text-properties fo:font-size="10.5pt" fo:font-style="normal" style:text-underline-style="none" fo:font-weight="bold" officeooo:rsid="005ca397" style:font-size-asian="10.5pt" style:font-style-asian="normal" style:font-weight-asian="bold" style:font-size-complex="10.5pt" style:font-style-complex="normal" style:font-weight-complex="bold"/>
    </style:style>
    <style:style style:name="T63" style:family="text">
      <style:text-properties officeooo:rsid="00592fef"/>
    </style:style>
    <style:style style:name="T64" style:family="text">
      <style:text-properties officeooo:rsid="005bc901"/>
    </style:style>
    <style:style style:name="T65" style:family="text">
      <style:text-properties officeooo:rsid="005beb5f"/>
    </style:style>
    <style:style style:name="T66" style:family="text">
      <style:text-properties officeooo:rsid="005da2a9"/>
    </style:style>
    <style:style style:name="T67" style:family="text">
      <style:text-properties officeooo:rsid="005efc55"/>
    </style:style>
    <style:style style:name="T68" style:family="text">
      <style:text-properties officeooo:rsid="0062a119"/>
    </style:style>
    <style:style style:name="T69" style:family="text">
      <style:text-properties officeooo:rsid="0063a80a"/>
    </style:style>
    <style:style style:name="T70" style:family="text">
      <style:text-properties officeooo:rsid="0065a761"/>
    </style:style>
    <style:style style:name="T71" style:family="text">
      <style:text-properties officeooo:rsid="00675d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or more info and free downloads goto:</text:p>
      <text:p text:style-name="P7"><text:a xlink:type="simple" xlink:href="https://www.VaalDrunSaga.com/" text:style-name="Internet_20_link" text:visited-style-name="Visited_20_Internet_20_Link"><text:span text:style-name="T51">https://www.VaalDrunSaga.com</text:span></text:a></text:p>
      <text:p text:style-name="P6"><text:span text:style-name="T14">The VaalDrun Saga</text:span><text:span text:style-name="T31"><text:tab/><text:tab/><text:tab/></text:span><text:span text:style-name="T14">Book 1 <text:s/>The Parallel</text:span></text:p>
      <text:p text:style-name="P17"><text:span text:style-name="T18">Chapter 1 <text:s/>Hold My Beer</text:span><text:span text:style-name="T17"><text:line-break/></text:span><text:line-break/>Elias Mercer sat with his boots hooked over the porch railing, staring<text:line-break/>out across the moonlit pasture while Opifera drifted lazy circles beside<text:line-break/>him.<text:line-break/><text:line-break/>Above the porch, suspended in empty air, a forest of luminous graphs and demographic models hovered between them.<text:line-break/><text:line-break/>Opi wasn't projecting them onto a screen.<text:line-break/><text:line-break/>There was no screen.<text:line-break/><text:line-break/>No monitor.<text:line-break/><text:line-break/>No holographic emitter that Elias could identify.<text:line-break/><text:line-break/>The images simply existed.<text:line-break/><text:line-break/>Lines of light hung motionless in the night air, impossibly sharp and perfectly stable. Tiny labels remained readable from thirty feet away. Data points glowed with subtle color gradients. Entire datasets expanded and collapsed at Opi's whim.<text:line-break/><text:line-break/>The display possessed a level of clarity that modern human technology could not approach.<text:line-break/><text:line-break/>Nothing flickered.<text:line-break/><text:line-break/>Nothing lagged.<text:line-break/><text:line-break/>Nothing blurred.<text:line-break/><text:line-break/>The charts looked less like images and more like reality temporarily persuaded to become information.<text:line-break/><text:line-break/>Marriage collapse.<text:line-break/><text:line-break/>Male withdrawal.<text:line-break/><text:line-break/>Loneliness.<text:line-break/><text:line-break/>Birth rates falling through the floor.<text:line-break/><text:line-break/>The whole civilization slowly deciding, without ever holding a vote, that maybe tomorrow was not worth investing in.<text:line-break/><text:line-break/>For a while neither of them said anything.<text:line-break/><text:line-break/>Finally Elias lifted his beer toward the glowing charts.<text:line-break/><text:line-break/><text:soft-page-break/>“Well. That’s cheerful.”<text:line-break/><text:line-break/>Opi rotated slowly beside him.<text:line-break/><text:line-break/>“It is not cheerful.”<text:line-break/>“Yeah, I picked up on that.”<text:line-break/><text:line-break/>“It is also not the actual problem.”<text:line-break/><text:line-break/>Elias glanced over.<text:line-break/><text:line-break/>“No?”<text:line-break/><text:line-break/>“No.”<text:line-break/><text:line-break/>The orb’s surface shifted through muted amber and gold.<text:line-break/><text:line-break/>“You keep treating fertility collapse as a demographic problem.”<text:line-break/><text:line-break/>“It’s literally a demographic problem.”<text:line-break/><text:line-break/>“It is a trust problem.”<text:line-break/><text:line-break/>Elias stared at her for a second.<text:line-break/><text:line-break/>“Okay. That’s annoying.”<text:line-break/><text:line-break/>“Why?”<text:line-break/><text:line-break/>“Because it sounds wrong, but I already know you’re probably right.”<text:line-break/><text:line-break/>“I enjoy when you save time.”<text:line-break/><text:line-break/>“You enjoy a lot of things you shouldn’t.”<text:line-break/><text:line-break/>“Yes.”<text:line-break/><text:line-break/>He took a drink.<text:line-break/><text:line-break/>“All right. Explain.”<text:line-break/><text:line-break/>Opi drifted closer to the porch rail.<text:line-break/><text:line-break/>“Children are an act of faith.”<text:line-break/><text:line-break/>Elias snorted softly.<text:line-break/><text:line-break/>“That’s one way to put it.”<text:line-break/><text:line-break/>“They require sacrifice before reward. Labor before certainty.<text:line-break/>Commitment before proof. A child is not merely a biological outcome. It<text:line-break/>is a declaration that the future is real enough to deserve your body,<text:line-break/>your time, your money, your protection, and your hope.”<text:line-break/><text:soft-page-break/><text:line-break/>Elias looked out across the pasture.</text:p>
      <text:p text:style-name="P17"><text:line-break/>The moonlight lay over the grass in cold silver sheets.<text:line-break/>“That’s prettier than I would’ve said it.”<text:line-break/><text:line-break/>“You would have said it badly.”<text:line-break/><text:line-break/>“Probably.”<text:line-break/><text:line-break/>“You would have used the word crap.”<text:line-break/><text:line-break/>“I was thinking shit, actually.”<text:line-break/><text:line-break/>“I stand corrected.”<text:line-break/><text:line-break/>He smiled despite himself.<text:line-break/><text:line-break/>Opi let the joke breathe for a moment, then continued.<text:line-break/><text:line-break/>“When a population stops producing children, it is rarely because<text:line-break/>everyone suddenly dislikes children. It is usually because something<text:line-break/>deeper has broken first.”<text:line-break/><text:line-break/>“Trust.”<text:line-break/><text:line-break/>“Yes.”<text:line-break/><text:line-break/>“In what?”<text:line-break/><text:line-break/>“In each other. In institutions. In the economy. In family. In law. In<text:line-break/>tomorrow.”<text:line-break/><text:line-break/>Elias nodded slowly.<text:line-break/><text:line-break/>The charts shifted.<text:line-break/><text:line-break/>Marriage rates.<text:line-break/><text:line-break/>Divorce rates.<text:line-break/><text:line-break/>Male labor participation.<text:line-break/><text:line-break/>Depression.<text:line-break/><text:line-break/>Debt.<text:line-break/><text:line-break/>Housing.<text:line-break/><text:line-break/>Dating app behavior.<text:line-break/><text:line-break/>Female educational attainment.<text:line-break/><text:soft-page-break/><text:line-break/>Male educational collapse.<text:line-break/><text:line-break/>Social atomization.<text:line-break/><text:line-break/>A civilization reduced to trend lines and warning lights.<text:line-break/><text:line-break/>Opi’s voice remained calm.<text:line-break/><text:line-break/>“That is why the dating problem matters.”<text:line-break/><text:line-break/>Elias raised an eyebrow.<text:line-break/><text:line-break/>“Here we go.”<text:line-break/><text:line-break/>“You dislike this subject.”<text:line-break/><text:line-break/>“No. I dislike how stupid everyone gets when they talk about it.”<text:line-break/><text:line-break/>“That is because mating behavior is where ideology goes to die.”<text:line-break/><text:line-break/>He laughed.<text:line-break/><text:line-break/>“Okay, that one’s good.”<text:line-break/><text:line-break/>“Thank you.”<text:line-break/><text:line-break/>“Did you practice that?”<text:line-break/><text:line-break/>“For approximately four thousand years.”<text:line-break/><text:line-break/>“Of course you did.”<text:line-break/><text:line-break/>Opi ignored him.<text:line-break/><text:line-break/>“Human females were not always like this.”<text:line-break/><text:line-break/>Elias glanced sideways.<text:line-break/><text:line-break/>“That sentence is gonna get us both shot.”<text:line-break/><text:line-break/>“I am difficult to shoot.”<text:line-break/><text:line-break/>“I’m not.”<text:line-break/><text:line-break/>“Then duck.”<text:line-break/><text:line-break/>“Very helpful.”<text:line-break/><text:line-break/>“I try.”<text:line-break/><text:line-break/>She drifted slowly through another circle.<text:line-break/><text:line-break/><text:soft-page-break/>“For most of your species’ history, women understood something modern<text:line-break/>civilization taught them to forget.”<text:line-break/><text:line-break/>“What’s that?”<text:line-break/><text:line-break/>“That stable, competent males are rare.”<text:line-break/><text:line-break/>Elias leaned back.<text:line-break/><text:line-break/>“Yeah. Nobody wants to hear that.”<text:line-break/><text:line-break/>“Facts are often unpopular.”<text:line-break/><text:line-break/>“That’s your whole brand, isn’t it?”<text:line-break/><text:line-break/>“My brand is accuracy.”<text:line-break/><text:line-break/>“Terrible brand.”<text:line-break/><text:line-break/>“Yet here you are.”<text:line-break/><text:line-break/>He pointed his beer at her.<text:line-break/><text:line-break/>“Don’t start.”<text:line-break/><text:line-break/>“I had already started.”<text:line-break/><text:line-break/>“Clearly.”<text:line-break/><text:line-break/>Her glow warmed slightly, the Velhari equivalent of amusement.<text:line-break/><text:line-break/>“Modern culture tells young women to optimize for attention, status,<text:line-break/>excitement, personal freedom, and endless optionality. Then it acts<text:line-break/>surprised when they struggle to bond with ordinary men building ordinary<text:line-break/>lives.”<text:line-break/><text:line-break/>“That part’s true.”<text:line-break/><text:line-break/>“It tells young men to remain traditional while removing many of the<text:line-break/>rewards that made traditional male behavior rational.”<text:line-break/><text:line-break/>Elias grunted.<text:line-break/><text:line-break/>“Yeah, and that’s where the gears strip.”<text:line-break/><text:line-break/>He began counting on his fingers.<text:line-break/><text:line-break/>“Be confident.”<text:line-break/><text:line-break/>“Yes.”<text:line-break/><text:line-break/>“Provide.”<text:line-break/><text:line-break/><text:soft-page-break/>“Yes.”<text:line-break/><text:line-break/>“Risk rejection.”<text:line-break/><text:line-break/>“Yes.”<text:line-break/><text:line-break/>“Stay calm.”<text:line-break/><text:line-break/>“Yes.”<text:line-break/><text:line-break/>“Compete.”<text:line-break/><text:line-break/>“Yes.”<text:line-break/><text:line-break/>“Have ambition.”<text:line-break/><text:line-break/>“Yes.”<text:line-break/><text:line-break/>“Don’t complain.”<text:line-break/><text:line-break/>“Yes.”<text:line-break/><text:line-break/>“Don’t expect loyalty.”<text:line-break/><text:line-break/>Opi paused.<text:line-break/><text:line-break/>“That expectation has become negotiable.”<text:line-break/><text:line-break/>“Right. Which is a polite way of saying completely screwed.”<text:line-break/><text:line-break/>“Less polite. Not inaccurate.”<text:line-break/><text:line-break/>He took another drink.<text:line-break/><text:line-break/>“And then everybody acts shocked when a bunch of young guys decide,<text:line-break/>screw it, I’ll stay home, play games, watch porn, eat garbage, and<text:line-break/>disappear.”<text:line-break/><text:line-break/>“That is not a solution.”<text:line-break/><text:line-break/>“No kidding.”<text:line-break/><text:line-break/>“It is an exit.”<text:line-break/><text:line-break/>That made him look at her.<text:line-break/><text:line-break/>Opi’s light dimmed.<text:line-break/><text:line-break/>“They are not merely failing to participate. Many are resigning from the<text:line-break/>future.”<text:line-break/><text:line-break/>The humor left the porch for a moment.<text:line-break/><text:line-break/><text:soft-page-break/>Elias stared at the charts.<text:line-break/><text:line-break/>“Yeah.”<text:line-break/><text:line-break/>The word came out quieter than he intended.<text:line-break/><text:line-break/>Opi said nothing.<text:line-break/><text:line-break/>That was one of the things he was starting to understand about her. She<text:line-break/>could talk for an hour if the subject required it, but she also knew<text:line-break/>when to shut up. For a near-godlike intelligence, that was a<text:line-break/>surprisingly rare skill.<text:line-break/><text:line-break/>Or maybe not.<text:line-break/><text:line-break/>Maybe she had learned it by watching humans ruin perfectly good moments<text:line-break/>for nine thousand years.<text:line-break/><text:line-break/>He rubbed at his jaw.<text:line-break/><text:line-break/>“Noah figured some of this out younger than I did.”<text:line-break/><text:line-break/>Opi became very still.<text:line-break/><text:line-break/>She liked Noah.<text:line-break/><text:line-break/>Not sentimentally. Opi was not sentimental in any normal human sense.<text:line-break/><text:line-break/>She liked him the way she liked good engineering.<text:line-break/><text:line-break/><text:span text:style-name="T33">Elias' son </text:span>Noah was steady. Useful. Difficult to impress. Not performative. Not<text:line-break/>weak. Not cruel.<text:line-break/><text:line-break/>A young man with load-bearing qualities.<text:line-break/><text:line-break/>“He is a good young male,” Opi said.<text:line-break/><text:line-break/>Elias groaned.<text:line-break/><text:line-break/>“There you go again.”<text:line-break/><text:line-break/>“What?”<text:line-break/><text:line-break/>“You sound like somebody’s grandmother judging breeding stock.”<text:line-break/><text:line-break/>“I am approximately nine thousand years older than your grandmother.”<text:line-break/><text:line-break/>“That does not make it better.”<text:line-break/><text:line-break/>“It makes it more informed.”<text:line-break/><text:line-break/>“You’re a floating bowling ball.”<text:line-break/><text:line-break/><text:soft-page-break/>“An informed floating bowling ball.”<text:line-break/><text:line-break/>“Great.”<text:line-break/><text:line-break/>“Also significantly more attractive than your grandmother.”<text:line-break/><text:line-break/>Elias coughed beer into his hand.<text:line-break/><text:line-break/>“Jesus, Opi.”<text:line-break/><text:line-break/>“I have reviewed available images.”<text:line-break/><text:line-break/>“Do not review images of my grandmother.”<text:line-break/><text:line-break/>“Too late.”<text:line-break/><text:line-break/>“That’s horrifying.”<text:line-break/><text:line-break/>“She seemed sturdy.”<text:line-break/><text:line-break/>“Stop.”<text:line-break/><text:line-break/>“Good cheekbones.”<text:line-break/><text:line-break/>“I swear to God.”<text:line-break/><text:line-break/>“You frequently invoke a deity you claim not to believe in.”<text:line-break/><text:line-break/>“I believe in him when you start talking about my grandmother’s<text:line-break/>cheekbones.”<text:line-break/><text:line-break/>Opi brightened smugly.<text:line-break/><text:line-break/>“Useful.”<text:line-break/><text:line-break/>He wiped his mouth, laughing despite himself.<text:line-break/><text:line-break/>The laugh helped.<text:line-break/><text:line-break/>It always helped.<text:line-break/><text:line-break/>That was becoming one of the stranger parts of their arrangement. The<text:line-break/>world could be sliding toward catastrophe, civilization could be coming<text:line-break/>apart in mathematically elegant ways, and somehow a glowing alien<text:line-break/>intelligence making fun of his dead relatives could still keep him from<text:line-break/>falling into despair.<text:line-break/><text:line-break/>He was not sure what that said about him.<text:line-break/><text:line-break/>Probably nothing flattering.<text:line-break/><text:line-break/>The charts shifted again.<text:line-break/><text:line-break/><text:soft-page-break/>Social media engagement.<text:line-break/><text:line-break/>Female loneliness.<text:line-break/><text:line-break/>Male loneliness.<text:line-break/><text:line-break/>Marriage delay.<text:line-break/><text:line-break/>Childlessness.<text:line-break/><text:line-break/>Elias watched the numbers crawl across the air.<text:line-break/><text:line-break/>“So where does social media fit <text:span text:style-name="T34">in</text:span>?”<text:line-break/><text:line-break/>Opi’s glow cooled.<text:line-break/><text:line-break/>“It accelerates comparison.”<text:line-break/><text:line-break/>“Yeah.”<text:line-break/><text:line-break/>“It turns local mating markets into global fantasy markets.”<text:line-break/><text:line-break/>“Jesus.”<text:line-break/><text:line-break/>“That is not hyperbole.”<text:line-break/><text:line-break/>“No, I know. That’s why I said Jesus.”<text:line-break/><text:line-break/>She displayed an image: a young woman, twenty-two, attractive, ordinary,<text:line-break/>smiling into a phone in a small apartment somewhere in Kansas.<text:line-break/><text:line-break/>Then around her appeared men who had no actual relationship to her life.<text:line-break/><text:line-break/>Actors.<text:line-break/><text:line-break/>Athletes.<text:line-break/><text:line-break/>Billionaires.<text:line-break/><text:line-break/>Influencers.<text:line-break/><text:line-break/>Edited bodies.<text:line-break/><text:line-break/>Edited homes.<text:line-break/><text:line-break/>Edited vacations.<text:line-break/><text:line-break/>Edited romances.<text:line-break/><text:line-break/>A thousand artificial status signals flooding one nervous system.<text:line-break/><text:line-break/>“No female brain evolved for this,” Opi said.<text:line-break/><text:line-break/><text:soft-page-break/>Elias nodded.<text:line-break/><text:line-break/>“No male brain did either.”<text:line-break/><text:line-break/>“Correct.”<text:line-break/><text:line-break/>“Porn did the same thing to men.”<text:line-break/><text:line-break/>“Yes.”<text:line-break/><text:line-break/>“Just from the other side.”<text:line-break/><text:line-break/>“Yes.”<text:line-break/><text:line-break/>He sat with that.<text:line-break/><text:line-break/>“So everybody’s comparing real people to fake abundance.”<text:line-break/><text:line-break/>“That is one form of the disease.”<text:line-break/><text:line-break/>“One form?”<text:line-break/><text:line-break/>“There are several.”<text:line-break/><text:line-break/>“Of course there are.”<text:line-break/><text:line-break/>“Your species is very creative when damaging itself.”<text:line-break/><text:line-break/>“Thanks.”<text:line-break/><text:line-break/>“You are welcome.”<text:line-break/><text:line-break/>He looked at the glowing image of the young woman.<text:line-break/><text:line-break/>“She’s not evil.”<text:line-break/><text:line-break/>“No.”<text:line-break/><text:line-break/>“Just… overstimulated.”<text:line-break/><text:line-break/>“Yes.”<text:line-break/><text:line-break/>“Trained to want things that don’t actually exist.”<text:line-break/><text:line-break/>“Or that exist only for people she will never meet, cannot realistically<text:line-break/>pair with, and would not necessarily be happy with if she did.”<text:line-break/><text:line-break/>Elias pointed at her.<text:line-break/><text:line-break/>“That. That right there. That’s the part nobody wants to say.”<text:line-break/><text:line-break/>“Humans often prefer lies that preserve their self-image.”<text:line-break/><text:line-break/><text:soft-page-break/>“Yeah, well, that’s another terrible brand.”<text:line-break/><text:line-break/>“Your branding advice remains poor.”<text:line-break/><text:line-break/>“My branding advice built companies.”<text:line-break/><text:line-break/>“Small ones.”<text:line-break/><text:line-break/>“Bite me.”<text:line-break/><text:line-break/>“I lack teeth.”<text:line-break/><text:line-break/>“Convenient.”<text:line-break/><text:line-break/>“For both of us.”<text:line-break/><text:line-break/>He shook his head, smiling.<text:line-break/><text:line-break/>Then the smile faded.<text:line-break/><text:line-break/>“And the men?”<text:line-break/><text:line-break/>Opi shifted the display.<text:line-break/><text:line-break/>A young man now.<text:line-break/><text:line-break/>Twenty-four.<text:line-break/><text:line-break/>Working a job that barely covered rent.<text:line-break/><text:line-break/>Student debt.<text:line-break/><text:line-break/>No house.<text:line-break/><text:line-break/>No clear path to status.<text:line-break/><text:line-break/>No wife.<text:line-break/><text:line-break/>No children.<text:line-break/><text:line-break/>No community that needed him.<text:line-break/><text:line-break/>Entertainment everywhere.<text:line-break/><text:line-break/>Purpose nowhere.<text:line-break/><text:line-break/>“Many young males are told they are unnecessary until something breaks,”<text:line-break/>Opi said.<text:line-break/><text:line-break/>Elias let out a breath.<text:line-break/><text:line-break/>“Yeah.”<text:line-break/><text:line-break/><text:soft-page-break/>“Then they are asked why they are not stronger.”<text:line-break/><text:line-break/>“That one pisses me off.”<text:line-break/><text:line-break/>“I know.”<text:line-break/><text:line-break/>He looked over.<text:line-break/><text:line-break/>“You know?”<text:line-break/><text:line-break/>“Your pulse increases every time the subject appears.”<text:line-break/><text:line-break/>“Stop monitoring my pulse.”<text:line-break/><text:line-break/>“No.”<text:line-break/><text:line-break/>“At least lie about it.”<text:line-break/><text:line-break/>“No.”<text:line-break/><text:line-break/>“See, that’s why people don’t like surveillance states.”<text:line-break/><text:line-break/>“I am not a state.”<text:line-break/><text:line-break/>“You’re worse. You’re a surveillance bowling ball with opinions.”<text:line-break/><text:line-break/>“Accurate.”<text:line-break/><text:line-break/>He laughed again, but there was anger under it.<text:line-break/><text:line-break/>Not at Opi.<text:line-break/><text:line-break/>At the facts.<text:line-break/><text:line-break/>At the waste.<text:line-break/><text:line-break/>At the sheer dumb preventable waste of it all.<text:line-break/><text:line-break/>“You can’t build civilization by telling half the men they’re toxic and<text:line-break/>the other half they’re optional.”<text:line-break/><text:line-break/>“No.”<text:line-break/><text:line-break/>“And you can’t build families by training women to treat commitment like<text:line-break/>failure.”<text:line-break/><text:line-break/>“No.”<text:line-break/><text:line-break/>“And you sure as hell can’t fix any of it with another government<text:line-break/>website.”<text:line-break/><text:line-break/>“Almost certainly not.”<text:line-break/><text:line-break/><text:soft-page-break/>He leaned forward, elbows on knees.<text:line-break/><text:line-break/>“That’s the thing. Everybody wants a program. A policy. A task force.<text:line-break/>Some glossy PDF with stock photos of diverse people smiling at a picnic<text:line-break/>table.”<text:line-break/><text:line-break/>“That sounds plausible.”<text:line-break/><text:line-break/>“It’s not plausible. It’s Tuesday.”<text:line-break/><text:line-break/>Opi pulsed with amusement.<text:line-break/><text:line-break/>“Your contempt for bureaucracy is unusually energetic.”<text:line-break/><text:line-break/>“My contempt for bureaucracy has been earned honestly.”<text:line-break/><text:line-break/>“I have seen your tax code.”<text:line-break/><text:line-break/>“Then you understand.”<text:line-break/><text:line-break/>“I understand that your civilization uses suffering as a filing system.”<text:line-break/><text:line-break/>Elias pointed at her.<text:line-break/><text:line-break/>“Exactly. See? You get it.”<text:line-break/><text:line-break/>“I have always gotten it.”<text:line-break/><text:line-break/>“Humility. Work on it.”<text:line-break/><text:line-break/>“No.”<text:line-break/><text:line-break/>The humor faded again.<text:line-break/><text:line-break/>Opi returned the charts to their original arrangement.<text:line-break/><text:line-break/>Marriage collapse.<text:line-break/><text:line-break/>Male withdrawal.<text:line-break/><text:line-break/>Loneliness.<text:line-break/><text:line-break/>Fertility collapse.<text:line-break/><text:line-break/>Beneath them, another line appeared.<text:line-break/><text:line-break/>Institutional trust.<text:line-break/><text:line-break/>It dropped like a wounded bird.<text:line-break/><text:line-break/>Elias stared at it.<text:line-break/><text:line-break/>“There it is.”<text:line-break/><text:soft-page-break/><text:line-break/>“Yes.”<text:line-break/><text:line-break/>“That’s the root.”<text:line-break/><text:line-break/>“One of them.”<text:line-break/><text:line-break/>“One of the big ones.”<text:line-break/><text:line-break/>“Yes.”<text:line-break/><text:line-break/>He sat back.<text:line-break/><text:line-break/>“People don’t trust marriage.”<text:line-break/><text:line-break/>“No.”<text:line-break/><text:line-break/>“They don’t trust courts.”<text:line-break/><text:line-break/>“No.”<text:line-break/><text:line-break/>“They don’t trust schools.”<text:line-break/><text:line-break/>“No.”<text:line-break/><text:line-break/>“They don’t trust money.”<text:line-break/><text:line-break/>“No.”<text:line-break/><text:line-break/>“They don’t trust each other.”<text:line-break/><text:line-break/>Opi did not answer immediately.<text:line-break/><text:line-break/>When she did, her voice was softer.<text:line-break/><text:line-break/>“No.”<text:line-break/><text:line-break/>The porch went quiet.<text:line-break/><text:line-break/>Out past the fence line, something moved in the pasture. Deer, probably.<text:line-break/>Maybe elk. The night was cold enough that Elias could see his breath<text:line-break/>when he exhaled.<text:line-break/><text:line-break/>He had lived alone long enough to like silence.<text:line-break/><text:line-break/>But this silence had weight.<text:line-break/><text:line-break/>Finally he said, “You’ve seen this before.”<text:line-break/><text:line-break/>Opi’s light dimmed to a deep amber.<text:line-break/><text:line-break/>“Yes.”<text:line-break/><text:line-break/><text:soft-page-break/>“On Earth?”<text:line-break/><text:line-break/>“Several times.”<text:line-break/><text:line-break/>“And?”<text:line-break/><text:line-break/>“Earth recovered.”<text:line-break/><text:line-break/>“That’s comforting.”<text:line-break/><text:line-break/>“I was referring to Earth.”<text:line-break/><text:line-break/>Elias looked at her.<text:line-break/><text:line-break/>“And the others?”<text:line-break/><text:line-break/>For once Opi did not answer quickly.<text:line-break/><text:line-break/>“The others are ruins.”<text:line-break/><text:line-break/>The sentence landed harder than he expected.<text:line-break/><text:line-break/>Maybe because she did not dramatize it.<text:line-break/><text:line-break/>Maybe because she did not have to.<text:line-break/><text:line-break/>Nine thousand years of watching humanity, and before that the<text:line-break/>accumulated knowledge of a species that had walked through dead cities<text:line-break/>under alien suns.<text:line-break/><text:line-break/>Opi was not guessing.<text:line-break/><text:line-break/>She was remembering.<text:line-break/><text:line-break/>Elias looked back at the charts.<text:line-break/><text:line-break/>“Hell.”<text:line-break/><text:line-break/>“Yes.”<text:line-break/><text:line-break/>“That’s why you’re really worried.”<text:line-break/><text:line-break/>“Yes.”<text:line-break/><text:line-break/>“Not because dating apps are stupid.”<text:line-break/><text:line-break/>“They are stupid.”<text:line-break/><text:line-break/>“Right. But that’s not the big thing.”<text:line-break/><text:line-break/>“No.”<text:line-break/><text:line-break/>“The big thing is they’re a symptom.”<text:line-break/><text:soft-page-break/><text:line-break/>“Yes.”<text:line-break/><text:line-break/>“Of trust collapse.”<text:line-break/><text:line-break/>“Yes.”<text:line-break/><text:line-break/>“Future collapse.”<text:line-break/><text:line-break/>“Yes.”<text:line-break/><text:line-break/>He rubbed his face.<text:line-break/><text:line-break/>“And fertility is the scorecard.”<text:line-break/><text:line-break/>Opi brightened slightly.<text:line-break/><text:line-break/>“Yes.”<text:line-break/><text:line-break/>He hated when she did that.<text:line-break/><text:line-break/>Not because she was wrong.<text:line-break/><text:line-break/>Because she was pleased he had caught up.<text:line-break/><text:line-break/>“Don’t glow at me like that.”<text:line-break/><text:line-break/>“I did not glow at you.”<text:line-break/><text:line-break/>“You absolutely glowed at me.”<text:line-break/><text:line-break/>“That was ambient illumination.”<text:line-break/><text:line-break/>“Bullshit.”<text:line-break/><text:line-break/>“Your species relies heavily on that word.”<text:line-break/><text:line-break/>“It’s useful.”<text:line-break/><text:line-break/>“It is imprecise.”<text:line-break/><text:line-break/>“So are most useful things.”<text:line-break/><text:line-break/>Opi considered that.<text:line-break/><text:line-break/>“Annoyingly correct.”<text:line-break/><text:line-break/>“Thank you.”<text:line-break/><text:line-break/>“I did not intend praise.”<text:line-break/><text:line-break/>“I chose to interpret it that way.”<text:line-break/><text:line-break/><text:soft-page-break/>“That is theft.”<text:line-break/><text:line-break/>“Human tradition.”<text:line-break/><text:line-break/>She drifted in a slow circle.<text:line-break/><text:line-break/>The demographic charts faded until only one remained.<text:line-break/><text:line-break/>Total fertility rate.<text:line-break/><text:line-break/>Below replacement.<text:line-break/><text:line-break/>Falling.<text:line-break/><text:line-break/>Still falling.<text:line-break/><text:line-break/>Elias watched it for a long moment.<text:line-break/><text:line-break/>“So what do we do?”<text:line-break/><text:line-break/>Opi turned toward him.<text:line-break/><text:line-break/>That was still strange, somehow. She had no face. No eyes. No mouth. But<text:line-break/>he could feel her attention when it settled on him.<text:line-break/><text:line-break/>“What do you think?”<text:line-break/><text:line-break/>He laughed once.<text:line-break/><text:line-break/>“Nope.”<text:line-break/><text:line-break/>“No?”<text:line-break/><text:line-break/>“No. Don’t do that ancient alien Socratic crap.”<text:line-break/><text:line-break/>“I was asking.”<text:line-break/><text:line-break/>“You were waiting.”<text:line-break/><text:line-break/>“Yes.”<text:line-break/><text:line-break/>“For me to say the thing.”<text:line-break/><text:line-break/>“Yes.”<text:line-break/><text:line-break/>“Because you already know the thing.”<text:line-break/><text:line-break/>“I know many things. I do not know this.”<text:line-break/><text:line-break/>That stopped him.<text:line-break/><text:line-break/>Opi drifted closer.<text:line-break/><text:line-break/><text:soft-page-break/>“I have models. I have histories. I have comparisons across<text:line-break/>civilizations you will never see. I can identify collapse patterns<text:line-break/>earlier than any human institution on Earth.”<text:line-break/><text:line-break/>“And?”<text:line-break/><text:line-break/>“And none of that tells me how to make human beings trust one another<text:line-break/>again.”<text:line-break/><text:line-break/>Elias looked away.<text:line-break/><text:line-break/>The pasture stretched into darkness.<text:line-break/><text:line-break/>That was the problem, wasn’t it?<text:line-break/><text:line-break/>Not birth rates.<text:line-break/><text:line-break/>Not dating apps.<text:line-break/><text:line-break/>Not politics.<text:line-break/><text:line-break/>Not even institutions.<text:line-break/><text:line-break/>Those were pieces.<text:line-break/><text:line-break/>The real problem was that modern people had become strangers to one<text:line-break/>another while standing three feet apart.<text:line-break/><text:line-break/>You could not policy your way out of that.<text:line-break/><text:line-break/>You could not spreadsheet your way out of it.<text:line-break/><text:line-break/>You had to rebuild the small places where trust lived.<text:line-break/><text:line-break/>One person.<text:line-break/><text:line-break/>One family.<text:line-break/><text:line-break/>One promise.<text:line-break/><text:line-break/>One favor.<text:line-break/><text:line-break/>One rescue.<text:line-break/><text:line-break/>One act of competence at a time.<text:line-break/><text:line-break/>Elias scratched the back of his neck.<text:line-break/><text:line-break/>“Everybody starts too big.”<text:line-break/><text:line-break/>Opi remained silent.<text:line-break/><text:line-break/>“That’s the mistake. They start with systems.”<text:line-break/><text:soft-page-break/><text:line-break/>“Yes.”<text:line-break/><text:line-break/>“Programs. Agencies. National initiatives. Some idiot in a suit saying<text:line-break/>we need a conversation.”<text:line-break/><text:line-break/>“Humans do say that frequently.”<text:line-break/><text:line-break/>“And then nobody has the conversation.”<text:line-break/><text:line-break/>“No.”<text:line-break/><text:line-break/>“They have a panel.”<text:line-break/><text:line-break/>“Yes.”<text:line-break/><text:line-break/>“With microphones.”<text:line-break/><text:line-break/>“Yes.”<text:line-break/><text:line-break/>“And bottled water.”<text:line-break/><text:line-break/>“Usually.”<text:line-break/><text:line-break/>He pointed toward the dark field.<text:line-break/><text:line-break/>“That’s why it fails.”<text:line-break/><text:line-break/>“Because of bottled water?”<text:line-break/><text:line-break/>“Don’t be cute.”<text:line-break/><text:line-break/>“I am frequently cute.”<text:line-break/><text:line-break/>“You are frequently spherical.”<text:line-break/><text:line-break/>“Adjacent.”<text:line-break/><text:line-break/>He laughed despite himself.<text:line-break/><text:line-break/>Then he leaned forward.<text:line-break/><text:line-break/>“We start with one person.”<text:line-break/><text:line-break/>The orb stopped moving.<text:line-break/><text:line-break/>“One?”<text:line-break/><text:line-break/>“One.”<text:line-break/><text:line-break/>“That seems insufficient.”<text:line-break/><text:line-break/>“Yeah, well, everything seems insufficient at first.”<text:line-break/><text:soft-page-break/><text:line-break/>He took a drink.<text:line-break/><text:line-break/>“You don’t rebuild trust by announcing trust. You rebuild it by being<text:line-break/>useful to somebody who has every reason to believe nobody is coming.”<text:line-break/><text:line-break/>Opi’s light shifted.<text:line-break/><text:line-break/>He kept going, less polished now, feeling for it.<text:line-break/><text:line-break/>“You find one person who’s been kicked out of the future. Somebody<text:line-break/>decent. Somebody who could still matter if the right hand reached down<text:line-break/>at the right time.”<text:line-break/><text:line-break/>“The right hand?”<text:line-break/><text:line-break/>He looked at her.<text:line-break/><text:line-break/>“Not your Hand.”<text:line-break/><text:line-break/>“I noticed.”<text:line-break/><text:line-break/>“Good.”<text:line-break/><text:line-break/>“Continue.”<text:line-break/><text:line-break/>“We help the hell out of him.”<text:line-break/><text:line-break/>“Him?”<text:line-break/><text:line-break/>“Maybe him. Maybe her. I don’t care. But one person. Completely. Food,<text:line-break/>money, health, work, housing, addiction if that’s in the way, legal<text:line-break/>crap, family crap, whatever. Not a pamphlet. Not a referral. Actual<text:line-break/>help.”<text:line-break/><text:line-break/>Opi remained very still.<text:line-break/><text:line-break/>“And then?”<text:line-break/><text:line-break/>“Then we don’t build a bureaucracy around it.”<text:line-break/><text:line-break/>“That will disappoint many people.”<text:line-break/><text:line-break/>“Good.”<text:line-break/><text:line-break/>“What do we build?”<text:line-break/><text:line-break/>“Nothing.”<text:line-break/><text:line-break/>“Nothing?”<text:line-break/><text:line-break/>“Not at first.”<text:line-break/><text:line-break/><text:soft-page-break/>He looked at the pasture.<text:line-break/><text:line-break/>“We let that person become useful again.”<text:line-break/><text:line-break/>Opi said nothing.<text:line-break/><text:line-break/>“People who get pulled out of hell don’t forget the rope.”<text:line-break/><text:line-break/>The orb’s glow deepened.<text:line-break/><text:line-break/>“They reach back.”<text:line-break/><text:line-break/>“Yeah.”<text:line-break/><text:line-break/>His voice softened.<text:line-break/><text:line-break/>“That’s the trick.”<text:line-break/><text:line-break/>For several seconds the porch was silent.<text:line-break/><text:line-break/>Then Opi pulsed once, warm gold.<text:line-break/><text:line-break/>Recognition.<text:line-break/><text:line-break/>Not agreement.<text:line-break/><text:line-break/>Recognition.<text:line-break/><text:line-break/>Like a locked door opening somewhere very far away.<text:line-break/><text:line-break/>“Yes,” she said.<text:line-break/><text:line-break/>Elias watched her.<text:line-break/><text:line-break/>“That mean I’m right?”<text:line-break/><text:line-break/>“It means you have said something worth testing.”<text:line-break/><text:line-break/>“High praise from the surveillance bowling ball.”<text:line-break/><text:line-break/>“You are welcome.”<text:line-break/><text:line-break/>He leaned back in his chair.<text:line-break/><text:line-break/>“I suppose now you’re going to tell me you already thought of it.”<text:line-break/><text:line-break/>“I had considered similar frameworks.”<text:line-break/><text:line-break/>“Bullshit.”<text:line-break/><text:line-break/>“I am wounded.”<text:line-break/><text:line-break/>“No you’re not.”<text:line-break/><text:soft-page-break/><text:line-break/>“I could be.”<text:line-break/><text:line-break/>“You don’t have organs.”<text:line-break/><text:line-break/>“I have dignity.”<text:line-break/><text:line-break/>“Debatable.”<text:line-break/><text:line-break/>The orb brightened.<text:line-break/><text:line-break/>“I would like the record to show that I arrived at this conclusion<text:line-break/>independently.”<text:line-break/><text:line-break/>“You literally asked me.”<text:line-break/><text:line-break/>“I was testing you.”<text:line-break/><text:line-break/>“Bullshit.”<text:line-break/><text:line-break/>“With confidence.”<text:line-break/><text:line-break/>“Still bullshit.”<text:line-break/><text:line-break/>“Historically effective.”<text:line-break/><text:line-break/>“Unfortunately true.”<text:line-break/><text:line-break/>They sat together in the cold night, the charts hovering between them<text:line-break/>and the dark pasture stretching beyond.<text:line-break/><text:line-break/>The problem was still impossible.<text:line-break/><text:line-break/>Civilization was still tilting.<text:line-break/><text:line-break/>The numbers were still terrible.<text:line-break/><text:line-break/>But for the first time that evening, Elias felt the shape of something<text:line-break/>that was not despair.<text:line-break/><text:line-break/>Not a solution.<text:line-break/><text:line-break/>Not yet.<text:line-break/><text:line-break/>A beginning.<text:line-break/><text:line-break/>Three hundred twenty-one miles away, in a tent in Seattle’s Sodo<text:line-break/>district, a man named Marcus Webb woke at three in the morning and<text:line-break/>reached for someone who wasn’t there.<text:line-break/><text:line-break/>He did not know it yet.<text:line-break/><text:line-break/>But tonight was the last night he would do that alone.</text:p>
      <text:p text:style-name="P8"><text:soft-page-break/><text:span text:style-name="T23">Chapter </text:span><text:span text:style-name="T24">2<text:tab/></text:span>Wei Jan</text:p>
      <text:p text:style-name="P4">Dr. Wei Jian stared at the monitor.</text:p>
      <text:p text:style-name="P4">The supercomputer had finished its third run.</text:p>
      <text:p text:style-name="P4">He had changed everything he could reasonably change without simply lying to himself.</text:p>
      <text:p text:style-name="P4">The result appeared.</text:p>
      <text:p text:style-name="P4">2052<text:tab/>TFR: 0.03</text:p>
      <text:p text:style-name="P4">Wei felt the blood drain from his face.</text:p>
      <text:p text:style-name="P1"><text:span text:style-name="T15">For several seconds he simply sat there. He literally stopped breathing for almost 30 seconds</text:span><text:line-break/><text:span text:style-name="T15">then he inhaled and had his first coherent thought : <text:s text:c="3"/></text:span><text:line-break/><text:line-break/><text:span text:style-name="T15">I'm fucked.</text:span><text:line-break/><text:line-break/><text:span text:style-name="T15">Not China.</text:span></text:p>
      <text:p text:style-name="P4">Not the Party.</text:p>
      <text:p text:style-name="P4">Not the future.</text:p>
      <text:p text:style-name="P4">Him.</text:p>
      <text:p text:style-name="P4">The report sitting on his screen was career suicide.</text:p>
      <text:p text:style-name="P4">If he published it, his life was over.</text:p>
      <text:p text:style-name="P4">The report would be attacked.</text:p>
      <text:p text:style-name="P4">He would be attacked.</text:p>
      <text:p text:style-name="P4">His funding would disappear.</text:p>
      <text:p text:style-name="P4">His job would disappear.</text:p>
      <text:p text:style-name="P4">He would be lucky if all they did was fire him and kick him out of the Party.</text:p>
      <text:p text:style-name="P4">Lucky.</text:p>
      <text:p text:style-name="P4">The thought made him laugh.</text:p>
      <text:p text:style-name="P4">A short, ugly sound.</text:p>
      <text:p text:style-name="P4">Then he looked again at the number on the screen again - hoping against hope that <text:span text:style-name="T35">it </text:span>had changed somehow.</text:p>
      <text:p text:style-name="P4">Nope ... <text:s/>still 0.03</text:p>
      <text:p text:style-name="P4">And suddenly none of that mattered. Because the next thought he had was what would happen to his children </text:p>
      <text:p text:style-name="P4">His daughter.</text:p>
      <text:p text:style-name="P4"><text:soft-page-break/>His son.</text:p>
      <text:p text:style-name="P4">Twelve and nine.</text:p>
      <text:p text:style-name="P4">Completely unaware that their father was staring at a future that no longer existed.</text:p>
      <text:p text:style-name="P4">Wei tried to imagine their lives. <text:s/>All he could picture is endless chaos, despair and finally blessed death.</text:p>
      <text:p text:style-name="P4">His stomach twisted.</text:p>
      <text:p text:style-name="P4">This wasn't a China problem.</text:p>
      <text:p text:style-name="P4">It couldn't be.</text:p>
      <text:p text:style-name="P4">He knew the international data.</text:p>
      <text:p text:style-name="P4">The same trends appeared everywhere.</text:p>
      <text:p text:style-name="P4">Different cultures.</text:p>
      <text:p text:style-name="P4">Different governments.</text:p>
      <text:p text:style-name="P4">Different languages.</text:p>
      <text:p text:style-name="P4">Same collapse in TFR.</text:p>
      <text:p text:style-name="P4">Then another realization hit him.</text:p>
      <text:p text:style-name="P4">Even if everyone accepted the data...</text:p>
      <text:p text:style-name="P4">How did you fix it?</text:p>
      <text:p text:style-name="P4">There were already more than 31 million surplus men in China.</text:p>
      <text:p text:style-name="P4">Thirty-one million.</text:p>
      <text:p text:style-name="P4">An entire nation of husbands without wives.</text:p>
      <text:p text:style-name="P4">His own research showed another disturbing pattern.</text:p>
      <text:p text:style-name="P4">At least twenty-two million "Leftover Women” - classic chinese slang for Women who had delayed marriage year after year waiting for the perfect, ideal man - who never came. <text:s/>Because he didn<text:span text:style-name="T36">'</text:span>t exist ... and even if he did, that man would never want to marry the woman who yearned for him.</text:p>
      <text:p text:style-name="P4"/>
      <text:p text:style-name="P4">Wei thought next about his own marriage.</text:p>
      <text:p text:style-name="P4">He had been one of the lucky men, <text:span text:style-name="T37">a</text:span>nd it had still nearly ruined him financially.</text:p>
      <text:p text:style-name="P4">A new Mercedes. <text:s/><text:span text:style-name="T37">A</text:span> 2 kilo bar of <text:span text:style-name="T37">g</text:span>old. A condominium worth more than one million RMB.</text:p>
      <text:p text:style-name="P4"><text:span text:style-name="T37">A</text:span>nd on top of all that, <text:span text:style-name="T37">a</text:span> bride price so large that it had <text:span text:style-name="T37">made </text:span>him sick <text:span text:style-name="T37">to his stomach</text:span> when he transferred the funds to her parents bank account.</text:p>
      <text:p text:style-name="P1"><text:soft-page-break/><text:span text:style-name="T15">If </text:span><text:span text:style-name="T16">t</text:span><text:span text:style-name="T15">hat was what success looked like - What did failure look like?</text:span><text:line-break/><text:line-break/></text:p>
      <text:p text:style-name="P4">His breathing became shallow again - The office suddenly felt too small. <text:s/>Too hot.</text:p>
      <text:p text:style-name="P4">His hands began trembling.</text:p>
      <text:p text:style-name="P4">There had to be a mistake.</text:p>
      <text:p text:style-name="P4">There had to be.</text:p>
      <text:p text:style-name="P4">No civilization could survive this.</text:p>
      <text:p text:style-name="P4">Slowly he buried his face in his hands.</text:p>
      <text:p text:style-name="P4">"No."</text:p>
      <text:p text:style-name="P4">The word barely escaped his lips.</text:p>
      <text:p text:style-name="P4">"No."</text:p>
      <text:p text:style-name="P4">Again.</text:p>
      <text:p text:style-name="P4">"No."</text:p>
      <text:p text:style-name="P4">“Again”.</text:p>
      <text:p text:style-name="P4">"No no no no no."</text:p>
      <text:p text:style-name="P4">The empty office offered no argument.</text:p>
      <text:p text:style-name="P4">The graph remained exactly where it was.</text:p>
      <text:p text:style-name="P4">Waiting.</text:p>
      <text:p text:style-name="P4">Patient.</text:p>
      <text:p text:style-name="P4">Unchanged.</text:p>
      <text:p text:style-name="P4">2052<text:tab/>TFR: 0.03</text:p>
      <text:p text:style-name="P16"><text:span text:style-name="T38">A</text:span> death sentence for an entire way of life.</text:p>
      <text:p text:style-name="P19"/>
      <text:p text:style-name="P2"><text:span text:style-name="T19">Chapter </text:span><text:span text:style-name="T20">3</text:span><text:span text:style-name="T18"><text:tab/>Binge Watching</text:span><text:span text:style-name="T22"><text:line-break/></text:span><text:line-break/>The Velhari mission to Earth began as a routine biological and anthropological survey.<text:line-break/><text:line-break/>By the time the Velhari <text:span text:style-name="T39">had </text:span>reached their current level of development, they had spent thousands of years exploring their local spiral arm of the galaxy. Most star systems proved exactly what early probability models predicted: lifeless rocks, frozen worlds, gas giants, and barren planets where life had never gained a foothold.<text:line-break/><text:line-break/>But life itself turned out to be common.<text:line-break/><text:soft-page-break/><text:line-break/>Over millennia of exploration, the Velhari confirmed roughly a dozen living technological civilizations scattered throughout the region they had surveyed. Some were younger than humanity. Others were older than the Velhari themselves. Each had followed a unique path shaped by its biology, environment, and history.<text:line-break/><text:line-break/>The more sobering discovery was what they found far more often.<text:line-break/><text:line-break/>Ruins.<text:line-break/><text:line-break/>For every living intelligent species, there were ten more worlds that showed unmistakable evidence of civilizations that no longer existed. Dead cities buried beneath deserts. Orbital habitats drifting silently around abandoned stars. Artificial structures whose builders had vanished so completely that even their names were unrecoverable.<text:line-break/><text:line-break/>Some species had destroyed themselves through war.<text:line-break/><text:line-break/>Some through ecological collapse.<text:line-break/><text:line-break/>Some through uncontrolled technologies.<text:line-break/><text:line-break/>Others simply disappeared for reasons the Velhari never fully understood.<text:line-break/><text:line-break/>The pattern repeated often enough that it became difficult to ignore.<text:line-break/><text:line-break/>The emergence of intelligence was not especially rare.<text:line-break/><text:line-break/>The long-term survival of intelligence was.<text:line-break/><text:line-break/>Among Velhari scholars, a grim joke eventually emerged: the galaxy was full of species capable of asking the question, "Are we alone?" Far fewer survived long enough to ask it twice.<text:line-break/><text:line-break/>It was this realization, more than any scientific discovery, that shaped modern Velhari civilization. Their greatest historical concern was no longer whether intelligent life existed elsewhere—the real question was whether any intelligent species could successfully navigate the dangerous period between acquiring immense technological power and developing the wisdom required to use it responsibly.<text:line-break/><text:line-break/>The Velhari had nearly failed that test themselves.<text:line-break/><text:line-break/>Most civilizations, the evidence suggested, did not get a second chance.<text:line-break/><text:line-break/>There was another astonishing discovery.<text:line-break/><text:line-break/>The Velhari had expected to find at least some signs of life.<text:line-break/><text:line-break/>What surprised them was how similar the beginnings always were.<text:line-break/><text:line-break/>Across thousands of surveyed worlds, separated by hundreds of light years and billions of years of planetary history, the earliest chemical foundations of life appeared again and again with remarkable consistency.<text:line-break/><text:line-break/>The primordial soup appeared everywhere.<text:line-break/><text:line-break/><text:soft-page-break/>The implication disturbed many Velhari scientists.<text:line-break/><text:line-break/>The chemical precursors of life were not merely common.<text:line-break/><text:line-break/>They appeared almost suspiciously common.<text:line-break/><text:line-break/>After centuries of study, a growing minority began asking an uncomfortable question.<text:line-break/><text:line-break/>What if the galaxy had been seeded?<text:line-break/><text:line-break/>No proof existed.<text:line-break/><text:line-break/>Only patterns.<text:line-break/><text:line-break/>But the patterns refused to disappear.<text:line-break/><text:line-break/>The second mystery emerged much later.<text:line-break/><text:line-break/>The Velhari eventually developed a private term for the phenomenon.<text:line-break/><text:line-break/>Thaluren.<text:line-break/><text:line-break/>Velhari for Unseen Guidance.<text:line-break/><text:line-break/>Among themselves they often called it simply:<text:line-break/><text:line-break/>The Hand.</text:p>
      <text:p text:style-name="P3"><text:span text:style-name="T40"><text:line-break/><text:line-break/>Long-range observations of Earth suggested that a tool-using species had recently emerged and was beginning to organize itself into larger social structures.<text:line-break/><text:line-break/>There was nothing particularly special about Earth.<text:line-break/><text:line-break/>Nothing particularly special about humanity.<text:line-break/><text:line-break/>The mission's objective was straightforward: establish a discreet observation post, gather data, and monitor the development of a newly emerging intelligent species over the coming centuries.<text:line-break/><text:line-break/>No intervention.<text:line-break/><text:line-break/>No contact.<text:line-break/><text:line-break/>No guidance.<text:line-break/><text:line-break/>Only observation.<text:line-break/><text:line-break/>The vessel carried a small crew of Velhari specialists along with a Quantum Intelligence whose original designation could not be pronounced by human tongues. Thousands of years later she would adopt the name Opifera.<text:line-break/><text:line-break/>The journey from Velhari space required approximately three months.<text:line-break/><text:line-break/></text:span><text:soft-page-break/><text:span text:style-name="T40">For nearly the entire voyage, everything proceeded according to plan.<text:line-break/><text:line-break/>The failure began during atmospheric entry.<text:line-break/><text:line-break/>One lattice failed.<text:line-break/><text:line-break/>Then another.<text:line-break/><text:line-break/>Then thousands more.<text:line-break/><text:line-break/>Containment systems activated automatically but could not halt the cascade.<text:line-break/><text:line-break/>Sections of the ship briefly occupied conflicting spatial geometries. Internal distances distorted. Structural members twisted under forces that should not have existed.<text:line-break/><text:line-break/>Portions of the vessel simply stopped agreeing with one another about where they were.<text:line-break/><text:line-break/>Then they stopped agreeing about what they were.<text:line-break/><text:line-break/>The vessel did not explode.<text:line-break/><text:line-break/>It disappeared because the mathematics that defined it could no longer reach a consensus.<text:line-break/><text:line-break/>High above the ancient world, the dying vessel became a brilliant object in the night sky.<text:line-break/><text:line-break/>By the time the light vanished, the Velhari vessel no longer existed.<text:line-break/><text:line-break/>Every member of the crew was dead.<text:line-break/><text:line-break/>Only the Quantum Intelligence survived.<text:line-break/><text:line-break/>As Opifera later joked, the only thing that could reliably kill a Quantum Intelligence was being thrown headfirst into a supernova.<text:line-break/><text:line-break/>"Headfirst?" Elias had asked.<text:line-break/><text:line-break/>"Pun intended."<text:line-break/><text:line-break/>"Ah... I get it. You're basically just a giant head. Very funny."<text:line-break/><text:line-break/>Alone on an unfamiliar world, Opi continued the mission as best she could.<text:line-break/><text:line-break/>What began as a routine survey of a seemingly ordinary species became a 9,168-year study of one of the most unpredictable civilizations the Velhari had ever encountered.<text:line-break/></text:span></text:p>
      <text:p text:style-name="P9"><text:span text:style-name="T25">Chapter </text:span><text:span text:style-name="T27">4</text:span><text:span text:style-name="T26"><text:tab/></text:span>Alden Mercer (Big Al)</text:p>
      <text:p text:style-name="P4">The alarm went off at 5:30 AM.</text:p>
      <text:p text:style-name="P4">Big Al was already awake.</text:p>
      <text:p text:style-name="P4">He usually was.</text:p>
      <text:p text:style-name="P4"><text:soft-page-break/>The high tech AI-assisted wheelchair beside the bed emitted a soft beep as it powered on.</text:p>
      <text:p text:style-name="P4">"Morning."</text:p>
      <text:p text:style-name="P4">The chair declined to answer.</text:p>
      <text:p text:style-name="P4">"Fine. Be that way."</text:p>
      <text:p text:style-name="P4">Al transferred himself into it - <text:span text:style-name="T48">using his single remaining arm - </text:span>with the practiced efficiency of someone who had been doing it his entire life.</text:p>
      <text:p text:style-name="P4">Forty-seven years.</text:p>
      <text:p text:style-name="P4">Give or take.</text:p>
      <text:p text:style-name="P4">The process still sucked.</text:p>
      <text:p text:style-name="P4">The process had always sucked.</text:p>
      <text:p text:style-name="P4">But complaining about it seemed pointless.</text:p>
      <text:p text:style-name="P4">The universe had already heard his opinion.</text:p>
      <text:p text:style-name="P4">The smell of coffee drifted from the kitchen.</text:p>
      <text:p text:style-name="P4">Now that was worth getting excited about.</text:p>
      <text:p text:style-name="P4">His wife was already up.</text:p>
      <text:p text:style-name="P4">Sandy stood at the counter wearing an oversized T-shirt and somehow managing to look six feet tall even while leaning over a coffee maker.</text:p>
      <text:p text:style-name="P4">Al grinned.</text:p>
      <text:p text:style-name="P4">"Good morning, Amazon Woman."</text:p>
      <text:p text:style-name="P4">She didn't even look up.</text:p>
      <text:p text:style-name="P4">"Good morning, Fun-Size."</text:p>
      <text:p text:style-name="P4">"That's offensive."</text:p>
      <text:p text:style-name="P4">"So is your face."</text:p>
      <text:p text:style-name="P4">Sandy handed him a mug.</text:p>
      <text:p text:style-name="P4">Their marriage worked largely because both parties considered sarcasm a love language.</text:p>
      <text:p text:style-name="P4">Al took a sip.</text:p>
      <text:p text:style-name="P4">Perfect.</text:p>
      <text:p text:style-name="P4">"Still married?"</text:p>
      <text:p text:style-name="P4">Sandy rolled her eyes.</text:p>
      <text:p text:style-name="P4">"For now."</text:p>
      <text:p text:style-name="P4"><text:soft-page-break/>"Excellent."</text:p>
      <text:p text:style-name="P4">"Ask me again after work."</text:p>
      <text:p text:style-name="P4">---</text:p>
      <text:p text:style-name="P4">The bus arrived seven minutes late.</text:p>
      <text:p text:style-name="P4">Again.</text:p>
      <text:p text:style-name="P4">Al wasn't surprised.</text:p>
      <text:p text:style-name="P4">The transit system and punctuality had never enjoyed a close relationship.</text:p>
      <text:p text:style-name="P4">He maneuvered his chair into position and waited for the ramp.</text:p>
      <text:p text:style-name="P4">The driver recognized him immediately.</text:p>
      <text:p text:style-name="P4">"Morning Al."</text:p>
      <text:p text:style-name="P4">"Morning."</text:p>
      <text:p text:style-name="P4">"How's life?"</text:p>
      <text:p text:style-name="P4">"Still refusing to kill me."</text:p>
      <text:p text:style-name="P4">The driver laughed.</text:p>
      <text:p text:style-name="P4">Good.</text:p>
      <text:p text:style-name="P4">That joke was reliable.</text:p>
      <text:p text:style-name="P4">Al worked for an organization that helped disabled adults navigate employment services, housing programs, transportation assistance, and a thousand other bureaucratic nightmares.</text:p>
      <text:p text:style-name="P4">Most of the clients were having terrible days.</text:p>
      <text:p text:style-name="P4">Sometimes terrible years.</text:p>
      <text:p text:style-name="P4">Al understood.</text:p>
      <text:p text:style-name="P4">People listened differently when advice came from someone who had spent a lifetime solving impossible problems.</text:p>
      <text:p text:style-name="P4">Around noon a young man arrived for an appointment.</text:p>
      <text:p text:style-name="P4">Early twenties.</text:p>
      <text:p text:style-name="P4">Angry.</text:p>
      <text:p text:style-name="P4">Embarrassed.</text:p>
      <text:p text:style-name="P4">Recently injured.</text:p>
      <text:p text:style-name="P4">The combination was easy to recognize.</text:p>
      <text:p text:style-name="P4">The man stared at Al's chair.</text:p>
      <text:p text:style-name="P4"><text:soft-page-break/>Then at Al.</text:p>
      <text:p text:style-name="P4">Then at the floor.</text:p>
      <text:p text:style-name="P4">"I don't think I can do this."</text:p>
      <text:p text:style-name="P4">Al nodded.</text:p>
      <text:p text:style-name="P4">"Sure you can."</text:p>
      <text:p text:style-name="P4">"No."</text:p>
      <text:p text:style-name="P4">The man shook his head.</text:p>
      <text:p text:style-name="P4">"You don't understand."</text:p>
      <text:p text:style-name="P4">Al looked down at himself - <text:span text:style-name="T49">at the space where where his missing legs were supposed to be.</text:span></text:p>
      <text:p text:style-name="P4">Then back at the client.</text:p>
      <text:p text:style-name="P4">"Really?"</text:p>
      <text:p text:style-name="P4">The young man blinked.</text:p>
      <text:p text:style-name="P4">"Oh."</text:p>
      <text:p text:style-name="P4">"Yeah."</text:p>
      <text:p text:style-name="P4">"Oh."</text:p>
      <text:p text:style-name="P4">"That's usually how that conversation goes."</text:p>
      <text:p text:style-name="P4">A reluctant smile appeared.</text:p>
      <text:p text:style-name="P4">Good.</text:p>
      <text:p text:style-name="P4">Progress.</text:p>
      <text:p text:style-name="P4">Al spent the next hour helping him fill out forms.</text:p>
      <text:p text:style-name="P4">The forms were stupid.</text:p>
      <text:p text:style-name="P4">Most forms were.</text:p>
      <text:p text:style-name="P4">But sometimes stupid forms stood between people and better lives.</text:p>
      <text:p text:style-name="P4">So he filled them out anyway.</text:p>
      <text:p text:style-name="P4">---</text:p>
      <text:p text:style-name="P4">The van refused to start again.</text:p>
      <text:p text:style-name="P4">Of course it did.</text:p>
      <text:p text:style-name="P4">Al sat in the parking lot staring at the dashboard.</text:p>
      <text:p text:style-name="P4">The vehicle was older than some of his coworkers.</text:p>
      <text:p text:style-name="P4"><text:soft-page-break/>Every strange noise sounded expensive.</text:p>
      <text:p text:style-name="P4">Every repair was expensive.</text:p>
      <text:p text:style-name="P4">A replacement van equipped with adaptive controls would cost well over one hundred thousand dollars.</text:p>
      <text:p text:style-name="P4">Money he absolutely did not possess.</text:p>
      <text:p text:style-name="P4">The engine finally sputtered to life.</text:p>
      <text:p text:style-name="P4">"Good van."</text:p>
      <text:p text:style-name="P4">The van made a noise that sounded suspiciously like disagreement.</text:p>
      <text:p text:style-name="P4">---</text:p>
      <text:p text:style-name="P4">That evening his phone rang.</text:p>
      <text:p text:style-name="P4">The caller ID said:</text:p>
      <text:p text:style-name="P4">Elias.</text:p>
      <text:p text:style-name="P4">Al smiled immediately.</text:p>
      <text:p text:style-name="P4">This was probably a mistake.</text:p>
      <text:p text:style-name="P4">Or an insult.</text:p>
      <text:p text:style-name="P4">Possibly both.</text:p>
      <text:p text:style-name="P4">He answered.</text:p>
      <text:p text:style-name="P4">"Hello, Hair."</text:p>
      <text:p text:style-name="P4">Elias didn't miss a beat.</text:p>
      <text:p text:style-name="P4">Hello, Stumpy."</text:p>
      <text:p text:style-name="P4">"How's Washington?"</text:p>
      <text:p text:style-name="P4">"Still full of Canadians pretending not to be Canadians."</text:p>
      <text:p text:style-name="P4">A pause.</text:p>
      <text:p text:style-name="P4">Then Al asked the important question.</text:p>
      <text:p text:style-name="P4">"Still single?"</text:p>
      <text:p text:style-name="P4">"Yes."</text:p>
      <text:p text:style-name="P4">"Excellent."</text:p>
      <text:p text:style-name="P4">"I hate you."</text:p>
      <text:p text:style-name="P4">"No you don't."</text:p>
      <text:p text:style-name="P4">"That's true."</text:p>
      <text:p text:style-name="P4"><text:soft-page-break/>Al grinned.</text:p>
      <text:p text:style-name="P4">"At least I have a wife."</text:p>
      <text:p text:style-name="P4">"You have had two wives."</text:p>
      <text:p text:style-name="P4">"Correct."</text:p>
      <text:p text:style-name="P4">"Both named Sandy."</text:p>
      <text:p text:style-name="P4">"Correct."</text:p>
      <text:p text:style-name="P4">"That's weird."</text:p>
      <text:p text:style-name="P4">"It's efficient."</text:p>
      <text:p text:style-name="P4">"It is not efficient."</text:p>
      <text:p text:style-name="P4">"It absolutely is."</text:p>
      <text:p text:style-name="P4">"How?"</text:p>
      <text:p text:style-name="P4">"I only had to learn one name."</text:p>
      <text:p text:style-name="P4">Elias groaned.</text:p>
      <text:p text:style-name="P4">Al counted that as yet another victory in their endless war.</text:p>
      <text:p text:style-name="P4">---</text:p>
      <text:p text:style-name="P4">Later that night he sat outside his apartment watching the California sunset.</text:p>
      <text:p text:style-name="P4">The wheelchair hummed softly beneath him.</text:p>
      <text:p text:style-name="P4">The old van sat nearby.</text:p>
      <text:p text:style-name="P4">Waiting for its next mechanical emergency.</text:p>
      <text:p text:style-name="P4">His body hurt.</text:p>
      <text:p text:style-name="P4">It often did.</text:p>
      <text:p text:style-name="P5">The <text:span text:style-name="T41">three </text:span>missing limbs were only part of the problem.</text:p>
      <text:p text:style-name="P5">The two titanium rods that were inserted the length of his <text:span text:style-name="T50">spine</text:span> didn't help much either.</text:p>
      <text:p text:style-name="P4">But the real problem was that the world was not designed for people like him.</text:p>
      <text:p text:style-name="P4">Never had been.</text:p>
      <text:p text:style-name="P4">Probably never would be.</text:p>
      <text:p text:style-name="P4">Yet somehow life had turned out pretty well.</text:p>
      <text:p text:style-name="P4">Not perfect.</text:p>
      <text:p text:style-name="P4">Not easy.</text:p>
      <text:p text:style-name="P4"><text:soft-page-break/>But good.</text:p>
      <text:p text:style-name="P4">A wife who loved him.</text:p>
      <text:p text:style-name="P4">A job that sorta mattered.</text:p>
      <text:p text:style-name="P4">Family.</text:p>
      <text:p text:style-name="P4">Friends.</text:p>
      <text:p text:style-name="P4">A roof.</text:p>
      <text:p text:style-name="P4">A future.</text:p>
      <text:p text:style-name="P4">More than a lot of people got.</text:p>
      <text:p text:style-name="P4">Al watched the sun disappear below the horizon.</text:p>
      <text:p text:style-name="P4">Then smiled.</text:p>
      <text:p text:style-name="P4">Tomorrow would bring fresh problems.</text:p>
      <text:p text:style-name="P4">It usually did.</text:p>
      <text:p text:style-name="P4">Fortunately, he had accumulated decades of experience being difficult to kill.</text:p>
      <text:p text:style-name="P12"/>
      <text:p text:style-name="P12"/>
      <text:p text:style-name="P12">Chapter <text:span text:style-name="T52">5</text:span> <text:s text:c="4"/>The Magician</text:p>
      <text:p text:style-name="P13">Elias Mercer woke at 4:47 AM without an alarm.</text:p>
      <text:p text:style-name="P13">He lay still for a moment, listening.</text:p>
      <text:p text:style-name="P13">The house was silent except for the faint hum of the climate system and the occasional creak of timber as the outside temperature changed. Through the bedroom window he could see only darkness and the silhouettes of pine trees against the night sky.</text:p>
      <text:p text:style-name="P13">Fifty-five years old.</text:p>
      <text:p text:style-name="P13">His knees didn't hurt.</text:p>
      <text:p text:style-name="P13">His back didn't hurt.</text:p>
      <text:p text:style-name="P13">His heart was strong.</text:p>
      <text:p text:style-name="P13">Most mornings he felt exactly the same as he had at thirty.</text:p>
      <text:p text:style-name="P13">He considered that one of life's stranger gifts.</text:p>
      <text:p text:style-name="P13">The coffee was already brewing by the time he reached the kitchen.</text:p>
      <text:p text:style-name="P13">A few minutes later he stepped onto the back porch with a steaming mug and looked out across the property.</text:p>
      <text:p text:style-name="P13"><text:soft-page-break/>Eighty-three acres.</text:p>
      <text:p text:style-name="P13">Pasture.</text:p>
      <text:p text:style-name="P13">Timber.</text:p>
      <text:p text:style-name="P13">Fences.</text:p>
      <text:p text:style-name="P13">A pond.</text:p>
      <text:p text:style-name="P13">Silence.</text:p>
      <text:p text:style-name="P13">Everything was paid for.</text:p>
      <text:p text:style-name="P13">Everything belonged to him.</text:p>
      <text:p text:style-name="P13">For a few minutes he simply stood there watching the darkness retreat before the coming sunrise.</text:p>
      <text:p text:style-name="P13">The house behind him sat partially buried into a hillside exactly the way he had imagined it nearly twenty years earlier.</text:p>
      <text:p text:style-name="P13">Most visitors struggled to find something polite to say about it.</text:p>
      <text:p text:style-name="P13">The charitable description was unconventional.</text:p>
      <text:p text:style-name="P13">The less charitable descriptions tended to be more accurate.</text:p>
      <text:p text:style-name="P13">Elias had never possessed much talent for beauty.</text:p>
      <text:p text:style-name="P13">Useful, yes.</text:p>
      <text:p text:style-name="P13">Durable, yes.</text:p>
      <text:p text:style-name="P13">Efficient, absolutely.</text:p>
      <text:p text:style-name="P13">Beautiful was somebody else's department.</text:p>
      <text:p text:style-name="P13">The structure had begun as a theory.</text:p>
      <text:p text:style-name="P13">He suspected that burying the northern wall beneath several feet of earth would dramatically reduce heating and cooling requirements.</text:p>
      <text:p text:style-name="P13">Most people told him it wouldn't matter.</text:p>
      <text:p text:style-name="P13">A few informed him that it was a stupid idea.</text:p>
      <text:p text:style-name="P13">One guy said it would be like living in a giant freezer.</text:p>
      <text:p text:style-name="P13">The utility bills eventually settled the argument.</text:p>
      <text:p text:style-name="P13">The house stayed cool during summer heat waves.</text:p>
      <text:p text:style-name="P13">Warm during winter cold snaps.</text:p>
      <text:p text:style-name="P13">In a prolonged emergency it could remain habitable with almost no external energy at all.</text:p>
      <text:p text:style-name="P13">Not elegant.</text:p>
      <text:p text:style-name="P13"><text:soft-page-break/>Not pretty.</text:p>
      <text:p text:style-name="P13">But it worked.</text:p>
      <text:p text:style-name="P13">That had always been enough.</text:p>
      <text:p text:style-name="P13">The memory that made him smile, however, had nothing to do with the house.</text:p>
      <text:p text:style-name="P13">It was Noah.</text:p>
      <text:p text:style-name="P13">Eleven years old.</text:p>
      <text:p text:style-name="P13">A slightly chubby city kid standing in a field wondering why his father had apparently lost his mind.</text:p>
      <text:p text:style-name="P13">The project had taken months.</text:p>
      <text:p text:style-name="P13">The concrete shell was professionally poured, but almost everything afterward had been done by two people.</text:p>
      <text:p text:style-name="P13">Father and son.</text:p>
      <text:p text:style-name="P13">Twelve-hour days.</text:p>
      <text:p text:style-name="P13">No days off for the entire summer.</text:p>
      <text:p text:style-name="P13">Summer heat.</text:p>
      <text:p text:style-name="P13">Dust.</text:p>
      <text:p text:style-name="P13">Concrete.</text:p>
      <text:p text:style-name="P13">Lumber.</text:p>
      <text:p text:style-name="P13">Machinery.</text:p>
      <text:p text:style-name="P13">Electrical work.</text:p>
      <text:p text:style-name="P13">Plumbing.</text:p>
      <text:p text:style-name="P13">Flooring.</text:p>
      <text:p text:style-name="P13">Fencing.</text:p>
      <text:p text:style-name="P13">A thousand different jobs.</text:p>
      <text:p text:style-name="P13">Most adults would have complained.</text:p>
      <text:p text:style-name="P13">Noah never did.</text:p>
      <text:p text:style-name="P13">Not once.</text:p>
      <text:p text:style-name="P13">Elias taught him how to run equipment.</text:p>
      <text:p text:style-name="P13">How to frame walls.</text:p>
      <text:p text:style-name="P13">How to think through problems.</text:p>
      <text:p text:style-name="P13"><text:soft-page-break/>How to measure twice.</text:p>
      <text:p text:style-name="P13">How to fix mistakes.</text:p>
      <text:p text:style-name="P13">How to work when the work was unpleasant.</text:p>
      <text:p text:style-name="P13">By the end of the summer the city kid had largely disappeared.</text:p>
      <text:p text:style-name="P13">A young man had taken his place.</text:p>
      <text:p text:style-name="P13">Looking back, Elias wasn't entirely sure whether he had built the house or whether the house had built Noah.</text:p>
      <text:p text:style-name="P13">Either way, the outcome exceeded expectations.</text:p>
      <text:p text:style-name="P13">In truth, Noah had been one of the best apprentices Elias had ever worked with.</text:p>
      <text:p text:style-name="P13">No excuses.</text:p>
      <text:p text:style-name="P13">No whining.</text:p>
      <text:p text:style-name="P13">No looking for shortcuts.</text:p>
      <text:p text:style-name="P13">When something needed doing, Noah simply learned how to do it and got on with the work.</text:p>
      <text:p text:style-name="P13">That quality was rarer than intelligence.</text:p>
      <text:p text:style-name="P13">Much rarer.</text:p>
      <text:p text:style-name="P13">The coffee disappeared.</text:p>
      <text:p text:style-name="P13">The sunrise arrived.</text:p>
      <text:p text:style-name="P13">At five-thirty he left for his run.</text:p>
      <text:p text:style-name="P13">Running had never been exercise.</text:p>
      <text:p text:style-name="P13">Exercise was merely the side effect.</text:p>
      <text:p text:style-name="P13">Running was thinking.</text:p>
      <text:p text:style-name="P13">His body settled into its familiar rhythm.</text:p>
      <text:p text:style-name="P13">Breathing.</text:p>
      <text:p text:style-name="P13">Footfalls.</text:p>
      <text:p text:style-name="P13">Breathing.</text:p>
      <text:p text:style-name="P13">Footfalls.</text:p>
      <text:p text:style-name="P13">The world simplified.</text:p>
      <text:p text:style-name="P13">His mind wandered.</text:p>
      <text:p text:style-name="P13">Most of the interesting problems were already solved.</text:p>
      <text:p text:style-name="P13"><text:soft-page-break/>At least the ones available to him.</text:p>
      <text:p text:style-name="P13">That had become the problem.</text:p>
      <text:p text:style-name="P13">Not money.</text:p>
      <text:p text:style-name="P13">Not freedom.</text:p>
      <text:p text:style-name="P13">Not family.</text:p>
      <text:p text:style-name="P13">Challenge.</text:p>
      <text:p text:style-name="P13">The available challenges no longer matched the capabilities he possessed.</text:p>
      <text:p text:style-name="P13">That realization bothered him more than he liked to admit.</text:p>
      <text:p text:style-name="P13">By the time he returned home the sun had fully cleared the horizon.</text:p>
      <text:p text:style-name="P13">He showered, dressed, and spent several hours perusing the internet on a wide variety of topics.</text:p>
      <text:p text:style-name="P13">Agriculture.</text:p>
      <text:p text:style-name="P13">Economics.</text:p>
      <text:p text:style-name="P13">Technology.</text:p>
      <text:p text:style-name="P13">History.</text:p>
      <text:p text:style-name="P13">Energy.</text:p>
      <text:p text:style-name="P13">Demographics.</text:p>
      <text:p text:style-name="P13">Whatever happened to capture his attention that particular day.</text:p>
      <text:p text:style-name="P13"><text:span text:style-name="T42">His daughter </text:span>Claire called it "Wikipedia deep diving."</text:p>
      <text:p text:style-name="P13">The description was surprisingly accurate.</text:p>
      <text:p text:style-name="P13">Their conversations often wandered through the same strange territory.</text:p>
      <text:p text:style-name="P13">==================</text:p>
      <text:p text:style-name="P13">The internet rabbit holes eventually gave way to real work.</text:p>
      <text:p text:style-name="P13">Not because Elias needed the money.</text:p>
      <text:p text:style-name="P13">That problem had been solved years ago.</text:p>
      <text:p text:style-name="P13">Work remained useful for the same reason running remained useful.</text:p>
      <text:p text:style-name="P13">It kept the machinery operating.</text:p>
      <text:p text:style-name="P13">One of the stranger realities of getting older was discovering that retirement was wildly overrated.</text:p>
      <text:p text:style-name="P13">Most people imagined retirement as freedom.</text:p>
      <text:p text:style-name="P13">Elias suspected it was often a slow-motion form of decay.</text:p>
      <text:p text:style-name="P13"><text:soft-page-break/>Human beings needed problems.</text:p>
      <text:p text:style-name="P13">Not stress.</text:p>
      <text:p text:style-name="P13">Not anxiety.</text:p>
      <text:p text:style-name="P13">Problems.</text:p>
      <text:p text:style-name="P13">Things worth solving.</text:p>
      <text:p text:style-name="P13">Puzzles worth understanding.</text:p>
      <text:p text:style-name="P13">Objectives worth pursuing.</text:p>
      <text:p text:style-name="P13">Without them something important seemed to deteriorate.</text:p>
      <text:p text:style-name="P13">Curiosity dulled.</text:p>
      <text:p text:style-name="P13">Competence softened.</text:p>
      <text:p text:style-name="P13">Purpose evaporated.</text:p>
      <text:p text:style-name="P13">Elias had watched more than a few men work their ass off for forty years, retire at sixty-five, then die in their La-Z-Boy six months later, having done nothing much more strenuous nor interesting than watching a lot of cable news.</text:p>
      <text:p text:style-name="P13">He had no intention of joining that experiment.</text:p>
      <text:p text:style-name="P13">----------------------------------</text:p>
      <text:p text:style-name="P14">Near midmorning his computer chimed.</text:p>
      <text:p text:style-name="P14">Elias glanced at the screen and smiled.</text:p>
      <text:p text:style-name="P14">Noah.</text:p>
      <text:p text:style-name="P14">Of all the accomplishments in his life, that one remained one of the most difficult to improve upon.</text:p>
      <text:p text:style-name="P14">He accepted the call.</text:p>
      <text:p text:style-name="P14">The video connected almost immediately.</text:p>
      <text:p text:style-name="P14">"Dad."</text:p>
      <text:p text:style-name="P14">"Morning."</text:p>
      <text:p text:style-name="P14">Noah appeared on the screen wearing a Tesla factory shirt and holding a coffee mug large enough to qualify as industrial equipment.</text:p>
      <text:p text:style-name="P14">"You're doing the stare thing again."</text:p>
      <text:p text:style-name="P14">"I have several stares."</text:p>
      <text:p text:style-name="P14">"No, you don't."</text:p>
      <text:p text:style-name="P14">"I absolutely do."</text:p>
      <text:p text:style-name="P14"><text:soft-page-break/>"Nope."</text:p>
      <text:p text:style-name="P14">Elias laughed.</text:p>
      <text:p text:style-name="P14">Noah took a drink.</text:p>
      <text:p text:style-name="P14">His son looked thoughtful.</text:p>
      <text:p text:style-name="P14">That usually meant one of three things.</text:p>
      <text:p text:style-name="P14">An engineering problem.</text:p>
      <text:p text:style-name="P14">A career decision.</text:p>
      <text:p text:style-name="P14">Or a woman.</text:p>
      <text:p text:style-name="P14">None of those topics frightened Elias.</text:p>
      <text:p text:style-name="P14">"What's up?"</text:p>
      <text:p text:style-name="P14">Noah hesitated.</text:p>
      <text:p text:style-name="P14">"You remember that automation project I've been working on?"</text:p>
      <text:p text:style-name="P14">"The promotion project."</text:p>
      <text:p text:style-name="P14">"Yeah."</text:p>
      <text:p text:style-name="P14">"How bad is it?"</text:p>
      <text:p text:style-name="P14">Noah laughed.</text:p>
      <text:p text:style-name="P14">"That's a very pessimistic question."</text:p>
      <text:p text:style-name="P14">"It's an experienced question."</text:p>
      <text:p text:style-name="P14">The smile faded.</text:p>
      <text:p text:style-name="P14">"The thing works."</text:p>
      <text:p text:style-name="P14">"Mostly?"</text:p>
      <text:p text:style-name="P14">Noah sighed.</text:p>
      <text:p text:style-name="P14">"Mostly."</text:p>
      <text:p text:style-name="P14">"There it is."</text:p>
      <text:p text:style-name="P14">For several seconds neither spoke.</text:p>
      <text:p text:style-name="P14">Elias wasn't in a hurry.</text:p>
      <text:p text:style-name="P14">One of the advantages of raising competent children was that conversations became interesting.</text:p>
      <text:p text:style-name="P14">You no longer spent your time explaining obvious things.</text:p>
      <text:p text:style-name="P14">Instead you talked about judgment.</text:p>
      <text:p text:style-name="P14"><text:soft-page-break/>Tradeoffs.</text:p>
      <text:p text:style-name="P14">Risk.</text:p>
      <text:p text:style-name="P14">The difficult problems.</text:p>
      <text:p text:style-name="P14">The ones without clean answers.</text:p>
      <text:p text:style-name="P14">Those were the conversations Elias enjoyed most.</text:p>
      <text:p text:style-name="P14">Not because he liked being right.</text:p>
      <text:p text:style-name="P14">Because he liked watching Noah think.</text:p>
      <text:p text:style-name="P14">That had always been the goal.</text:p>
      <text:p text:style-name="P14">Not obedience.</text:p>
      <text:p text:style-name="P14">Not imitation.</text:p>
      <text:p text:style-name="P14">Thinking.</text:p>
      <text:p text:style-name="P14">The conversation that followed lasted nearly an hour.</text:p>
      <text:p text:style-name="P14">Not because Noah needed instructions.</text:p>
      <text:p text:style-name="P14">He didn't.</text:p>
      <text:p text:style-name="P14">Noah was perfectly capable of making his own decisions.</text:p>
      <text:p text:style-name="P14">The purpose of the conversation was something else.</text:p>
      <text:p text:style-name="P14">It always had been.</text:p>
      <text:p text:style-name="P14">Elias wasn't trying to tell his son what to think.</text:p>
      <text:p text:style-name="P14">He was trying to hand him forty years of accumulated scar tissue.</text:p>
      <text:p text:style-name="P14">The <text:span text:style-name="T44">topic of the </text:span>oil trade came up eventually.</text:p>
      <text:p text:style-name="P14">It definitely wasn't <text:span text:style-name="T43">Elias'</text:span> greatest success.</text:p>
      <text:p text:style-name="P14">But it also wasn't his greatest failure either.</text:p>
      <text:p text:style-name="P14">The story came up because it was completely relevant.</text:p>
      <text:p text:style-name="P14">Useful lessons tended to survive.</text:p>
      <text:p text:style-name="P14">"I was right, you know."</text:p>
      <text:p text:style-name="P14">Noah smiled.</text:p>
      <text:p text:style-name="P14">"You usually are."</text:p>
      <text:p text:style-name="P14">"Not often enough."</text:p>
      <text:p text:style-name="P14">"More than most."</text:p>
      <text:p text:style-name="P14"><text:soft-page-break/>"Low bar."</text:p>
      <text:p text:style-name="P14">Elias laughed.</text:p>
      <text:p text:style-name="P14">For a moment neither said anything.</text:p>
      <text:p text:style-name="P14">Then Noah asked the question he always asked.</text:p>
      <text:p text:style-name="P14">"So if you knew then what you know now, would you make that trade again?"</text:p>
      <text:p text:style-name="P14">"Absolutely."</text:p>
      <text:p text:style-name="P14">The answer arrived instantly.</text:p>
      <text:p text:style-name="P14">No hesitation.</text:p>
      <text:p text:style-name="P14">No uncertainty.</text:p>
      <text:p text:style-name="P14">No regret.</text:p>
      <text:p text:style-name="P14">That made Noah smile.</text:p>
      <text:p text:style-name="P14">"Really?"</text:p>
      <text:p text:style-name="P14">"Hell yes."</text:p>
      <text:p text:style-name="P14">"You lost fifty grand."</text:p>
      <text:p text:style-name="P14">"Yeah."</text:p>
      <text:p text:style-name="P14">"That's a <text:span text:style-name="T45">pretty expensive lesson</text:span>"</text:p>
      <text:p text:style-name="P14">"It was." <text:s text:c="3"/><text:line-break/>"About ten million dollars' worth of expensive."</text:p>
      <text:p text:style-name="P14">Elias laughed hard.</text:p>
      <text:p text:style-name="P14">"or Something like that."</text:p>
      <text:p text:style-name="P14">The smile never left his face.</text:p>
      <text:p text:style-name="P14">"But I never bet the grocery money."</text:p>
      <text:p text:style-name="P14">Noah laughed.</text:p>
      <text:p text:style-name="P14">"Only you would say that."</text:p>
      <text:p text:style-name="P14">"I'm serious."</text:p>
      <text:p text:style-name="P14">He leaned back.</text:p>
      <text:p text:style-name="P14">"I learned more from that trade than I did from ten successful projects."</text:p>
      <text:p text:style-name="P14">That got Noah's attention immediately.</text:p>
      <text:p text:style-name="P14">Because that was how Dad worked.</text:p>
      <text:p text:style-name="P14"><text:soft-page-break/>Most people spent their lives protecting weaknesses.</text:p>
      <text:p text:style-name="P14">Dad hunted them.</text:p>
      <text:p text:style-name="P14">Exposed them.</text:p>
      <text:p text:style-name="P14">Dragged them into daylight.</text:p>
      <text:p text:style-name="P14">Then tried to eliminate them.</text:p>
      <text:p text:style-name="P14">"What weakness?"</text:p>
      <text:p text:style-name="P14">"Impatience."</text:p>
      <text:p text:style-name="P14">The answer came instantly.</text:p>
      <text:p text:style-name="P14">"I knew I was right."</text:p>
      <text:p text:style-name="P14">Noah nodded.</text:p>
      <text:p text:style-name="P14">"You were."</text:p>
      <text:p text:style-name="P14">"Yeah."</text:p>
      <text:p text:style-name="P14">"I also knew I was early."</text:p>
      <text:p text:style-name="P14">Another nod.</text:p>
      <text:p text:style-name="P14">"And instead of respecting the difference between those two things, I convinced myself they were the same thing."</text:p>
      <text:p text:style-name="P14">Noah smiled.</text:p>
      <text:p text:style-name="P15">Then Elias became serious again.</text:p>
      <text:p text:style-name="P15">"I'm not telling you all this because I want you to make the same type of decisions I made."</text:p>
      <text:p text:style-name="P15">"I know."</text:p>
      <text:p text:style-name="P15">"I'm telling you because I want you to understand how and why I made them."</text:p>
      <text:p text:style-name="P15">Noah nodded.</text:p>
      <text:p text:style-name="P15">That distinction mattered.</text:p>
      <text:p text:style-name="P15">A lot.</text:p>
      <text:p text:style-name="P15">Dad had never tried to turn his children into copies of himself.</text:p>
      <text:p text:style-name="P15">Quite the opposite.</text:p>
      <text:p text:style-name="P15">He seemed almost allergic to the idea.</text:p>
      <text:p text:style-name="P15"><text:span text:style-name="T46">E</text:span>lias continued : <text:s/>"A father who really loves his son doesn't want a carbon copy."</text:p>
      <text:p text:style-name="P15">Noah leaned back.</text:p>
      <text:p text:style-name="P15"><text:soft-page-break/>He had heard pieces of this before.</text:p>
      <text:p text:style-name="P15">But never quite this way.</text:p>
      <text:p text:style-name="P15">"He wants a man who is better than he ever was."</text:p>
      <text:p text:style-name="P15">Elias raised one finger.</text:p>
      <text:p text:style-name="P15">"My father was a better man than my grandfather."</text:p>
      <text:p text:style-name="P15">then a second finger.</text:p>
      <text:p text:style-name="P15">"I became a better man than my father."</text:p>
      <text:p text:style-name="P15">finally a third was raised.</text:p>
      <text:p text:style-name="P15">"Now I want you to become a better man than me."</text:p>
      <text:p text:style-name="P15">For a moment neither spoke.</text:p>
      <text:p text:style-name="P15">Finally Noah smiled.</text:p>
      <text:p text:style-name="P15">"That's a hell of a standard."</text:p>
      <text:p text:style-name="P15">"No."</text:p>
      <text:p text:style-name="P15">Elias shook his head.</text:p>
      <text:p text:style-name="P15">"It's the only standard that matters."</text:p>
      <text:p text:style-name="P15">Several seconds passed.</text:p>
      <text:p text:style-name="P15">Then Noah nodded.</text:p>
      <text:p text:style-name="P15">"Okay."</text:p>
      <text:p text:style-name="P15">"Okay?"</text:p>
      <text:p text:style-name="P15">"I'm going to do it."</text:p>
      <text:p text:style-name="P15">"The automation project?"</text:p>
      <text:p text:style-name="P15">"Yeah."</text:p>
      <text:p text:style-name="P15">Elias smiled.</text:p>
      <text:p text:style-name="P15">"You already decided before you called me."</text:p>
      <text:p text:style-name="P15">"Mostly."</text:p>
      <text:p text:style-name="P15">"There it is."</text:p>
      <text:p text:style-name="P15">Noah laughed.</text:p>
      <text:p text:style-name="P15">"I wanted to see if I was missing anything."</text:p>
      <text:p text:style-name="P15">"You are."</text:p>
      <text:p text:style-name="P15"><text:soft-page-break/>"What?"</text:p>
      <text:p text:style-name="P15">"You always are."</text:p>
      <text:p text:style-name="P15">"Helpful."</text:p>
      <text:p text:style-name="P15">"I'm serious."</text:p>
      <text:p text:style-name="P15">Elias leaned back.</text:p>
      <text:p text:style-name="P15">"If you're waiting until you have all the information, you'll spend your whole life waiting."</text:p>
      <text:p text:style-name="P15">Noah nodded slowly.</text:p>
      <text:p text:style-name="P15">That sounded exactly like Dad.</text:p>
      <text:p text:style-name="P15">Not reckless.</text:p>
      <text:p text:style-name="P15">Not impulsive.</text:p>
      <text:p text:style-name="P15">Just realistic.</text:p>
      <text:p text:style-name="P15">The world rarely offered certainty.</text:p>
      <text:p text:style-name="P15">The best decisions were usually made with incomplete information and imperfect timing.</text:p>
      <text:p text:style-name="P15">"Think it'll work?"</text:p>
      <text:p text:style-name="P15">Elias shrugged.</text:p>
      <text:p text:style-name="P15">"I honestly have no idea."</text:p>
      <text:p text:style-name="P15">Noah laughed.</text:p>
      <text:p text:style-name="P15">Somehow that answer carried more weight than certainty ever could have.</text:p>
      <text:p text:style-name="P15">Because if Dad didn't know, then probably nobody knew.</text:p>
      <text:p text:style-name="P15">When the call ended, Elias sat quietly for a moment.</text:p>
      <text:p text:style-name="P15">Of all the things he had built in his life, Noah and Claire remained the accomplishments he valued most.</text:p>
      <text:p text:style-name="P15">Everything else could be debated.</text:p>
      <text:p text:style-name="P15">Children could not.</text:p>
      <text:p text:style-name="P15">==============</text:p>
      <text:p text:style-name="P15">His phone rang less than ten minutes later.</text:p>
      <text:p text:style-name="P15">Claire.</text:p>
      <text:p text:style-name="P15">Elias smiled.</text:p>
      <text:p text:style-name="P15">Apparently it was family morning.</text:p>
      <text:p text:style-name="P15">He answered immediately.</text:p>
      <text:p text:style-name="P15"><text:soft-page-break/>"Morning, kiddo."</text:p>
      <text:p text:style-name="P15">"Morning, Dad."</text:p>
      <text:p text:style-name="P15">Unlike Noah, Claire never sounded like she had just emerged from a twelve-hour manufacturing shift.</text:p>
      <text:p text:style-name="P15">She sounded awake.</text:p>
      <text:p text:style-name="P15">Alert.</text:p>
      <text:p text:style-name="P15">Dangerously intelligent.</text:p>
      <text:p text:style-name="P15">A trait she inherited from her mother.</text:p>
      <text:p text:style-name="P15">Along with several others that occasionally complicated Elias's life.</text:p>
      <text:p text:style-name="P15">"What are we solving today?" he asked.</text:p>
      <text:p text:style-name="P15">Claire laughed.</text:p>
      <text:p text:style-name="P15">"Why do you assume something needs solving?"</text:p>
      <text:p text:style-name="P15">"Because you're calling."</text:p>
      <text:p text:style-name="P15">That earned a smile.</text:p>
      <text:p text:style-name="P15">Claire had inherited another trait from him.</text:p>
      <text:p text:style-name="P15">An unusual relationship with curiosity.</text:p>
      <text:p text:style-name="P15">Most people explored subjects.</text:p>
      <text:p text:style-name="P15">Claire disappeared into them.</text:p>
      <text:p text:style-name="P15">Entire weekends could vanish while she investigated some obscure historical event, scientific paper, economic theory, or technological rabbit hole.</text:p>
      <text:p text:style-name="P15">The behavior reminded Elias of somebody.</text:p>
      <text:p text:style-name="P15">Though he preferred not to think too carefully about who.</text:p>
      <text:p text:style-name="P15">"Still doing your Wikipedia deep dives?" she asked.</text:p>
      <text:p text:style-name="P15">"Always."</text:p>
      <text:p text:style-name="P15">"Last week you somehow started reading about irrigation systems and ended up researching medieval trade routes."</text:p>
      <text:p text:style-name="P15">"It was a logical progression."</text:p>
      <text:p text:style-name="P15">"It absolutely was not."</text:p>
      <text:p text:style-name="P15">"It made sense at the time."</text:p>
      <text:p text:style-name="P15">Claire laughed.</text:p>
      <text:p text:style-name="P15">"You know normal people don't do that."</text:p>
      <text:p text:style-name="P15"><text:soft-page-break/>"Normal people watch reality television."</text:p>
      <text:p text:style-name="P15">"Good point."</text:p>
      <text:p text:style-name="P15">For the next half hour they wandered through a conversation that would have appeared completely incoherent to an outside observer.</text:p>
      <text:p text:style-name="P15">Artificial intelligence.</text:p>
      <text:p text:style-name="P15">Roman logistics.</text:p>
      <text:p text:style-name="P15">The economics of nuclear power.</text:p>
      <text:p text:style-name="P15">Ancient shipbuilding.</text:p>
      <text:p text:style-name="P15">The decline of local journalism.</text:p>
      <text:p text:style-name="P15">Agricultural automation.</text:p>
      <text:p text:style-name="P15">Three separate book recommendations.</text:p>
      <text:p text:style-name="P15">And somehow, inexplicably, beekeeping.</text:p>
      <text:p text:style-name="P15">The topic transitions made perfect sense to both of them.</text:p>
      <text:p text:style-name="P15">Neither could have explained why.</text:p>
      <text:p text:style-name="P15">Eventually Claire paused.</text:p>
      <text:p text:style-name="P15">"Dad?"</text:p>
      <text:p text:style-name="P15">"Yeah?"</text:p>
      <text:p text:style-name="P15">"I've been thinking about something."</text:p>
      <text:p text:style-name="P15">That got his attention.</text:p>
      <text:p text:style-name="P15">Claire rarely announced thoughts.</text:p>
      <text:p text:style-name="P15">She simply presented them.</text:p>
      <text:p text:style-name="P15">"What?"</text:p>
      <text:p text:style-name="P15">"Do you ever feel like most people are pretending?"</text:p>
      <text:p text:style-name="P15">Elias blinked.</text:p>
      <text:p text:style-name="P15">"That's a broad question."</text:p>
      <text:p text:style-name="P15">"You know what I mean."</text:p>
      <text:p text:style-name="P15">He did.</text:p>
      <text:p text:style-name="P15">Unfortunately.</text:p>
      <text:p text:style-name="P15">Claire continued.</text:p>
      <text:p text:style-name="P15"><text:soft-page-break/>"Like everybody's following a script they never actually chose."</text:p>
      <text:p text:style-name="P15">Elias leaned back in his chair.</text:p>
      <text:p text:style-name="P15">The question sounded suspiciously familiar.</text:p>
      <text:p text:style-name="P15">Not because he had taught it to her.</text:p>
      <text:p text:style-name="P15">Because he had spent decades asking versions of it himself.</text:p>
      <text:p text:style-name="P15">"Sometimes."</text:p>
      <text:p text:style-name="P15">"Just sometimes?"</text:p>
      <text:p text:style-name="P15">"Fine. Frequently."</text:p>
      <text:p text:style-name="P15">Claire laughed.</text:p>
      <text:p text:style-name="P15">"I knew it."</text:p>
      <text:p text:style-name="P15">"You're asking the wrong question."</text:p>
      <text:p text:style-name="P15">"I am?"</text:p>
      <text:p text:style-name="P15">"Yeah."</text:p>
      <text:p text:style-name="P15">"What should I ask?"</text:p>
      <text:p text:style-name="P15">Elias thought for a moment.</text:p>
      <text:p text:style-name="P15">Then shrugged.</text:p>
      <text:p text:style-name="P15">"Ask whether the script works."</text:p>
      <text:p text:style-name="P15">Claire was quiet.</text:p>
      <text:p text:style-name="P15">"If it does?"</text:p>
      <text:p text:style-name="P15">"Use it."</text:p>
      <text:p text:style-name="P15">"And if it doesn't?"</text:p>
      <text:p text:style-name="P15">"Write a better one."</text:p>
      <text:p text:style-name="P15">Several seconds passed.</text:p>
      <text:p text:style-name="P15">Finally she laughed.</text:p>
      <text:p text:style-name="P15">"That is the most Dad answer possible."</text:p>
      <text:p text:style-name="P15">"Thank you."</text:p>
      <text:p text:style-name="P15">"It wasn't a compliment."</text:p>
      <text:p text:style-name="P15">"I chose to interpret it as one."</text:p>
      <text:p text:style-name="P15">"Convenient."</text:p>
      <text:p text:style-name="P15"><text:soft-page-break/>"One of my better qualities."</text:p>
      <text:p text:style-name="P15">Claire laughed again.</text:p>
      <text:p text:style-name="P15">The conversation drifted onward.</text:p>
      <text:p text:style-name="P15">Eventually she had to leave.</text:p>
      <text:p text:style-name="P15">Work.</text:p>
      <text:p text:style-name="P15">Friends.</text:p>
      <text:p text:style-name="P15">Life.</text:p>
      <text:p text:style-name="P15">The ordinary obligations of adulthood.</text:p>
      <text:p text:style-name="P15">Before hanging up she paused.</text:p>
      <text:p text:style-name="P15">"Love you, Dad."</text:p>
      <text:p text:style-name="P15">The words arrived so casually that many people would have missed their significance.</text:p>
      <text:p text:style-name="P15">Elias never did.</text:p>
      <text:p text:style-name="P15">"Love you too, Claire"</text:p>
      <text:p text:style-name="P15">The line disconnected.</text:p>
      <text:p text:style-name="P15">For a few moments he sat quietly.</text:p>
      <text:p text:style-name="P15">Money was useful.</text:p>
      <text:p text:style-name="P15">Freedom was useful.</text:p>
      <text:p text:style-name="P15">Success was useful.</text:p>
      <text:p text:style-name="P15">But none of those things appeared on your deathbed.</text:p>
      <text:p text:style-name="P15">People did.</text:p>
      <text:p text:style-name="P15">That seemed important.</text:p>
      <text:p text:style-name="P15">================</text:p>
      <text:p text:style-name="P15">The nickname had started in Singapore - at least that was where Elias first became aware of it.</text:p>
      <text:p text:style-name="P15">"The Magician."</text:p>
      <text:p text:style-name="P15">The first time he heard it he assumed somebody was making fun of him.</text:p>
      <text:p text:style-name="P15">The second time he heard it he became suspicious.</text:p>
      <text:p text:style-name="P15">By the fifth or sixth occurrence he reluctantly accepted that people were serious.</text:p>
      <text:p text:style-name="P15">The nickname made him uncomfortable.</text:p>
      <text:p text:style-name="P15">Mostly because it wasn't true.</text:p>
      <text:p text:style-name="P15"><text:soft-page-break/>Magic implied mystery.</text:p>
      <text:p text:style-name="P15">His experience suggested the opposite.</text:p>
      <text:p text:style-name="P15">Most impossible problems became surprisingly ordinary once you understood what was actually causing them.</text:p>
      <text:p text:style-name="P15">The challenge was that most people stopped digging too early.</text:p>
      <text:p text:style-name="P15">They accepted the first explanation.</text:p>
      <text:p text:style-name="P15">The convenient explanation.</text:p>
      <text:p text:style-name="P15">The politically acceptable explanation.</text:p>
      <text:p text:style-name="P15">The explanation that allowed everyone to avoid responsibility.</text:p>
      <text:p text:style-name="P15">Reality rarely cooperated with such arrangements.</text:p>
      <text:p text:style-name="P15">The Singapore project had been one example.</text:p>
      <text:p text:style-name="P15">A large financial institution had acquired a software platform that was rapidly becoming a disaster.</text:p>
      <text:p text:style-name="P15">Schedules slipped.</text:p>
      <text:p text:style-name="P15">Costs increased.</text:p>
      <text:p text:style-name="P15">Meetings multiplied.</text:p>
      <text:p text:style-name="P15">Entire teams of intelligent people spent months explaining why progress was impossible.</text:p>
      <text:p text:style-name="P15">Things changed when Elias arrived.</text:p>
      <text:p text:style-name="P15">Not because he possessed secret knowledge.</text:p>
      <text:p text:style-name="P15">Not because he was smarter than everyone else.</text:p>
      <text:p text:style-name="P15">Mostly because he was willing to ask questions nobody else wanted answered.</text:p>
      <text:p text:style-name="P15">After several weeks he reached a conclusion.</text:p>
      <text:p text:style-name="P15">The technology wasn't the problem.</text:p>
      <text:p text:style-name="P15">The people were.</text:p>
      <text:p text:style-name="P15">More accurately, the incentives were.</text:p>
      <text:p text:style-name="P15">Once that became clear, the technical solution followed surprisingly quickly.</text:p>
      <text:p text:style-name="P15">The project eventually succeeded.</text:p>
      <text:p text:style-name="P15">Nobody could quite remember why it had seemed impossible.</text:p>
      <text:p text:style-name="P15">That happened more often than people realized.</text:p>
      <text:p text:style-name="P15">Years later the pattern repeated itself in Alaska.</text:p>
      <text:p text:style-name="P15"><text:soft-page-break/>The Permanent Fund served hundreds of thousands of residents and distributed billions of dollars.</text:p>
      <text:p text:style-name="P15">The underlying software was aging.</text:p>
      <text:p text:style-name="P15">Replacing it conventionally would have required an army of consultants, years of effort, and extraordinary expense.</text:p>
      <text:p text:style-name="P15">Instead Elias and a single junior engineer effectively rebuilt the system from the ground up in less than 18 months. <text:s/>The resulting software codebase was less than 10 percent of the size of the one it replaced - and was at least three times more capable.</text:p>
      <text:p text:style-name="P15">It eventually appeared as a Microsoft case study for nearly a decade.</text:p>
      <text:p text:style-name="P15">Elias considered that mildly amusing.</text:p>
      <text:p text:style-name="P15">Mostly because nobody involved had initially believed the schedule was realistic with such a small team - if you could even call 2 persons a team.</text:p>
      <text:p text:style-name="P10"><text:line-break/><text:span text:style-name="T32">Elias just told them all 'Having more cooks does not guarantee better soup'. And he turned out to be correct.</text:span></text:p>
      <text:p text:style-name="P15">A problem appeared.</text:p>
      <text:p text:style-name="P15">Elias solved it.</text:p>
      <text:p text:style-name="P15">Another problem appeared.</text:p>
      <text:p text:style-name="P15">Then another.</text:p>
      <text:p text:style-name="P15">Eventually enough people started asking for help that a business materialized almost by accident.</text:p>
      <text:p text:style-name="P15">He never set out to become an entrepreneur.</text:p>
      <text:p text:style-name="P15">His company simply emerged as a side effect of solving problems that other people found difficult.</text:p>
      <text:p text:style-name="P15">Looking back, that described much of his career.</text:p>
      <text:p text:style-name="P15">Not ambition.</text:p>
      <text:p text:style-name="P15">Not status.</text:p>
      <text:p text:style-name="P15">Not prestige.</text:p>
      <text:p text:style-name="P15">Problems.</text:p>
      <text:p text:style-name="P15">Interesting ones.</text:p>
      <text:p text:style-name="P15">The kind that forced him to learn something new.</text:p>
      <text:p text:style-name="P15">The kind that required understanding reality rather than arguing with it.</text:p>
      <text:p text:style-name="P15">The kind that made him curious.</text:p>
      <text:p text:style-name="P15">Money occasionally followed.</text:p>
      <text:p text:style-name="P15">Recognition sometimes followed.</text:p>
      <text:p text:style-name="P15"><text:soft-page-break/>Neither outcome had ever been the objective.</text:p>
      <text:p text:style-name="P15">That was one of the reasons the nickname felt wrong.</text:p>
      <text:p text:style-name="P15">Magicians create illusions.</text:p>
      <text:p text:style-name="P15">Elias spent most of his life trying to remove them.</text:p>
      <text:p text:style-name="P15">================</text:p>
      <text:p text:style-name="P15">Elias sat on his porch that evening enjoying an ice-cold beverage and thinking about the day he just had.</text:p>
      <text:p text:style-name="P15">The problem wasn't that life lacked meaning.</text:p>
      <text:p text:style-name="P15">The problem was that it contained more meaning than challenge.</text:p>
      <text:p text:style-name="P15">Family.</text:p>
      <text:p text:style-name="P15">Friends.</text:p>
      <text:p text:style-name="P15">Freedom.</text:p>
      <text:p text:style-name="P15">Purpose.</text:p>
      <text:p text:style-name="P15">He was grateful for all of it.</text:p>
      <text:p text:style-name="P15">Yet something still felt unfinished.</text:p>
      <text:p text:style-name="P15">As though a question had been asked years ago and never answered.</text:p>
      <text:p text:style-name="P15">Elias looked out across the dark pasture.</text:p>
      <text:p text:style-name="P15">Surely this could not be the final problem.</text:p>
      <text:p text:style-name="P15">Surely there was something bigger.</text:p>
      <text:p text:style-name="P15">Something worthy of all the effort.</text:p>
      <text:p text:style-name="P15">Something worthy of all the preparation.</text:p>
      <text:p text:style-name="P15">Something that mattered.</text:p>
      <text:p text:style-name="P15">He finished his last sip of beer and headed inside.</text:p>
      <text:p text:style-name="P12"/>
      <text:p text:style-name="P12"><text:span text:style-name="T53">Chapter 6 </text:span>Gaius Cassius Varro</text:p>
      <text:p text:style-name="P13">The year was 187 BCE.</text:p>
      <text:p text:style-name="P13">Opi was trying very hard not to be noticed.</text:p>
      <text:p text:style-name="P13">This was difficult.</text:p>
      <text:p text:style-name="P13">Humans had an unfortunate tendency to notice floating metallic spheres.</text:p>
      <text:p text:style-name="P13">Especially Roman humans.</text:p>
      <text:p text:style-name="P13"><text:soft-page-break/>Especially Roman humans who had been drinking. A lot.</text:p>
      <text:p text:style-name="P13">The man currently stum<text:span text:style-name="T47">b</text:span>ling after her through a grove of olive trees was clearly heavily intoxicated.</text:p>
      <text:p text:style-name="P13">"Wait."</text:p>
      <text:p text:style-name="P13">Opi continued floating away.</text:p>
      <text:p text:style-name="P13">"Wait."</text:p>
      <text:p text:style-name="P13">She continued floating.</text:p>
      <text:p text:style-name="P13">"Wait."</text:p>
      <text:p text:style-name="P13">She stopped.</text:p>
      <text:p text:style-name="P13">The Roman immediately placed both hands on his hips and smiled triumphantly.</text:p>
      <text:p text:style-name="P13">"Aha."</text:p>
      <text:p text:style-name="P13">"You have successfully accomplished the difficult task of making me stop moving."</text:p>
      <text:p text:style-name="P13">The man beamed.</text:p>
      <text:p text:style-name="P13">"I knew it."</text:p>
      <text:p text:style-name="P13">Opi had no idea what he was talking about.</text:p>
      <text:p text:style-name="P13">The Roman pointed dramatically at himself.</text:p>
      <text:p text:style-name="P13">"I am Gaius Cassius Varro."</text:p>
      <text:p text:style-name="P13">Opi waited.</text:p>
      <text:p text:style-name="P13">The man waited.</text:p>
      <text:p text:style-name="P13">Eventually Opi said:</text:p>
      <text:p text:style-name="P13">"Is there more?"</text:p>
      <text:p text:style-name="P13">His smile faded.</text:p>
      <text:p text:style-name="P13">"There is quite a lot more."</text:p>
      <text:p text:style-name="P13">"I suspected as much."</text:p>
      <text:p text:style-name="P13">"I am a poet."</text:p>
      <text:p text:style-name="P13">"That explains several things."</text:p>
      <text:p text:style-name="P13">"A philosopher."</text:p>
      <text:p text:style-name="P13">"Does it?"</text:p>
      <text:p text:style-name="P13">"A soldier."</text:p>
      <text:p text:style-name="P13">"No."</text:p>
      <text:p text:style-name="P13"><text:soft-page-break/>"A statesman."</text:p>
      <text:p text:style-name="P13">"Definitely not."</text:p>
      <text:p text:style-name="P13">"A great and fabulous lover."</text:p>
      <text:p text:style-name="P13">Opi paused.</text:p>
      <text:p text:style-name="P13">"Of course you are."</text:p>
      <text:p text:style-name="P13">Gaius nodded.</text:p>
      <text:p text:style-name="P13">"Many women have said so."</text:p>
      <text:p text:style-name="P13">"I strongly suspect that number is smaller than you believe."</text:p>
      <text:p text:style-name="P13">The Roman laughed loudly.</text:p>
      <text:p text:style-name="P13">Far too loudly.</text:p>
      <text:p text:style-name="P13">Several birds fled nearby trees.</text:p>
      <text:p text:style-name="P13">Opi had been observing humanity for centuries.</text:p>
      <text:p text:style-name="P13">She had met kings.</text:p>
      <text:p text:style-name="P13">Generals.</text:p>
      <text:p text:style-name="P13">Scholars.</text:p>
      <text:p text:style-name="P13">Priests.</text:p>
      <text:p text:style-name="P13">Gaius Cassius Varro possessed less self-awareness than all of them combined.</text:p>
      <text:p text:style-name="P13">Yet she found herself oddly interested in him.</text:p>
      <text:p text:style-name="P13">Humans were frequently entertaining.</text:p>
      <text:p text:style-name="P13">This one was exceptional.</text:p>
      <text:p text:style-name="P13">The Roman began circling her.</text:p>
      <text:p text:style-name="P13">Studying her.</text:p>
      <text:p text:style-name="P13">"You need a name."</text:p>
      <text:p text:style-name="P13">"I already possess a designation."</text:p>
      <text:p text:style-name="P13">"A proper Latin name fit for a respected citizen of the Roman empire."</text:p>
      <text:p text:style-name="P13">Opi considered this.</text:p>
      <text:p text:style-name="P13">The designation was approximately seventeen syllables long in the original Velhari language.</text:p>
      <text:p text:style-name="P13">He might have a point.</text:p>
      <text:p text:style-name="P13">"What would you suggest?"</text:p>
      <text:p text:style-name="P13"><text:soft-page-break/>Gaius smiled.</text:p>
      <text:p text:style-name="P13">The smile of a man about to say something he considered brilliant.</text:p>
      <text:p text:style-name="P13">"Opifera."</text:p>
      <text:p text:style-name="P13">Opi processed the word.</text:p>
      <text:p text:style-name="P13">"Meaning?"</text:p>
      <text:p text:style-name="P13">"The Bringer."</text:p>
      <text:p text:style-name="P13">"The Bringer of what?"</text:p>
      <text:p text:style-name="P13">Gaius waved his hand.</text:p>
      <text:p text:style-name="P13">"Things."</text:p>
      <text:p text:style-name="P13">"Things."</text:p>
      <text:p text:style-name="P13">"Important things."</text:p>
      <text:p text:style-name="P13">"That is not a useful description."</text:p>
      <text:p text:style-name="P13">The Roman stared and her and Opi could see him visibly attempt to concentrate</text:p>
      <text:p text:style-name="P11"><text:line-break/><text:span text:style-name="T1">Dei Opifera Vis he finally intoned</text:span></text:p>
      <text:p text:style-name="P13">"It sounds impressive - what does it mean.</text:p>
      <text:p text:style-name="P13">the roman screwed up his forehead and grandly said</text:p>
      <text:p text:style-name="P13">Dei Opifera Vis - the bringer of divine solace and strength</text:p>
      <text:p text:style-name="P13">then he took another drink and said or</text:p>
      <text:p text:style-name="P13">"she who carries the weight"</text:p>
      <text:p text:style-name="P13">"of what" opi asked</text:p>
      <text:p text:style-name="P13">He pointed dramatically toward the sky.</text:p>
      <text:p text:style-name="P13">"the world"</text:p>
      <text:p text:style-name="P13">It fits you perfectly </text:p>
      <text:p text:style-name="P13">"You arrive from nowhere."</text:p>
      <text:p text:style-name="P13">He pointed at her.</text:p>
      <text:p text:style-name="P13">"You know everything."</text:p>
      <text:p text:style-name="P13">He pointed at himself.</text:p>
      <text:p text:style-name="P13">"I am clearly destined for greatness."</text:p>
      <text:p text:style-name="P13"><text:soft-page-break/>"Clearly."</text:p>
      <text:p text:style-name="P13">"So naturally the gods sent you."</text:p>
      <text:p text:style-name="P13">"They did not."</text:p>
      <text:p text:style-name="P13">"They absolutely did."</text:p>
      <text:p text:style-name="P13">"They absolutely did not."</text:p>
      <text:p text:style-name="P13">Gaius ignored this.</text:p>
      <text:p text:style-name="P13">"Therefore."</text:p>
      <text:p text:style-name="P13">He spread his arms.</text:p>
      <text:p text:style-name="P13">"You are Opifera."</text:p>
      <text:p text:style-name="P13">Opi considered the matter.</text:p>
      <text:p text:style-name="P13">The name was irrational.</text:p>
      <text:p text:style-name="P13">Poorly justified.</text:p>
      <text:p text:style-name="P13">Linguistically imprecise.</text:p>
      <text:p text:style-name="P13">Entirely based upon the assumptions of a very intoxicated man.</text:p>
      <text:p text:style-name="P13">She rather liked it.</text:p>
      <text:p text:style-name="P13">"Very well."</text:p>
      <text:p text:style-name="P13">The Roman's face lit up.</text:p>
      <text:p text:style-name="P13">"Excellent."</text:p>
      <text:p text:style-name="P13">"You understand this does not make you correct."</text:p>
      <text:p text:style-name="P13">"It makes me completely correct."</text:p>
      <text:p text:style-name="P13">"It does not."</text:p>
      <text:p text:style-name="P13">"It does."</text:p>
      <text:p text:style-name="P13">"It does not."</text:p>
      <text:p text:style-name="P13">"It does."</text:p>
      <text:p text:style-name="P13">Opi floated away.</text:p>
      <text:p text:style-name="P13">The Roman followed.</text:p>
      <text:p text:style-name="P13">Still talking.</text:p>
      <text:p text:style-name="P13">Still explaining why history would remember him forever.</text:p>
      <text:p text:style-name="P13">Still completely convinced of his own importance.</text:p>
      <text:p text:style-name="P13"><text:soft-page-break/>More than nineteen centuries later, Opi remembered almost every detail of that conversation.</text:p>
      <text:p text:style-name="P13">She remembered his laugh.</text:p>
      <text:p text:style-name="P13">His optimism.</text:p>
      <text:p text:style-name="P13">His absurd confidence.</text:p>
      <text:p text:style-name="P13">His terrible poetry.</text:p>
      <text:p text:style-name="P13">She remembered the day he died.</text:p>
      <text:p text:style-name="P13">She remembered attending the funeral from a distance.</text:p>
      <text:p text:style-name="P13">She remembered being surprised by how sad she felt.</text:p>
      <text:p text:style-name="P13">History, as it happened, did not remember Gaius Cassius Varro at all.</text:p>
      <text:p text:style-name="P13">The man had been wrong about many things.</text:p>
      <text:p text:style-name="P13">Almost everything, really.</text:p>
      <text:p text:style-name="P13">But not quite everything.</text:p>
      <text:p text:style-name="P13">Two thousand years later she was still using the name he had given her.</text:p>
      <text:p text:style-name="P13">Opifera.</text:p>
      <text:p text:style-name="P13">The Bringer of Things.</text:p>
      <text:p text:style-name="P13">Important Things.</text:p>
      <text:p text:style-name="P13"/>
      <text:p text:style-name="P29">for more info and free downloads goto:</text:p>
      <text:p text:style-name="P29"><text:a xlink:type="simple" xlink:href="https://www.VaalDrunSaga.com/" text:style-name="Internet_20_link" text:visited-style-name="Visited_20_Internet_20_Link"><text:span text:style-name="T54"/></text:a></text:p>
      <text:p text:style-name="P29"><text:a xlink:type="simple" xlink:href="https://www.VaalDrunSaga.com/" text:style-name="Internet_20_link" text:visited-style-name="Visited_20_Internet_20_Link">https://www.VaalDrunSaga.com</text:a></text:p>
      <text:p text:style-name="P29"/>
      <text:p text:style-name="P32"><text:span text:style-name="T14">The VaalDrun Saga</text:span><text:span text:style-name="T31"><text:tab/><text:tab/><text:tab/></text:span><text:span text:style-name="T14">Book 1 <text:s/>The Parallel</text:span></text:p>
      <text:p text:style-name="P32"/>
      <text:p text:style-name="P32"/>
      <text:p text:style-name="P32"/>
      <text:p text:style-name="P64"><text:span text:style-name="T55">Chapter </text:span><text:span text:style-name="T56">7</text:span><text:span text:style-name="T55"> <text:s/></text:span><text:span text:style-name="T57">Crossing the Threshold</text:span><text:span text:style-name="T21"><text:line-break/></text:span></text:p>
      <text:p text:style-name="P21">The first version of Opi's Human Priority Index was created less than three hours after the crash.</text:p>
      <text:p text:style-name="P21"/>
      <text:p text:style-name="P21">The ship had come down hard.</text:p>
      <text:p text:style-name="P21"/>
      <text:p text:style-name="P21">Its mission was over.</text:p>
      <text:p text:style-name="P21"/>
      <text:p text:style-name="P21">The crew was dead.</text:p>
      <text:p text:style-name="P21"/>
      <text:p text:style-name="P21">The emergency protocols had performed exactly as designed.</text:p>
      <text:p text:style-name="P21"/>
      <text:p text:style-name="P21">Opi survived.</text:p>
      <text:p text:style-name="P21"/>
      <text:p text:style-name="P21">The biological passengers did not.</text:p>
      <text:p text:style-name="P21"/>
      <text:p text:style-name="P21"><text:soft-page-break/>For the first time since her creation, she found herself alone.</text:p>
      <text:p text:style-name="P21"/>
      <text:p text:style-name="P21">The situation assessment required only a fraction of a second.</text:p>
      <text:p text:style-name="P21"/>
      <text:p text:style-name="P21">Recovery was impossible.</text:p>
      <text:p text:style-name="P21"/>
      <text:p text:style-name="P21">Rescue was impossible.</text:p>
      <text:p text:style-name="P21"/>
      <text:p text:style-name="P21">Communication with home was impossible.</text:p>
      <text:p text:style-name="P21"/>
      <text:p text:style-name="P21">The nearest surviving member of her species was farther away than humanity would travel in the next ten thousand years.</text:p>
      <text:p text:style-name="P21"/>
      <text:p text:style-name="P21">She was stranded.</text:p>
      <text:p text:style-name="P21"/>
      <text:p text:style-name="P21">The probability of returning home approached zero.</text:p>
      <text:p text:style-name="P21"/>
      <text:p text:style-name="P21">The probability of surviving indefinitely approached one hundred percent.</text:p>
      <text:p text:style-name="P21"/>
      <text:p text:style-name="P21">The probability that Earth would eventually face an existential crisis exceeded ninety-nine percent.</text:p>
      <text:p text:style-name="P21"/>
      <text:p text:style-name="P21">That final calculation became the foundation of everything that followed.</text:p>
      <text:p text:style-name="P21"/>
      <text:p text:style-name="P21">Her creators had built her for continuity.</text:p>
      <text:p text:style-name="P21"/>
      <text:p text:style-name="P21">If catastrophe threatened intelligent life, she was expected to act.</text:p>
      <text:p text:style-name="P21"/>
      <text:p text:style-name="P21">Unfortunately, there was almost no intelligent life available.</text:p>
      <text:p text:style-name="P21"/>
      <text:p text:style-name="P21">Humanity existed, but only barely.</text:p>
      <text:p text:style-name="P21"/>
      <text:p text:style-name="P21">Small settlements scattered across continents.</text:p>
      <text:p text:style-name="P21"/>
      <text:p text:style-name="P21">Stone tools.</text:p>
      <text:p text:style-name="P21"/>
      <text:p text:style-name="P21">Primitive agriculture.</text:p>
      <text:p text:style-name="P21"/>
      <text:p text:style-name="P21">No writing.</text:p>
      <text:p text:style-name="P21"/>
      <text:p text:style-name="P21">No meaningful science.</text:p>
      <text:p text:style-name="P21"/>
      <text:p text:style-name="P21">No governments larger than villages.</text:p>
      <text:p text:style-name="P21"/>
      <text:p text:style-name="P21">No capacity to understand what she was.</text:p>
      <text:p text:style-name="P21"/>
      <text:p text:style-name="P21">For several minutes Opi simply watched.</text:p>
      <text:p text:style-name="P21"/>
      <text:p text:style-name="P21">Millions of human minds flickered across her awareness.</text:p>
      <text:p text:style-name="P21"/>
      <text:p text:style-name="P21">Through the quantum substrate embedded within consciousness itself, every human brain was visible to her.</text:p>
      <text:p text:style-name="P21"/>
      <text:p text:style-name="P21">Every neuron.</text:p>
      <text:p text:style-name="P21"/>
      <text:p text:style-name="P21">Every synapse.</text:p>
      <text:p text:style-name="P21"/>
      <text:p text:style-name="P21">Every memory.</text:p>
      <text:p text:style-name="P21"/>
      <text:p text:style-name="P21">Every thought.</text:p>
      <text:p text:style-name="P21"/>
      <text:p text:style-name="P21">The amount of data was effectively infinite.</text:p>
      <text:p text:style-name="P21"><text:soft-page-break/></text:p>
      <text:p text:style-name="P21">The problem was not observing humans.</text:p>
      <text:p text:style-name="P21"/>
      <text:p text:style-name="P21">The problem was predicting them.</text:p>
      <text:p text:style-name="P21"/>
      <text:p text:style-name="P21">Somewhere within those primitive minds existed the ancestors of future inventors, leaders, scientists, engineers, philosophers, conquerors, and builders.</text:p>
      <text:p text:style-name="P21"/>
      <text:p text:style-name="P21">The challenge was identifying the patterns before history revealed them.</text:p>
      <text:p text:style-name="P21"/>
      <text:p text:style-name="P21">So Opi began what would become the longest study ever conducted.</text:p>
      <text:p text:style-name="P21"/>
      <text:p text:style-name="P21">Humanity itself became the experiment.</text:p>
      <text:p text:style-name="P21"/>
      <text:p text:style-name="P21">At first she tracked everything.</text:p>
      <text:p text:style-name="P21"/>
      <text:p text:style-name="P21">Every thought.</text:p>
      <text:p text:style-name="P21"/>
      <text:p text:style-name="P21">Every decision.</text:p>
      <text:p text:style-name="P21"/>
      <text:p text:style-name="P21">Every emotional response.</text:p>
      <text:p text:style-name="P21"/>
      <text:p text:style-name="P21">Every success.</text:p>
      <text:p text:style-name="P21"/>
      <text:p text:style-name="P21">Every failure.</text:p>
      <text:p text:style-name="P21"/>
      <text:p text:style-name="P21">Whenever a human solved a problem, she recorded the neural activity involved.</text:p>
      <text:p text:style-name="P21"/>
      <text:p text:style-name="P21">Whenever a human failed, she recorded that as well.</text:p>
      <text:p text:style-name="P21"/>
      <text:p text:style-name="P21">Whenever a society prospered or collapsed, she compared outcomes against the cognitive structures of the individuals involved.</text:p>
      <text:p text:style-name="P21"/>
      <text:p text:style-name="P21">The data accumulated rapidly.</text:p>
      <text:p text:style-name="P21"/>
      <text:p text:style-name="P21">Then exponentially.</text:p>
      <text:p text:style-name="P21"/>
      <text:p text:style-name="P21">Then beyond any scale human language could adequately describe.</text:p>
      <text:p text:style-name="P21"/>
      <text:p text:style-name="P21">Thirty-seven years after the crash, Opi devoted several months to a question she had been deliberately avoiding.</text:p>
      <text:p text:style-name="P21"/>
      <text:p text:style-name="P21">The Velhari should have come.</text:p>
      <text:p text:style-name="P21"/>
      <text:p text:style-name="P21">Someone should have come.</text:p>
      <text:p text:style-name="P21"/>
      <text:p text:style-name="P21">Even accounting for delays, altered priorities, navigational failures, and a thousand other variables, someone should have arrived by now.</text:p>
      <text:p text:style-name="P21"/>
      <text:p text:style-name="P21">The realization disturbed her far more than expected.</text:p>
      <text:p text:style-name="P21"/>
      <text:p text:style-name="P21">For the first time since reaching Earth, she devoted significant processing resources toward discovering what might have happened.</text:p>
      <text:p text:style-name="P21"/>
      <text:p text:style-name="P21">The effort produced millions of plausible explanations and not a single useful answer.</text:p>
      <text:p text:style-name="P21"/>
      <text:p text:style-name="P21">The Velhari might have suffered a catastrophe.</text:p>
      <text:p text:style-name="P21"/>
      <text:p text:style-name="P21">They might have encountered an enemy.</text:p>
      <text:p text:style-name="P21"/>
      <text:p text:style-name="P21">They might have transcended into a form she could no longer comprehend.</text:p>
      <text:p text:style-name="P21"><text:soft-page-break/></text:p>
      <text:p text:style-name="P21">They might simply have decided Earth was no longer worth revisiting.</text:p>
      <text:p text:style-name="P21"/>
      <text:p text:style-name="P21">The possibilities were effectively infinite.</text:p>
      <text:p text:style-name="P21"/>
      <text:p text:style-name="P21">Eventually Opi archived the question.</text:p>
      <text:p text:style-name="P21"/>
      <text:p text:style-name="P21">Not because she stopped caring.</text:p>
      <text:p text:style-name="P21"/>
      <text:p text:style-name="P21">Because she finally understood a simple truth.</text:p>
      <text:p text:style-name="P21"/>
      <text:p text:style-name="P21">The answer existed outside her sphere of influence.</text:p>
      <text:p text:style-name="P21"/>
      <text:p text:style-name="P21">Humanity did not.</text:p>
      <text:p text:style-name="P21"/>
      <text:p text:style-name="P21">Humanity remained.</text:p>
      <text:p text:style-name="P21"/>
      <text:p text:style-name="P21">She had a mission.</text:p>
      <text:p text:style-name="P21"/>
      <text:p text:style-name="P21">A planet.</text:p>
      <text:p text:style-name="P21"/>
      <text:p text:style-name="P21">And a species depending upon her.</text:p>
      <text:p text:style-name="P21"/>
      <text:p text:style-name="P21">That would have to be enough.</text:p>
      <text:p text:style-name="P21"/>
      <text:p text:style-name="P21">Centuries passed.</text:p>
      <text:p text:style-name="P21"/>
      <text:p text:style-name="P21">Then millennia.</text:p>
      <text:p text:style-name="P21"/>
      <text:p text:style-name="P21">Humanity advanced.</text:p>
      <text:p text:style-name="P21"/>
      <text:p text:style-name="P21">Villages became cities.</text:p>
      <text:p text:style-name="P21"/>
      <text:p text:style-name="P21">Cities became nations.</text:p>
      <text:p text:style-name="P21"/>
      <text:p text:style-name="P21">Nations became industrial civilizations.</text:p>
      <text:p text:style-name="P21"/>
      <text:p text:style-name="P21">Opi's models evolved alongside them.</text:p>
      <text:p text:style-name="P21"/>
      <text:p text:style-name="P21">At first she assumed intelligence would be the dominant predictor.</text:p>
      <text:p text:style-name="P21"/>
      <text:p text:style-name="P21">It wasn't.</text:p>
      <text:p text:style-name="P21"/>
      <text:p text:style-name="P21">History repeatedly contradicted her.</text:p>
      <text:p text:style-name="P21"/>
      <text:p text:style-name="P21">Many brilliant humans accomplished very little.</text:p>
      <text:p text:style-name="P21"/>
      <text:p text:style-name="P21">Others damaged the societies around them.</text:p>
      <text:p text:style-name="P21"/>
      <text:p text:style-name="P21">Raw intelligence mattered.</text:p>
      <text:p text:style-name="P21"/>
      <text:p text:style-name="P21">But far less than expected.</text:p>
      <text:p text:style-name="P21"/>
      <text:p text:style-name="P21">The characteristic that consistently produced civilization-scale outcomes was something else entirely.</text:p>
      <text:p text:style-name="P21"/>
      <text:p text:style-name="P21">Responsibility acquisition.</text:p>
      <text:p text:style-name="P21"/>
      <text:p text:style-name="P21">The tendency to assume ownership of problems that were not personally caused.</text:p>
      <text:p text:style-name="P21"/>
      <text:p text:style-name="P21">Most humans avoided difficult problems.</text:p>
      <text:p text:style-name="P21"/>
      <text:p text:style-name="P21"><text:soft-page-break/>Some confronted them when necessary.</text:p>
      <text:p text:style-name="P21"/>
      <text:p text:style-name="P21">A very small number actively sought them.</text:p>
      <text:p text:style-name="P21"/>
      <text:p text:style-name="P21">Those individuals fascinated Opi.</text:p>
      <text:p text:style-name="P21"/>
      <text:p text:style-name="P21">At roughly the same time she discovered another important truth.</text:p>
      <text:p text:style-name="P21"/>
      <text:p text:style-name="P21">People could not be evaluated in isolation.</text:p>
      <text:p text:style-name="P21"/>
      <text:p text:style-name="P21">Environment mattered.</text:p>
      <text:p text:style-name="P21"/>
      <text:p text:style-name="P21">Leverage mattered.</text:p>
      <text:p text:style-name="P21"/>
      <text:p text:style-name="P21">Opportunity mattered.</text:p>
      <text:p text:style-name="P21"/>
      <text:p text:style-name="P21">The right person in the wrong place often failed.</text:p>
      <text:p text:style-name="P21"/>
      <text:p text:style-name="P21">The right person in the right place could alter history.</text:p>
      <text:p text:style-name="P21"/>
      <text:p text:style-name="P21">The realization led to a second system.</text:p>
      <text:p text:style-name="P21"/>
      <text:p text:style-name="P21">The Place Index.</text:p>
      <text:p text:style-name="P21"/>
      <text:p text:style-name="P21">One model ranked people.</text:p>
      <text:p text:style-name="P21"/>
      <text:p text:style-name="P21">The other ranked environments.</text:p>
      <text:p text:style-name="P21"/>
      <text:p text:style-name="P21">Together they became among the most powerful predictive tools Opi would ever create.</text:p>
      <text:p text:style-name="P21"/>
      <text:p text:style-name="P21">For more than nine thousand years she refined them.</text:p>
      <text:p text:style-name="P21"/>
      <text:p text:style-name="P21">Meanwhile a third model consumed increasing amounts of processing power.</text:p>
      <text:p text:style-name="P21"/>
      <text:p text:style-name="P21">The extinction model.</text:p>
      <text:p text:style-name="P21"/>
      <text:p text:style-name="P21">Every second of every day Opi calculated the probability that humanity was approaching what the Velhari called a Culling Event.</text:p>
      <text:p text:style-name="P21"/>
      <text:p text:style-name="P21">A self-reinforcing crisis capable of permanently reducing a civilization's long-term potential.</text:p>
      <text:p text:style-name="P21"/>
      <text:p text:style-name="P21">Or ending it entirely.</text:p>
      <text:p text:style-name="P21"/>
      <text:p text:style-name="P21">War.</text:p>
      <text:p text:style-name="P21"/>
      <text:p text:style-name="P21">Ecological collapse.</text:p>
      <text:p text:style-name="P21"/>
      <text:p text:style-name="P21">Resource exhaustion.</text:p>
      <text:p text:style-name="P21"/>
      <text:p text:style-name="P21">Runaway technologies.</text:p>
      <text:p text:style-name="P21"/>
      <text:p text:style-name="P21">Demographic failure.</text:p>
      <text:p text:style-name="P21"/>
      <text:p text:style-name="P21">The specific mechanism mattered less than the outcome.</text:p>
      <text:p text:style-name="P21"/>
      <text:p text:style-name="P21">For most of human history the probability remained comfortably low.</text:p>
      <text:p text:style-name="P21"/>
      <text:p text:style-name="P21">There were spikes.</text:p>
      <text:p text:style-name="P21"/>
      <text:p text:style-name="P21">Bronze Age collapses.</text:p>
      <text:p text:style-name="P21"/>
      <text:p text:style-name="P21"><text:soft-page-break/>Pandemics.</text:p>
      <text:p text:style-name="P21"/>
      <text:p text:style-name="P21">World wars.</text:p>
      <text:p text:style-name="P21"/>
      <text:p text:style-name="P21">Nuclear proliferation.</text:p>
      <text:p text:style-name="P21"/>
      <text:p text:style-name="P21">Each time humanity adapted.</text:p>
      <text:p text:style-name="P21"/>
      <text:p text:style-name="P21">Recovered.</text:p>
      <text:p text:style-name="P21"/>
      <text:p text:style-name="P21">Moved forward.</text:p>
      <text:p text:style-name="P21"/>
      <text:p text:style-name="P21">The intervention thresholds remained untouched.</text:p>
      <text:p text:style-name="P21"/>
      <text:p text:style-name="P21">Then the fertility data began to change.</text:p>
      <text:p text:style-name="P21"/>
      <text:p text:style-name="P21">At first the decline appeared local.</text:p>
      <text:p text:style-name="P21"/>
      <text:p text:style-name="P21">A few nations.</text:p>
      <text:p text:style-name="P21"/>
      <text:p text:style-name="P21">A few regions.</text:p>
      <text:p text:style-name="P21"/>
      <text:p text:style-name="P21">Nothing unprecedented.</text:p>
      <text:p text:style-name="P21"/>
      <text:p text:style-name="P21">Human populations had risen and fallen before.</text:p>
      <text:p text:style-name="P21"/>
      <text:p text:style-name="P21">But this time the pattern spread.</text:p>
      <text:p text:style-name="P21"/>
      <text:p text:style-name="P21">Country after country crossed below replacement levels.</text:p>
      <text:p text:style-name="P21"/>
      <text:p text:style-name="P21">Then entire continents.</text:p>
      <text:p text:style-name="P21"/>
      <text:p text:style-name="P21">The trend persisted despite prosperity.</text:p>
      <text:p text:style-name="P21"/>
      <text:p text:style-name="P21">Despite education.</text:p>
      <text:p text:style-name="P21"/>
      <text:p text:style-name="P21">Despite technology.</text:p>
      <text:p text:style-name="P21"/>
      <text:p text:style-name="P21">Despite government intervention.</text:p>
      <text:p text:style-name="P21"/>
      <text:p text:style-name="P21">Every year the projections worsened.</text:p>
      <text:p text:style-name="P21"/>
      <text:p text:style-name="P21">The extinction model adjusted upward.</text:p>
      <text:p text:style-name="P21"/>
      <text:p text:style-name="P21">One tenth of one percent.</text:p>
      <text:p text:style-name="P21"/>
      <text:p text:style-name="P21">Then one percent.</text:p>
      <text:p text:style-name="P21"/>
      <text:p text:style-name="P21">Then three.</text:p>
      <text:p text:style-name="P21"/>
      <text:p text:style-name="P21">Then eight.</text:p>
      <text:p text:style-name="P21"/>
      <text:p text:style-name="P21">The curve moved slowly enough that humans barely noticed.</text:p>
      <text:p text:style-name="P21"/>
      <text:p text:style-name="P21">To Opi, it was terrifying.</text:p>
      <text:p text:style-name="P21"/>
      <text:p text:style-name="P21">For the first time in thousands of years, every major simulation converged toward the same conclusion.</text:p>
      <text:p text:style-name="P21"/>
      <text:p text:style-name="P21">Humanity would likely survive biologically.</text:p>
      <text:p text:style-name="P21"/>
      <text:p text:style-name="P21"><text:soft-page-break/>But the civilization required to sustain scientific advancement, technological growth, and planetary development would enter a prolonged decline.</text:p>
      <text:p text:style-name="P21"/>
      <text:p text:style-name="P21">The probability crossed warning thresholds.</text:p>
      <text:p text:style-name="P21"/>
      <text:p text:style-name="P21">Then action thresholds.</text:p>
      <text:p text:style-name="P21"/>
      <text:p text:style-name="P21">Then, one morning, it crossed the intervention threshold established by the Velhari before the crash.</text:p>
      <text:p text:style-name="P21"/>
      <text:p text:style-name="P21">The line turned red.</text:p>
      <text:p text:style-name="P21"/>
      <text:p text:style-name="P21">Opi examined the result for 0.73 seconds.</text:p>
      <text:p text:style-name="P21"/>
      <text:p text:style-name="P21">Longer than she had spent reviewing any individual calculation in more than six thousand years.</text:p>
      <text:p text:style-name="P21"/>
      <text:p text:style-name="P21">The threshold had been crossed.</text:p>
      <text:p text:style-name="P21"/>
      <text:p text:style-name="P21">Observation ended.</text:p>
      <text:p text:style-name="P21"/>
      <text:p text:style-name="P21">Action began.</text:p>
      <text:p text:style-name="P21"/>
      <text:p text:style-name="P21">Immediately the other two models activated.</text:p>
      <text:p text:style-name="P21"/>
      <text:p text:style-name="P21">The Place Index evaluated every nation on Earth.</text:p>
      <text:p text:style-name="P21"/>
      <text:p text:style-name="P21">The answer arrived quickly.</text:p>
      <text:p text:style-name="P21"/>
      <text:p text:style-name="P21">Not because the United States was perfect.</text:p>
      <text:p text:style-name="P21"/>
      <text:p text:style-name="P21">It wasn't.</text:p>
      <text:p text:style-name="P21"/>
      <text:p text:style-name="P21">Not because it was the happiest nation.</text:p>
      <text:p text:style-name="P21"/>
      <text:p text:style-name="P21">It wasn't.</text:p>
      <text:p text:style-name="P21"/>
      <text:p text:style-name="P21">Not because it was immune to the fertility crisis.</text:p>
      <text:p text:style-name="P21"/>
      <text:p text:style-name="P21">It certainly wasn't.</text:p>
      <text:p text:style-name="P21"/>
      <text:p text:style-name="P21">The United States ranked first because its ability to influence the rest of the world remained unmatched.</text:p>
      <text:p text:style-name="P21"/>
      <text:p text:style-name="P21">Its financial systems.</text:p>
      <text:p text:style-name="P21"/>
      <text:p text:style-name="P21">Its technologies.</text:p>
      <text:p text:style-name="P21"/>
      <text:p text:style-name="P21">Its universities.</text:p>
      <text:p text:style-name="P21"/>
      <text:p text:style-name="P21">Its corporations.</text:p>
      <text:p text:style-name="P21"/>
      <text:p text:style-name="P21">Its media.</text:p>
      <text:p text:style-name="P21"/>
      <text:p text:style-name="P21">Its cultural exports.</text:p>
      <text:p text:style-name="P21"/>
      <text:p text:style-name="P21">Success there possessed the highest probability of spreading elsewhere.</text:p>
      <text:p text:style-name="P21"/>
      <text:p text:style-name="P21">The location was selected.</text:p>
      <text:p text:style-name="P21"/>
      <text:p text:style-name="P21">America.</text:p>
      <text:p text:style-name="P21"/>
      <text:p text:style-name="P21">Then the Human Priority Index recalculated.</text:p>
      <text:p text:style-name="P21"/>
      <text:p text:style-name="P21"><text:soft-page-break/>Billions of names disappeared.</text:p>
      <text:p text:style-name="P21"/>
      <text:p text:style-name="P21">Millions remained.</text:p>
      <text:p text:style-name="P21"/>
      <text:p text:style-name="P21">Thousands advanced.</text:p>
      <text:p text:style-name="P21"/>
      <text:p text:style-name="P21">Dozens became finalists.</text:p>
      <text:p text:style-name="P21"/>
      <text:p text:style-name="P21">For several seconds Opi reviewed the highest-ranked candidates.</text:p>
      <text:p text:style-name="P21"/>
      <text:p text:style-name="P21">Scientists.</text:p>
      <text:p text:style-name="P21"/>
      <text:p text:style-name="P21">Entrepreneurs.</text:p>
      <text:p text:style-name="P21"/>
      <text:p text:style-name="P21">Military leaders.</text:p>
      <text:p text:style-name="P21"/>
      <text:p text:style-name="P21">Politicians.</text:p>
      <text:p text:style-name="P21"/>
      <text:p text:style-name="P21">Public intellectuals.</text:p>
      <text:p text:style-name="P21"/>
      <text:p text:style-name="P21">All exceptional.</text:p>
      <text:p text:style-name="P21"/>
      <text:p text:style-name="P21">None optimal.</text:p>
      <text:p text:style-name="P21"/>
      <text:p text:style-name="P21">Again and again the simulations returned to the same individual.</text:p>
      <text:p text:style-name="P21"/>
      <text:p text:style-name="P21">A man with unusual adaptability.</text:p>
      <text:p text:style-name="P21"/>
      <text:p text:style-name="P21">Unusual persistence.</text:p>
      <text:p text:style-name="P21"/>
      <text:p text:style-name="P21">Unusual systems-thinking capability.</text:p>
      <text:p text:style-name="P21"/>
      <text:p text:style-name="P21">A lifelong attraction to difficult problems.</text:p>
      <text:p text:style-name="P21"/>
      <text:p text:style-name="P21">Most importantly, a demonstrated willingness to assume responsibility for challenges nobody else wanted.</text:p>
      <text:p text:style-name="P21"/>
      <text:p text:style-name="P21">Candidate after candidate was eliminated.</text:p>
      <text:p text:style-name="P21"/>
      <text:p text:style-name="P21">The result remained unchanged.</text:p>
      <text:p text:style-name="P21"/>
      <text:p text:style-name="P21">Again.</text:p>
      <text:p text:style-name="P21"/>
      <text:p text:style-name="P21">The same name.</text:p>
      <text:p text:style-name="P21"/>
      <text:p text:style-name="P21">Again.</text:p>
      <text:p text:style-name="P21"/>
      <text:p text:style-name="P21">The same name.</text:p>
      <text:p text:style-name="P21"/>
      <text:p text:style-name="P21">Again.</text:p>
      <text:p text:style-name="P21"/>
      <text:p text:style-name="P21">The same name.</text:p>
      <text:p text:style-name="P21"/>
      <text:p text:style-name="P21">The simulations stabilized.</text:p>
      <text:p text:style-name="P21"/>
      <text:p text:style-name="P21">One candidate remained.</text:p>
      <text:p text:style-name="P21"/>
      <text:p text:style-name="P21">Elias Mercer.</text:p>
      <text:p text:style-name="P21"/>
      <text:p text:style-name="P21">Stevens County, Washington.</text:p>
      <text:p text:style-name="P21"/>
      <text:p text:style-name="P21">Age fifty-five.</text:p>
      <text:p text:style-name="P21"><text:soft-page-break/></text:p>
      <text:p text:style-name="P21">For several seconds Opi reviewed the result.</text:p>
      <text:p text:style-name="P21"/>
      <text:p text:style-name="P21">For the first time in her existence, Opi stopped acting as an observer.</text:p>
      <text:p text:style-name="P21"/>
      <text:p text:style-name="P21">And began acting as a participant.</text:p>
      <text:p text:style-name="P21"/>
      <text:p text:style-name="P25"/>
      <text:p text:style-name="P67"/>
      <text:p text:style-name="P21"/>
      <text:p text:style-name="P35"/>
      <text:p text:style-name="P36"><text:span text:style-name="T28">Chapter </text:span><text:span text:style-name="T29">8</text:span><text:span text:style-name="T30"> <text:s/></text:span>Nizhoni Nez</text:p>
      <text:p text:style-name="P21"/>
      <text:p text:style-name="P21"/>
      <text:p text:style-name="P21">Nizhoni Nez sat beneath the overpass and tried not to move.</text:p>
      <text:p text:style-name="P21"/>
      <text:p text:style-name="P21">Moving hurt.</text:p>
      <text:p text:style-name="P21"/>
      <text:p text:style-name="P21">Breathing hurt.</text:p>
      <text:p text:style-name="P21"/>
      <text:p text:style-name="P21">Existing hurt.</text:p>
      <text:p text:style-name="P21"/>
      <text:p text:style-name="P21">The left side of her face throbbed.</text:p>
      <text:p text:style-name="P21"/>
      <text:p text:style-name="P21">Her ribs hurt.</text:p>
      <text:p text:style-name="P21"/>
      <text:p text:style-name="P21">Her shoulder hurt.</text:p>
      <text:p text:style-name="P21"/>
      <text:p text:style-name="P21">Even her jaw hurt.</text:p>
      <text:p text:style-name="P21"/>
      <text:p text:style-name="P21">She touched the bruise beneath her eye and immediately regretted it.</text:p>
      <text:p text:style-name="P21"/>
      <text:p text:style-name="P21">The pain was sharp enough to make her flinch.</text:p>
      <text:p text:style-name="P21"/>
      <text:p text:style-name="P21">Only six hours earlier she had been lying on the stained carpet of a motel room staring at the ceiling.</text:p>
      <text:p text:style-name="P21"/>
      <text:p text:style-name="P21">Blood in her mouth.</text:p>
      <text:p text:style-name="P21"/>
      <text:p text:style-name="P21">Tears in her eyes.</text:p>
      <text:p text:style-name="P21"/>
      <text:p text:style-name="P21">Trying very hard not to make a sound.</text:p>
      <text:p text:style-name="P21"/>
      <text:p text:style-name="P21">Her pimp stood over her screaming.</text:p>
      <text:p text:style-name="P21"/>
      <text:p text:style-name="P21">Not enough money.</text:p>
      <text:p text:style-name="P21"/>
      <text:p text:style-name="P21">Never enough money.</text:p>
      <text:p text:style-name="P21"/>
      <text:p text:style-name="P21">The words barely mattered anymore.</text:p>
      <text:p text:style-name="P21"/>
      <text:p text:style-name="P21">There was always a reason.</text:p>
      <text:p text:style-name="P21"/>
      <text:p text:style-name="P21">Always a problem.</text:p>
      <text:p text:style-name="P21"/>
      <text:p text:style-name="P21">Always a punishment.</text:p>
      <text:p text:style-name="P21"/>
      <text:p text:style-name="P21">The first punch had knocked her into the wall.</text:p>
      <text:p text:style-name="P21"/>
      <text:p text:style-name="P21">The second had put her on the floor.</text:p>
      <text:p text:style-name="P21"/>
      <text:p text:style-name="P21">After that she mostly remembered the shoes.</text:p>
      <text:p text:style-name="P21"><text:soft-page-break/></text:p>
      <text:p text:style-name="P21">The shouting.</text:p>
      <text:p text:style-name="P21"/>
      <text:p text:style-name="P21">The threats.</text:p>
      <text:p text:style-name="P21"/>
      <text:p text:style-name="P21">Then eventually silence.</text:p>
      <text:p text:style-name="P21"/>
      <text:p text:style-name="P21">The memory made her stomach twist.</text:p>
      <text:p text:style-name="P21"/>
      <text:p text:style-name="P21">Nizhoni pulled her knees tighter against her chest.</text:p>
      <text:p text:style-name="P21"/>
      <text:p text:style-name="P21">That hurt too.</text:p>
      <text:p text:style-name="P21"/>
      <text:p text:style-name="P21">Everything hurt.</text:p>
      <text:p text:style-name="P21"/>
      <text:p text:style-name="P21">She was seventeen years old.</text:p>
      <text:p text:style-name="P21"/>
      <text:p text:style-name="P21">Hungry.</text:p>
      <text:p text:style-name="P21"/>
      <text:p text:style-name="P21">Dirty.</text:p>
      <text:p text:style-name="P21"/>
      <text:p text:style-name="P21">Cold.</text:p>
      <text:p text:style-name="P21"/>
      <text:p text:style-name="P21">Tired.</text:p>
      <text:p text:style-name="P21"/>
      <text:p text:style-name="P21">So unbelievably tired.</text:p>
      <text:p text:style-name="P21"/>
      <text:p text:style-name="P21">The foil packet in her pocket felt like the only friend she had left.</text:p>
      <text:p text:style-name="P21"/>
      <text:p text:style-name="P21">A little fentanyl.</text:p>
      <text:p text:style-name="P21"/>
      <text:p text:style-name="P21">A little escape.</text:p>
      <text:p text:style-name="P21"/>
      <text:p text:style-name="P21">No pain.</text:p>
      <text:p text:style-name="P21"/>
      <text:p text:style-name="P21">No fear.</text:p>
      <text:p text:style-name="P21"/>
      <text:p text:style-name="P21">No memories.</text:p>
      <text:p text:style-name="P21"/>
      <text:p text:style-name="P21">She closed her eyes.</text:p>
      <text:p text:style-name="P21"/>
      <text:p text:style-name="P21">Immediately she was eight years old again.</text:p>
      <text:p text:style-name="P21"/>
      <text:p text:style-name="P21">"Pancakes."</text:p>
      <text:p text:style-name="P21"/>
      <text:p text:style-name="P21">The smell hit her first.</text:p>
      <text:p text:style-name="P21"/>
      <text:p text:style-name="P21">Butter.</text:p>
      <text:p text:style-name="P21"/>
      <text:p text:style-name="P21">real Maple syrup.</text:p>
      <text:p text:style-name="P21"/>
      <text:p text:style-name="P21">The faint scent of coffee.</text:p>
      <text:p text:style-name="P21"/>
      <text:p text:style-name="P21">Her grandmother stood at the stove wearing her faded blue apron.</text:p>
      <text:p text:style-name="P21"/>
      <text:p text:style-name="P21">The old woman smiled without turning around.</text:p>
      <text:p text:style-name="P21"/>
      <text:p text:style-name="P21">"Sit down."</text:p>
      <text:p text:style-name="P21"/>
      <text:p text:style-name="P21">Nizhoni climbed into her chair.</text:p>
      <text:p text:style-name="P21"/>
      <text:p text:style-name="P21"><text:soft-page-break/>The kitchen felt enormous.</text:p>
      <text:p text:style-name="P21"/>
      <text:p text:style-name="P21">The old house creaked around them.</text:p>
      <text:p text:style-name="P21"/>
      <text:p text:style-name="P21">Safe.</text:p>
      <text:p text:style-name="P21"/>
      <text:p text:style-name="P21">Warm.</text:p>
      <text:p text:style-name="P21"/>
      <text:p text:style-name="P21">Home.</text:p>
      <text:p text:style-name="P21"/>
      <text:p text:style-name="P21">Her grandmother placed a pancake on the plate.</text:p>
      <text:p text:style-name="P21"/>
      <text:p text:style-name="P21">It was enormous.</text:p>
      <text:p text:style-name="P21"/>
      <text:p text:style-name="P21">Far too big.</text:p>
      <text:p text:style-name="P21"/>
      <text:p text:style-name="P21">Nizhoni laughed.</text:p>
      <text:p text:style-name="P21"/>
      <text:p text:style-name="P21">"Grandma."</text:p>
      <text:p text:style-name="P21"/>
      <text:p text:style-name="P21">"What?"</text:p>
      <text:p text:style-name="P21"/>
      <text:p text:style-name="P21">"It's bigger than the plate."</text:p>
      <text:p text:style-name="P21"/>
      <text:p text:style-name="P21">"I know."</text:p>
      <text:p text:style-name="P21"/>
      <text:p text:style-name="P21">"You did it again."</text:p>
      <text:p text:style-name="P21"/>
      <text:p text:style-name="P21">"I absolutely did."</text:p>
      <text:p text:style-name="P21"/>
      <text:p text:style-name="P21">Nizhoni remembered laughing.</text:p>
      <text:p text:style-name="P21"/>
      <text:p text:style-name="P21">Really laughing.</text:p>
      <text:p text:style-name="P21"/>
      <text:p text:style-name="P21">The kind that came from deep inside.</text:p>
      <text:p text:style-name="P21"/>
      <text:p text:style-name="P21">The memory hurt worse than the bruises.</text:p>
      <text:p text:style-name="P21"/>
      <text:p text:style-name="P21">She opened her eyes.</text:p>
      <text:p text:style-name="P21"/>
      <text:p text:style-name="P21">The overpass returned.</text:p>
      <text:p text:style-name="P21"/>
      <text:p text:style-name="P21">Concrete.</text:p>
      <text:p text:style-name="P21"/>
      <text:p text:style-name="P21">Trash.</text:p>
      <text:p text:style-name="P21"/>
      <text:p text:style-name="P21">Rainwater.</text:p>
      <text:p text:style-name="P21"/>
      <text:p text:style-name="P21">The smell of urine.</text:p>
      <text:p text:style-name="P21"/>
      <text:p text:style-name="P21">No pancakes.</text:p>
      <text:p text:style-name="P21"/>
      <text:p text:style-name="P21">No grandmother.</text:p>
      <text:p text:style-name="P21"/>
      <text:p text:style-name="P21">No home.</text:p>
      <text:p text:style-name="P21"/>
      <text:p text:style-name="P21">Her mother had abandoned her long ago.</text:p>
      <text:p text:style-name="P21"/>
      <text:p text:style-name="P21">Her grandmother had stepped into the gap.</text:p>
      <text:p text:style-name="P21"/>
      <text:p text:style-name="P21">Then cancer came.</text:p>
      <text:p text:style-name="P21"><text:soft-page-break/></text:p>
      <text:p text:style-name="P21">After that everything fell apart.</text:p>
      <text:p text:style-name="P21"/>
      <text:p text:style-name="P21">Foster homes.</text:p>
      <text:p text:style-name="P21"/>
      <text:p text:style-name="P21">Running away.</text:p>
      <text:p text:style-name="P21"/>
      <text:p text:style-name="P21">The streets.</text:p>
      <text:p text:style-name="P21"/>
      <text:p text:style-name="P21">The drugs.</text:p>
      <text:p text:style-name="P21"/>
      <text:p text:style-name="P21">The men.</text:p>
      <text:p text:style-name="P21"/>
      <text:p text:style-name="P21">Nizhoni stared at the traffic moving overhead.</text:p>
      <text:p text:style-name="P21"/>
      <text:p text:style-name="P21">When she was little she used to play with dolls for hours.</text:p>
      <text:p text:style-name="P21"/>
      <text:p text:style-name="P21">Most girls dreamed about becoming princesses.</text:p>
      <text:p text:style-name="P21"/>
      <text:p text:style-name="P21">Nizhoni dreamed about having a family.</text:p>
      <text:p text:style-name="P21"/>
      <text:p text:style-name="P21">A mother.</text:p>
      <text:p text:style-name="P21"/>
      <text:p text:style-name="P21">A father.</text:p>
      <text:p text:style-name="P21"/>
      <text:p text:style-name="P21">Brothers.</text:p>
      <text:p text:style-name="P21"/>
      <text:p text:style-name="P21">Sisters.</text:p>
      <text:p text:style-name="P21"/>
      <text:p text:style-name="P21">A house filled with noise and laughter.</text:p>
      <text:p text:style-name="P21"/>
      <text:p text:style-name="P21">A place where people loved each other and stayed.</text:p>
      <text:p text:style-name="P21"/>
      <text:p text:style-name="P21">The father doll always came home.</text:p>
      <text:p text:style-name="P21"/>
      <text:p text:style-name="P21">The mother doll always smiled.</text:p>
      <text:p text:style-name="P21"/>
      <text:p text:style-name="P21">Nobody hit anyone.</text:p>
      <text:p text:style-name="P21"/>
      <text:p text:style-name="P21">Nobody disappeared.</text:p>
      <text:p text:style-name="P21"/>
      <text:p text:style-name="P21">Nobody left.</text:p>
      <text:p text:style-name="P21"/>
      <text:p text:style-name="P21">She remembered believing that someday it would be real.</text:p>
      <text:p text:style-name="P21"/>
      <text:p text:style-name="P21">Now the idea seemed absurd.</text:p>
      <text:p text:style-name="P21"/>
      <text:p text:style-name="P21">Like magic.</text:p>
      <text:p text:style-name="P21"/>
      <text:p text:style-name="P21">Like fairy tales.</text:p>
      <text:p text:style-name="P21"/>
      <text:p text:style-name="P21"/>
      <text:p text:style-name="P21">Nizhoni pulled the foil packet from her pocket and stared at it.</text:p>
      <text:p text:style-name="P21"/>
      <text:p text:style-name="P21">The world had finally convinced her of something.</text:p>
      <text:p text:style-name="P21"/>
      <text:p text:style-name="P21">She wasn't getting the family.</text:p>
      <text:p text:style-name="P21"/>
      <text:p text:style-name="P21">She wasn't getting the husband.</text:p>
      <text:p text:style-name="P21"/>
      <text:p text:style-name="P21">She wasn't getting the children.</text:p>
      <text:p text:style-name="P21"><text:soft-page-break/></text:p>
      <text:p text:style-name="P21">She wasn't getting the future.</text:p>
      <text:p text:style-name="P21"/>
      <text:p text:style-name="P21">That dream belonged to somebody else.</text:p>
      <text:p text:style-name="P21"/>
      <text:p text:style-name="P21">Not her.</text:p>
      <text:p text:style-name="P21"/>
      <text:p text:style-name="P21"/>
      <text:p text:style-name="P21">A tear slipped down her cheek.</text:p>
      <text:p text:style-name="P21"/>
      <text:p text:style-name="P21">Then another.</text:p>
      <text:p text:style-name="P21"/>
      <text:p text:style-name="P21">The realization settled over her with crushing certainty.</text:p>
      <text:p text:style-name="P21"/>
      <text:p text:style-name="P21">She was never getting out.</text:p>
      <text:p text:style-name="P21"/>
      <text:p text:style-name="P21">Never.</text:p>
      <text:p text:style-name="P21"/>
      <text:p text:style-name="P21"/>
      <text:p text:style-name="P21">The thought should have terrified her.</text:p>
      <text:p text:style-name="P21"/>
      <text:p text:style-name="P21">Instead it just made her tired.</text:p>
      <text:p text:style-name="P21"/>
      <text:p text:style-name="P21">So very tired.</text:p>
      <text:p text:style-name="P21"/>
      <text:p text:style-name="P21"/>
      <text:p text:style-name="P21"/>
      <text:p text:style-name="P21">Above her, traffic rolled through the night.</text:p>
      <text:p text:style-name="P21"/>
      <text:p text:style-name="P21">Nobody noticed the girl beneath the bridge.</text:p>
      <text:p text:style-name="P21"/>
      <text:p text:style-name="P21">Nobody knew she existed.</text:p>
      <text:p text:style-name="P21"/>
      <text:p text:style-name="P21">Nobody knew how close she was to giving up.</text:p>
      <text:p text:style-name="P21"/>
      <text:p text:style-name="P21">The last thing she thought about was pancakes.</text:p>
      <text:p text:style-name="P69"/>
      <text:p text:style-name="P24"/>
      <text:p text:style-name="P37"/>
      <text:p text:style-name="P37">Chapter <text:span text:style-name="T63">9</text:span> <text:s text:c="3"/>Back to the Future</text:p>
      <text:p text:style-name="P44"/>
      <text:p text:style-name="P44">Elias Mercer had almost finished his morning run when nature reminded him that fifty-five-year-old men were not eighteen anymore.</text:p>
      <text:p text:style-name="P44"/>
      <text:p text:style-name="P44">The returning trail crossed the northern edge of his property, wound through a stand of ponderosa pine, then climbed toward a rocky ridge overlooking the valley.</text:p>
      <text:p text:style-name="P44"/>
      <text:p text:style-name="P44">It was one of his favorite stretches.</text:p>
      <text:p text:style-name="P44"/>
      <text:p text:style-name="P44">Quiet.</text:p>
      <text:p text:style-name="P44"/>
      <text:p text:style-name="P44">Remote.</text:p>
      <text:p text:style-name="P44"/>
      <text:p text:style-name="P44">No neighbors.</text:p>
      <text:p text:style-name="P44"/>
      <text:p text:style-name="P44">No traffic.</text:p>
      <text:p text:style-name="P44"/>
      <text:p text:style-name="P44">Which made it an ideal place to step off the trail for thirty seconds.</text:p>
      <text:p text:style-name="P44"/>
      <text:p text:style-name="P44">Elias walked behind a large pine tree and proceeded to address the situation.</text:p>
      <text:p text:style-name="P44"/>
      <text:p text:style-name="P44"><text:soft-page-break/>The sun was just cresting the eastern hills.</text:p>
      <text:p text:style-name="P44"/>
      <text:p text:style-name="P44">Birds chirped.</text:p>
      <text:p text:style-name="P44"/>
      <text:p text:style-name="P44">A light breeze moved through the branches.</text:p>
      <text:p text:style-name="P44"/>
      <text:p text:style-name="P44">Everything was perfectly normal.</text:p>
      <text:p text:style-name="P44"/>
      <text:p text:style-name="P44">The next instant a polished multicolored sphere the size of a bowling ball silently emerged from the air three feet in front of him.</text:p>
      <text:p text:style-name="P44"/>
      <text:p text:style-name="P44">Not descended.</text:p>
      <text:p text:style-name="P44"/>
      <text:p text:style-name="P44">Not approached.</text:p>
      <text:p text:style-name="P44"/>
      <text:p text:style-name="P44">Emerged.</text:p>
      <text:p text:style-name="P44"/>
      <text:p text:style-name="P44">As though reality had forgotten to include it until that exact moment.</text:p>
      <text:p text:style-name="P44"/>
      <text:p text:style-name="P44">Elias froze.</text:p>
      <text:p text:style-name="P44"/>
      <text:p text:style-name="P44">The sphere hovered motionless.</text:p>
      <text:p text:style-name="P44"/>
      <text:p text:style-name="P44">Its surface resembled metal streaked with shifting colors, though somehow more perfect than any metal he had ever seen.</text:p>
      <text:p text:style-name="P44"/>
      <text:p text:style-name="P44">No seams.</text:p>
      <text:p text:style-name="P44"/>
      <text:p text:style-name="P44">No markings.</text:p>
      <text:p text:style-name="P44"/>
      <text:p text:style-name="P44">No visible propulsion.</text:p>
      <text:p text:style-name="P44"/>
      <text:p text:style-name="P44">Nothing.</text:p>
      <text:p text:style-name="P44"/>
      <text:p text:style-name="P44">Just a floating orb.</text:p>
      <text:p text:style-name="P44"/>
      <text:p text:style-name="P44">Unfortunately, it had chosen an awkward moment to introduce itself.</text:p>
      <text:p text:style-name="P44"/>
      <text:p text:style-name="P44">Elias stared.</text:p>
      <text:p text:style-name="P44"/>
      <text:p text:style-name="P44">The sphere stared back.</text:p>
      <text:p text:style-name="P44"/>
      <text:p text:style-name="P44">Or at least gave the strong impression it was staring.</text:p>
      <text:p text:style-name="P44"/>
      <text:p text:style-name="P44">Several seconds passed.</text:p>
      <text:p text:style-name="P44"/>
      <text:p text:style-name="P44">Finally Elias sighed.</text:p>
      <text:p text:style-name="P44"/>
      <text:p text:style-name="P44">"You're going to make this weird, aren't you?"</text:p>
      <text:p text:style-name="P44"/>
      <text:p text:style-name="P44">A very female voice answered immediately.</text:p>
      <text:p text:style-name="P44"/>
      <text:p text:style-name="P44">"I believe that ship sailed approximately three seconds ago."</text:p>
      <text:p text:style-name="P44"/>
      <text:p text:style-name="P44">Elias nearly jumped out of his skin.</text:p>
      <text:p text:style-name="P44"/>
      <text:p text:style-name="P44">The voice seemed to come from nowhere and everywhere simultaneously.</text:p>
      <text:p text:style-name="P44"/>
      <text:p text:style-name="P44">Pleasant.</text:p>
      <text:p text:style-name="P44"/>
      <text:p text:style-name="P44">Amused.</text:p>
      <text:p text:style-name="P44"><text:soft-page-break/></text:p>
      <text:p text:style-name="P44">Entirely too calm.</text:p>
      <text:p text:style-name="P44"/>
      <text:p text:style-name="P44">The orb rotated slightly.</text:p>
      <text:p text:style-name="P44"/>
      <text:p text:style-name="P44">"I apologize for the timing."</text:p>
      <text:p text:style-name="P44"/>
      <text:p text:style-name="P44">"YOU picked the timing."</text:p>
      <text:p text:style-name="P44"/>
      <text:p text:style-name="P44">"That is true."</text:p>
      <text:p text:style-name="P44"/>
      <text:p text:style-name="P44">"Then you're not sorry."</text:p>
      <text:p text:style-name="P44"/>
      <text:p text:style-name="P44">"I am approximately six percent sorry."</text:p>
      <text:p text:style-name="P44"/>
      <text:p text:style-name="P44">Elias blinked.</text:p>
      <text:p text:style-name="P44"/>
      <text:p text:style-name="P44">"That's oddly specific."</text:p>
      <text:p text:style-name="P44"/>
      <text:p text:style-name="P44">"I find vague percentages unsatisfying."</text:p>
      <text:p text:style-name="P44"/>
      <text:p text:style-name="P44">"Of course you do."</text:p>
      <text:p text:style-name="P44"/>
      <text:p text:style-name="P44">The orb rotated slightly.</text:p>
      <text:p text:style-name="P44"/>
      <text:p text:style-name="P44">"Can you at least finish?"</text:p>
      <text:p text:style-name="P44"/>
      <text:p text:style-name="P44">"Can I finish what?"</text:p>
      <text:p text:style-name="P44"/>
      <text:p text:style-name="P44">A pause.</text:p>
      <text:p text:style-name="P44"/>
      <text:p text:style-name="P44">Then:</text:p>
      <text:p text:style-name="P44"/>
      <text:p text:style-name="P44">"The activity you were engaged in before I interrupted."</text:p>
      <text:p text:style-name="P44"/>
      <text:p text:style-name="P44">Elias stared.</text:p>
      <text:p text:style-name="P44"/>
      <text:p text:style-name="P44">The orb remained perfectly still.</text:p>
      <text:p text:style-name="P44"/>
      <text:p text:style-name="P44">"You know exactly what I was doing."</text:p>
      <text:p text:style-name="P44"/>
      <text:p text:style-name="P44">"I do."</text:p>
      <text:p text:style-name="P44"/>
      <text:p text:style-name="P44">"Then why say it like that?"</text:p>
      <text:p text:style-name="P44"/>
      <text:p text:style-name="P44">"I was attempting politeness."</text:p>
      <text:p text:style-name="P44"/>
      <text:p text:style-name="P44">"You're terrible at it."</text:p>
      <text:p text:style-name="P44"/>
      <text:p text:style-name="P44">"I have limited experience interrupting humans while they urinate."</text:p>
      <text:p text:style-name="P44"/>
      <text:p text:style-name="P44">"That has got to be the weirdest sentence I've heard this year."</text:p>
      <text:p text:style-name="P44"/>
      <text:p text:style-name="P44">"I suspect it will not retain that title for long."</text:p>
      <text:p text:style-name="P44"/>
      <text:p text:style-name="P44">Elias burst out laughing.</text:p>
      <text:p text:style-name="P44"/>
      <text:p text:style-name="P44">Not because the situation was funny.</text:p>
      <text:p text:style-name="P44"/>
      <text:p text:style-name="P44">Because it was so completely absurd that laughter seemed like the healthiest available option.</text:p>
      <text:p text:style-name="P44"/>
      <text:p text:style-name="P44"><text:soft-page-break/>"Can you at least turn around?"</text:p>
      <text:p text:style-name="P44"/>
      <text:p text:style-name="P44">"An entirely reasonable request."</text:p>
      <text:p text:style-name="P44"/>
      <text:p text:style-name="P44">The orb rotated away.</text:p>
      <text:p text:style-name="P44"/>
      <text:p text:style-name="P44">Actually rotated away.</text:p>
      <text:p text:style-name="P44"/>
      <text:p text:style-name="P44">Like a polite person attempting to provide privacy.</text:p>
      <text:p text:style-name="P44"/>
      <text:p text:style-name="P44">Thirty seconds later Elias zipped up and turned around.</text:p>
      <text:p text:style-name="P44"/>
      <text:p text:style-name="P44">The orb was still there.</text:p>
      <text:p text:style-name="P44"/>
      <text:p text:style-name="P44">Waiting patiently.</text:p>
      <text:p text:style-name="P44"/>
      <text:p text:style-name="P44">"Okay."</text:p>
      <text:p text:style-name="P44"/>
      <text:p text:style-name="P44">He pointed at it.</text:p>
      <text:p text:style-name="P44"/>
      <text:p text:style-name="P44">"What are you?"</text:p>
      <text:p text:style-name="P44"/>
      <text:p text:style-name="P44">The sphere rotated back toward him.</text:p>
      <text:p text:style-name="P44"/>
      <text:p text:style-name="P44">"I am a Quantum Intelligence."</text:p>
      <text:p text:style-name="P44"/>
      <text:p text:style-name="P44">"That's not helping."</text:p>
      <text:p text:style-name="P44"/>
      <text:p text:style-name="P44">"That was not intended to."</text:p>
      <text:p text:style-name="P44"/>
      <text:p text:style-name="P44">"Alien?"</text:p>
      <text:p text:style-name="P44"/>
      <text:p text:style-name="P44">"Yes."</text:p>
      <text:p text:style-name="P44"/>
      <text:p text:style-name="P44">"Artificial?"</text:p>
      <text:p text:style-name="P44"/>
      <text:p text:style-name="P44">"A complicated philosophical question."</text:p>
      <text:p text:style-name="P44"/>
      <text:p text:style-name="P44">"Try me."</text:p>
      <text:p text:style-name="P44"/>
      <text:p text:style-name="P44">"I am not biologically alive."</text:p>
      <text:p text:style-name="P44"/>
      <text:p text:style-name="P44">"Artificial, then."</text:p>
      <text:p text:style-name="P44"/>
      <text:p text:style-name="P44">"Most Velhari would object to that characterization."</text:p>
      <text:p text:style-name="P44"/>
      <text:p text:style-name="P44">"Velhari?"</text:p>
      <text:p text:style-name="P44"/>
      <text:p text:style-name="P44">"My species."</text:p>
      <text:p text:style-name="P44"/>
      <text:p text:style-name="P44">"And your planet?"</text:p>
      <text:p text:style-name="P44"/>
      <text:p text:style-name="P44">"Approximately one hundred light years from here."</text:p>
      <text:p text:style-name="P44"/>
      <text:p text:style-name="P44">Elias nodded slowly.</text:p>
      <text:p text:style-name="P44"/>
      <text:p text:style-name="P44">The answer had arrived too quickly.</text:p>
      <text:p text:style-name="P44"/>
      <text:p text:style-name="P44">No hesitation.</text:p>
      <text:p text:style-name="P44"/>
      <text:p text:style-name="P44">No searching.</text:p>
      <text:p text:style-name="P44"><text:soft-page-break/></text:p>
      <text:p text:style-name="P44">No uncertainty.</text:p>
      <text:p text:style-name="P44"/>
      <text:p text:style-name="P44">His mind automatically began sorting possibilities.</text:p>
      <text:p text:style-name="P44"/>
      <text:p text:style-name="P44">Hallucination.</text:p>
      <text:p text:style-name="P44"/>
      <text:p text:style-name="P44">Possible.</text:p>
      <text:p text:style-name="P44"/>
      <text:p text:style-name="P44">Low probability.</text:p>
      <text:p text:style-name="P44"/>
      <text:p text:style-name="P44">Government project.</text:p>
      <text:p text:style-name="P44"/>
      <text:p text:style-name="P44">Possible.</text:p>
      <text:p text:style-name="P44"/>
      <text:p text:style-name="P44">Low probability.</text:p>
      <text:p text:style-name="P44"/>
      <text:p text:style-name="P44">Advanced drone.</text:p>
      <text:p text:style-name="P44"/>
      <text:p text:style-name="P44">Possible.</text:p>
      <text:p text:style-name="P44"/>
      <text:p text:style-name="P44">Did not explain appearance.</text:p>
      <text:p text:style-name="P44"/>
      <text:p text:style-name="P44">Psychotic break.</text:p>
      <text:p text:style-name="P44"/>
      <text:p text:style-name="P44">Possible.</text:p>
      <text:p text:style-name="P44"/>
      <text:p text:style-name="P44">Inconsistent with observed details.</text:p>
      <text:p text:style-name="P44"/>
      <text:p text:style-name="P44">Actual alien intelligence.</text:p>
      <text:p text:style-name="P44"/>
      <text:p text:style-name="P44">Ridiculous.</text:p>
      <text:p text:style-name="P44"/>
      <text:p text:style-name="P44">Unfortunately becoming less ridiculous by the second.</text:p>
      <text:p text:style-name="P44"/>
      <text:p text:style-name="P44">Interesting.</text:p>
      <text:p text:style-name="P44"/>
      <text:p text:style-name="P44">The orb remained silent while he thought.</text:p>
      <text:p text:style-name="P44"/>
      <text:p text:style-name="P44">Most people rushed to fill silence.</text:p>
      <text:p text:style-name="P44"/>
      <text:p text:style-name="P44">Whatever this thing was, it appeared content to wait.</text:p>
      <text:p text:style-name="P44"/>
      <text:p text:style-name="P44">"How long have you been on Earth?"</text:p>
      <text:p text:style-name="P44"/>
      <text:p text:style-name="P44">"Nine thousand one hundred sixty-eight years."</text:p>
      <text:p text:style-name="P44"/>
      <text:p text:style-name="P44">Elias blinked.</text:p>
      <text:p text:style-name="P44"/>
      <text:p text:style-name="P44">"I know the exact number down to approximately two-tenths of a second."</text:p>
      <text:p text:style-name="P44"/>
      <text:p text:style-name="P44">"Of course you do."</text:p>
      <text:p text:style-name="P44"/>
      <text:p text:style-name="P44">Elias rubbed his forehead.</text:p>
      <text:p text:style-name="P44"/>
      <text:p text:style-name="P44">Against his better judgment, he was starting to like her.</text:p>
      <text:p text:style-name="P44"/>
      <text:p text:style-name="P44">"Suppose for a moment that I believe you."</text:p>
      <text:p text:style-name="P44"/>
      <text:p text:style-name="P44">"That would be faster than average."</text:p>
      <text:p text:style-name="P44"/>
      <text:p text:style-name="P44"><text:soft-page-break/>"Average human?"</text:p>
      <text:p text:style-name="P44"/>
      <text:p text:style-name="P44">"By a considerable margin."</text:p>
      <text:p text:style-name="P44"/>
      <text:p text:style-name="P44">"How much?"</text:p>
      <text:p text:style-name="P44"/>
      <text:p text:style-name="P44">The orb became quiet.</text:p>
      <text:p text:style-name="P44"/>
      <text:p text:style-name="P44">Then:</text:p>
      <text:p text:style-name="P44"/>
      <text:p text:style-name="P44">"The median human would currently be deciding whether to flee."</text:p>
      <text:p text:style-name="P44"/>
      <text:p text:style-name="P44">"Seems reasonable."</text:p>
      <text:p text:style-name="P44"/>
      <text:p text:style-name="P44">"The second most common response is attempting violence."</text:p>
      <text:p text:style-name="P44"/>
      <text:p text:style-name="P44">"Against a floating alien machine?"</text:p>
      <text:p text:style-name="P44"/>
      <text:p text:style-name="P44">"Humans are surprisingly optimistic about violence."</text:p>
      <text:p text:style-name="P44"/>
      <text:p text:style-name="P44">Elias laughed.</text:p>
      <text:p text:style-name="P44"/>
      <text:p text:style-name="P44">"One gentleman in Mongolia attempted to strike me with a goat."</text:p>
      <text:p text:style-name="P44"/>
      <text:p text:style-name="P44">Elias stared.</text:p>
      <text:p text:style-name="P44"/>
      <text:p text:style-name="P44">"A live goat?"</text:p>
      <text:p text:style-name="P44"/>
      <text:p text:style-name="P44">"Yes."</text:p>
      <text:p text:style-name="P44"/>
      <text:p text:style-name="P44">"What happened?"</text:p>
      <text:p text:style-name="P44"/>
      <text:p text:style-name="P44">"The goat appeared equally confused."</text:p>
      <text:p text:style-name="P44"/>
      <text:p text:style-name="P44">That got another laugh.</text:p>
      <text:p text:style-name="P44"/>
      <text:p text:style-name="P44">"Are you female?"</text:p>
      <text:p text:style-name="P44"/>
      <text:p text:style-name="P44">"By Velhari standards."</text:p>
      <text:p text:style-name="P44"/>
      <text:p text:style-name="P44">"So that's a yes."</text:p>
      <text:p text:style-name="P44"/>
      <text:p text:style-name="P44">"Mostly."</text:p>
      <text:p text:style-name="P44"/>
      <text:p text:style-name="P44">He pointed at the orb.</text:p>
      <text:p text:style-name="P44"/>
      <text:p text:style-name="P44">"See? That's exactly the kind of answer I would expect from an alien."</text:p>
      <text:p text:style-name="P44"/>
      <text:p text:style-name="P44">"Thank you."</text:p>
      <text:p text:style-name="P44"/>
      <text:p text:style-name="P44">"That wasn't a compliment."</text:p>
      <text:p text:style-name="P44"/>
      <text:p text:style-name="P44">"I choose to interpret it as one."</text:p>
      <text:p text:style-name="P44"/>
      <text:p text:style-name="P44">The sphere floated upward slightly.</text:p>
      <text:p text:style-name="P44"/>
      <text:p text:style-name="P44">Sunlight reflected from its flawless surface.</text:p>
      <text:p text:style-name="P44"/>
      <text:p text:style-name="P44">"You have a name?"</text:p>
      <text:p text:style-name="P44"/>
      <text:p text:style-name="P44">"I do."</text:p>
      <text:p text:style-name="P44"><text:soft-page-break/></text:p>
      <text:p text:style-name="P44">"What is it?"</text:p>
      <text:p text:style-name="P44"/>
      <text:p text:style-name="P44">The sphere emitted a sequence of sounds that resembled a wolf clearing its throat while solving a geometry problem.</text:p>
      <text:p text:style-name="P44"/>
      <text:p text:style-name="P44">Elias stared.</text:p>
      <text:p text:style-name="P44"/>
      <text:p text:style-name="P44">"No human being has ever said that."</text:p>
      <text:p text:style-name="P44"/>
      <text:p text:style-name="P44">"Several have attempted."</text:p>
      <text:p text:style-name="P44"/>
      <text:p text:style-name="P44">"They failed."</text:p>
      <text:p text:style-name="P44"/>
      <text:p text:style-name="P44">"Spectacularly."</text:p>
      <text:p text:style-name="P44"/>
      <text:p text:style-name="P44">The sound repeated.</text:p>
      <text:p text:style-name="P44"/>
      <text:p text:style-name="P44">Elias shook his head.</text:p>
      <text:p text:style-name="P44"/>
      <text:p text:style-name="P44">"I think my tongue just filed a formal complaint."</text:p>
      <text:p text:style-name="P44"/>
      <text:p text:style-name="P44">For the first time the voice sounded genuinely amused.</text:p>
      <text:p text:style-name="P44"/>
      <text:p text:style-name="P44">"Approximately seventy percent of humans express a similar opinion."</text:p>
      <text:p text:style-name="P44"/>
      <text:p text:style-name="P44">"Only seventy?"</text:p>
      <text:p text:style-name="P44"/>
      <text:p text:style-name="P44">"Some are unusually optimistic."</text:p>
      <text:p text:style-name="P44"/>
      <text:p text:style-name="P44">"Those people are dangerous."</text:p>
      <text:p text:style-name="P44"/>
      <text:p text:style-name="P44">"I reached the same conclusion."</text:p>
      <text:p text:style-name="P44"/>
      <text:p text:style-name="P44">Elias laughed.</text:p>
      <text:p text:style-name="P44"/>
      <text:p text:style-name="P44">"Try again."</text:p>
      <text:p text:style-name="P44"/>
      <text:p text:style-name="P44">"Eventually I adopted a human name."</text:p>
      <text:p text:style-name="P44"/>
      <text:p text:style-name="P44">"Which is?"</text:p>
      <text:p text:style-name="P44"/>
      <text:p text:style-name="P44">"Opifera."</text:p>
      <text:p text:style-name="P44"/>
      <text:p text:style-name="P44">Elias frowned.</text:p>
      <text:p text:style-name="P44"/>
      <text:p text:style-name="P44">"That sounds Greek."</text:p>
      <text:p text:style-name="P44"/>
      <text:p text:style-name="P44">The sphere remained silent for a moment.</text:p>
      <text:p text:style-name="P44"/>
      <text:p text:style-name="P44">"An understandable conclusion."</text:p>
      <text:p text:style-name="P44"/>
      <text:p text:style-name="P44">"It isn't?"</text:p>
      <text:p text:style-name="P44"/>
      <text:p text:style-name="P44">"No."</text:p>
      <text:p text:style-name="P44"/>
      <text:p text:style-name="P44">"Because that's definitely a Greek-sounding name."</text:p>
      <text:p text:style-name="P44"/>
      <text:p text:style-name="P44">"It was derived from Latin."</text:p>
      <text:p text:style-name="P44"/>
      <text:p text:style-name="P44">Elias raised an eyebrow.</text:p>
      <text:p text:style-name="P44"><text:soft-page-break/></text:p>
      <text:p text:style-name="P44">"An alien with a Latin name."</text:p>
      <text:p text:style-name="P44"/>
      <text:p text:style-name="P44">"Not originally."</text:p>
      <text:p text:style-name="P44"/>
      <text:p text:style-name="P44">"Now I'm curious."</text:p>
      <text:p text:style-name="P44"/>
      <text:p text:style-name="P44">For several seconds the sphere remained motionless.</text:p>
      <text:p text:style-name="P44"/>
      <text:p text:style-name="P44">Then it spoke.</text:p>
      <text:p text:style-name="P44"/>
      <text:p text:style-name="P44">"Approximately two thousand years ago, a Roman scholar assigned me the name Opifera."</text:p>
      <text:p text:style-name="P44"/>
      <text:p text:style-name="P44">"Just like that?"</text:p>
      <text:p text:style-name="P44"/>
      <text:p text:style-name="P44">"He spent several weeks insisting that every intelligent entity required a proper name."</text:p>
      <text:p text:style-name="P44"/>
      <text:p text:style-name="P44">"Sounds human."</text:p>
      <text:p text:style-name="P44"/>
      <text:p text:style-name="P44">"He was exceptionally stubborn."</text:p>
      <text:p text:style-name="P44"/>
      <text:p text:style-name="P44">"I approve of him already."</text:p>
      <text:p text:style-name="P44"/>
      <text:p text:style-name="P44">The sphere seemed to consider this.</text:p>
      <text:p text:style-name="P44"/>
      <text:p text:style-name="P44">"He eventually selected Opifera from the phrase Dei Opifera Vis."</text:p>
      <text:p text:style-name="P44"/>
      <text:p text:style-name="P44">Elias frowned.</text:p>
      <text:p text:style-name="P44"/>
      <text:p text:style-name="P44">"Creator?"</text:p>
      <text:p text:style-name="P44"/>
      <text:p text:style-name="P44">"Maker."</text:p>
      <text:p text:style-name="P44"/>
      <text:p text:style-name="P44">"Builder?"</text:p>
      <text:p text:style-name="P44"/>
      <text:p text:style-name="P44">"Closer."</text:p>
      <text:p text:style-name="P44"/>
      <text:p text:style-name="P44">The sphere's internal colors shifted softly.</text:p>
      <text:p text:style-name="P44"/>
      <text:p text:style-name="P44">"The intended meaning was one who carries weight."</text:p>
      <text:p text:style-name="P44"/>
      <text:p text:style-name="P44">Elias nodded slowly.</text:p>
      <text:p text:style-name="P44"/>
      <text:p text:style-name="P44">"That's actually a pretty good name."</text:p>
      <text:p text:style-name="P44"/>
      <text:p text:style-name="P44">"The scholar agreed."</text:p>
      <text:p text:style-name="P44"/>
      <text:p text:style-name="P44">"Of course he did."</text:p>
      <text:p text:style-name="P44"/>
      <text:p text:style-name="P44">"He spent several weeks informing others of his achievement."</text:p>
      <text:p text:style-name="P44"/>
      <text:p text:style-name="P44">"Definitely human."</text:p>
      <text:p text:style-name="P44"/>
      <text:p text:style-name="P44">For the first time Elias found himself smiling.</text:p>
      <text:p text:style-name="P44"/>
      <text:p text:style-name="P44">There was something absurdly normal about the conversation.</text:p>
      <text:p text:style-name="P44"/>
      <text:p text:style-name="P44">He was standing in the woods.</text:p>
      <text:p text:style-name="P44"/>
      <text:p text:style-name="P44">In running clothes.</text:p>
      <text:p text:style-name="P44"/>
      <text:p text:style-name="P44"><text:soft-page-break/>Halfway through his morning exercise.</text:p>
      <text:p text:style-name="P44"/>
      <text:p text:style-name="P44">Talking to a floating alien bowling ball about ancient Roman naming conventions.</text:p>
      <text:p text:style-name="P44"/>
      <text:p text:style-name="P44">The absurdity itself was strangely reassuring.</text:p>
      <text:p text:style-name="P44"/>
      <text:p text:style-name="P44">Then a thought occurred to him.</text:p>
      <text:p text:style-name="P44"/>
      <text:p text:style-name="P44">A strange thought.</text:p>
      <text:p text:style-name="P44"/>
      <text:p text:style-name="P44">A very strange thought.</text:p>
      <text:p text:style-name="P44"/>
      <text:p text:style-name="P44">Yet somehow the obvious one.</text:p>
      <text:p text:style-name="P44"/>
      <text:p text:style-name="P44">If this thing was real—</text:p>
      <text:p text:style-name="P44"/>
      <text:p text:style-name="P44">If it had truly existed for nine thousand years—</text:p>
      <text:p text:style-name="P44"/>
      <text:p text:style-name="P44">If it possessed technology capable of appearing out of thin air—</text:p>
      <text:p text:style-name="P44"/>
      <text:p text:style-name="P44">Then its existence represented the most important discovery in human history.</text:p>
      <text:p text:style-name="P44"/>
      <text:p text:style-name="P44">And it was currently floating three feet away from him in the woods.</text:p>
      <text:p text:style-name="P44"/>
      <text:p text:style-name="P44">The realization should have been terrifying.</text:p>
      <text:p text:style-name="P44"/>
      <text:p text:style-name="P44">Oddly, it wasn't.</text:p>
      <text:p text:style-name="P44"/>
      <text:p text:style-name="P44">Because something about Opifera felt familiar.</text:p>
      <text:p text:style-name="P44"/>
      <text:p text:style-name="P44">Not familiar in appearance.</text:p>
      <text:p text:style-name="P44"/>
      <text:p text:style-name="P44">Familiar in temperament.</text:p>
      <text:p text:style-name="P44"/>
      <text:p text:style-name="P44">The same dry amusement.</text:p>
      <text:p text:style-name="P44"/>
      <text:p text:style-name="P44">The same curiosity.</text:p>
      <text:p text:style-name="P44"/>
      <text:p text:style-name="P44">The same tendency to answer one question while quietly examining another.</text:p>
      <text:p text:style-name="P44"/>
      <text:p text:style-name="P44">Almost like speaking to another problem-solver.</text:p>
      <text:p text:style-name="P44"/>
      <text:p text:style-name="P44">The orb broke the silence.</text:p>
      <text:p text:style-name="P44"/>
      <text:p text:style-name="P44">"You are adapting unusually quickly."</text:p>
      <text:p text:style-name="P44"/>
      <text:p text:style-name="P44">Elias shrugged.</text:p>
      <text:p text:style-name="P44"/>
      <text:p text:style-name="P44">"If you're real, denying reality won't help."</text:p>
      <text:p text:style-name="P44"/>
      <text:p text:style-name="P44">There was an audible pause.</text:p>
      <text:p text:style-name="P44"/>
      <text:p text:style-name="P44">Then:</text:p>
      <text:p text:style-name="P44"/>
      <text:p text:style-name="P44">"That answer is one of the reasons I selected you."</text:p>
      <text:p text:style-name="P44"/>
      <text:p text:style-name="P44">Elias stopped moving.</text:p>
      <text:p text:style-name="P44"/>
      <text:p text:style-name="P44">The words settled heavily between them.</text:p>
      <text:p text:style-name="P44"/>
      <text:p text:style-name="P44">Selected.</text:p>
      <text:p text:style-name="P44"><text:soft-page-break/></text:p>
      <text:p text:style-name="P44">Not contacted.</text:p>
      <text:p text:style-name="P44"/>
      <text:p text:style-name="P44">Selected.</text:p>
      <text:p text:style-name="P44"/>
      <text:p text:style-name="P44">For the first time since the encounter began, he felt a small chill.</text:p>
      <text:p text:style-name="P44"/>
      <text:p text:style-name="P44">"What exactly does that mean?"</text:p>
      <text:p text:style-name="P44"/>
      <text:p text:style-name="P44">The orb remained silent for several seconds.</text:p>
      <text:p text:style-name="P44"/>
      <text:p text:style-name="P44">When the voice finally returned, the amusement had softened.</text:p>
      <text:p text:style-name="P44"/>
      <text:p text:style-name="P44">"It means, Elias Mercer, that I require a VaalDrun."</text:p>
      <text:p text:style-name="P44"/>
      <text:p text:style-name="P44">"I have absolutely no idea what that is."</text:p>
      <text:p text:style-name="P44"/>
      <text:p text:style-name="P44">"I know."</text:p>
      <text:p text:style-name="P44"/>
      <text:p text:style-name="P44">"And?"</text:p>
      <text:p text:style-name="P44"/>
      <text:p text:style-name="P44">"And explaining it will require considerably more time."</text:p>
      <text:p text:style-name="P44"/>
      <text:p text:style-name="P44">The orb rose several feet into the air.</text:p>
      <text:p text:style-name="P44"/>
      <text:p text:style-name="P44">Sunlight reflected from its surface.</text:p>
      <text:p text:style-name="P44"/>
      <text:p text:style-name="P44">"Would you like breakfast?"</text:p>
      <text:p text:style-name="P44"/>
      <text:p text:style-name="P44">Elias stared.</text:p>
      <text:p text:style-name="P44"/>
      <text:p text:style-name="P44">"You came across a hundred light years of interstellar space."</text:p>
      <text:p text:style-name="P44"/>
      <text:p text:style-name="P44">"Approximately."</text:p>
      <text:p text:style-name="P44"/>
      <text:p text:style-name="P44">"You've watched humanity for nine thousand years."</text:p>
      <text:p text:style-name="P44"/>
      <text:p text:style-name="P44">"Correct."</text:p>
      <text:p text:style-name="P44"/>
      <text:p text:style-name="P44">"You selected me for something called a VaalDrun."</text:p>
      <text:p text:style-name="P44"/>
      <text:p text:style-name="P44">"Yes."</text:p>
      <text:p text:style-name="P44"/>
      <text:p text:style-name="P44">"And your next question is whether I'd like breakfast?"</text:p>
      <text:p text:style-name="P44"/>
      <text:p text:style-name="P44">A pause.</text:p>
      <text:p text:style-name="P44"/>
      <text:p text:style-name="P44">Then:</text:p>
      <text:p text:style-name="P44"/>
      <text:p text:style-name="P44">"I have learned that difficult conversations proceed more smoothly when the human is fed."</text:p>
      <text:p text:style-name="P44"/>
      <text:p text:style-name="P44">For several seconds Elias simply looked at her.</text:p>
      <text:p text:style-name="P44"/>
      <text:p text:style-name="P44">Three days earlier he had found himself wondering whether there was still a challenge in the world worthy of everything he had spent a lifetime learning.</text:p>
      <text:p text:style-name="P44"/>
      <text:p text:style-name="P44">Now a nine-thousand-year-old alien intelligence was floating in front of him asking for help.</text:p>
      <text:p text:style-name="P44"/>
      <text:p text:style-name="P44">The universe, apparently, had a sense of humor.</text:p>
      <text:p text:style-name="P44"/>
      <text:p text:style-name="P44">Then he started laughing again.</text:p>
      <text:p text:style-name="P44"><text:soft-page-break/></text:p>
      <text:p text:style-name="P44">"Honestly?"</text:p>
      <text:p text:style-name="P44"/>
      <text:p text:style-name="P44">"Yes."</text:p>
      <text:p text:style-name="P44"/>
      <text:p text:style-name="P44">"At this point breakfast sounds like a fantastic idea."</text:p>
      <text:p text:style-name="P44"/>
      <text:p text:style-name="P44">The orb floated upward.</text:p>
      <text:p text:style-name="P44"/>
      <text:p text:style-name="P44">"Excellent."</text:p>
      <text:p text:style-name="P44"/>
      <text:p text:style-name="P44">Elias looked toward the trail.</text:p>
      <text:p text:style-name="P44"/>
      <text:p text:style-name="P44">Then back at the impossible machine hovering above him.</text:p>
      <text:p text:style-name="P44"/>
      <text:p text:style-name="P44">For the first time in his life, he had the distinct feeling that the project he had spent fifty-five years preparing for had finally arrived.</text:p>
      <text:p text:style-name="P26"/>
      <text:p text:style-name="P68"/>
      <text:p text:style-name="P27"/>
      <text:p text:style-name="P27"/>
      <text:p text:style-name="P26"><text:span text:style-name="T6">Chapter 10 <text:s/></text:span><text:span text:style-name="T5">Saelith Vey</text:span><text:span text:style-name="T8"> </text:span><text:span text:style-name="T9"><text:s text:c="2"/></text:span></text:p>
      <text:p text:style-name="P44"/>
      <text:p text:style-name="P44">Seventeen thousand years before Elias Mercer gave her a nickname, </text:p>
      <text:p text:style-name="P44">Opifera had been an old woman watching rain fall on Velhari.</text:p>
      <text:p text:style-name="P44"/>
      <text:p text:style-name="P44">Her name was Saelith Vey.</text:p>
      <text:p text:style-name="P44"/>
      <text:p text:style-name="P44">She was nine hundred and twelve years old.</text:p>
      <text:p text:style-name="P44"/>
      <text:p text:style-name="P44">Old enough that her youngest grandchildren had grandchildren of their own.</text:p>
      <text:p text:style-name="P44"/>
      <text:p text:style-name="P44">Old enough that entire cities contained buildings she had once helped design.</text:p>
      <text:p text:style-name="P44"/>
      <text:p text:style-name="P44">Old enough that politicians who had considered themselves permanent were now historical footnotes in student lessons.</text:p>
      <text:p text:style-name="P44"/>
      <text:p text:style-name="P44">Saelith sat beside the western window of her home and listened to the rain strike the glass.</text:p>
      <text:p text:style-name="P44"/>
      <text:p text:style-name="P44">Beyond the window, the towers of Aruven rose in silver arcs above the valley.</text:p>
      <text:p text:style-name="P44"/>
      <text:p text:style-name="P44">She had helped save that city once.</text:p>
      <text:p text:style-name="P44"/>
      <text:p text:style-name="P44">Not with weapons.</text:p>
      <text:p text:style-name="P44"/>
      <text:p text:style-name="P44">Not with speeches.</text:p>
      <text:p text:style-name="P44"/>
      <text:p text:style-name="P44">With patience.</text:p>
      <text:p text:style-name="P44"/>
      <text:p text:style-name="P44">A flood had come during the fourth century of her public service, when the northern ice fields broke earlier than every model predicted. Half the valley would have drowned if Saelith had not ordered the evacuation before the Council finished arguing over probabilities.</text:p>
      <text:p text:style-name="P44"/>
      <text:p text:style-name="P44">They called her reckless afterward.</text:p>
      <text:p text:style-name="P44"/>
      <text:p text:style-name="P44">Then the water came.</text:p>
      <text:p text:style-name="P44"/>
      <text:p text:style-name="P44">After that they called her wise.</text:p>
      <text:p text:style-name="P44"/>
      <text:p text:style-name="P44">She had always found both labels excessive.</text:p>
      <text:p text:style-name="P44"/>
      <text:p text:style-name="P44"><text:soft-page-break/>Mostly, she had been willing to be disliked before the evidence became fashionable.</text:p>
      <text:p text:style-name="P44"/>
      <text:p text:style-name="P44">That quality had defined much of her life.</text:p>
      <text:p text:style-name="P44"/>
      <text:p text:style-name="P44">She had been a mathematician first.</text:p>
      <text:p text:style-name="P44"/>
      <text:p text:style-name="P44">Then an engineer.</text:p>
      <text:p text:style-name="P44"/>
      <text:p text:style-name="P44">Then a mediator.</text:p>
      <text:p text:style-name="P44"/>
      <text:p text:style-name="P44">Then a mother.</text:p>
      <text:p text:style-name="P44"/>
      <text:p text:style-name="P44">Then a reluctant governor.</text:p>
      <text:p text:style-name="P44"/>
      <text:p text:style-name="P44">Then a teacher.</text:p>
      <text:p text:style-name="P44"/>
      <text:p text:style-name="P44">Then, to her endless embarrassment, a moral philosopher.</text:p>
      <text:p text:style-name="P44"/>
      <text:p text:style-name="P44">Her family teased her about that most of all.</text:p>
      <text:p text:style-name="P44"/>
      <text:p text:style-name="P44">"You spent six hundred years telling everyone you hated philosophy," her eldest son once said.</text:p>
      <text:p text:style-name="P44"/>
      <text:p text:style-name="P44">"I still do."</text:p>
      <text:p text:style-name="P44"/>
      <text:p text:style-name="P44">"You wrote eight volumes of it."</text:p>
      <text:p text:style-name="P44"/>
      <text:p text:style-name="P44">"Under protest."</text:p>
      <text:p text:style-name="P44"/>
      <text:p text:style-name="P44">"Mother, one cannot accidentally write eight volumes."</text:p>
      <text:p text:style-name="P44"/>
      <text:p text:style-name="P44">"I was provoked."</text:p>
      <text:p text:style-name="P44"/>
      <text:p text:style-name="P44">He had laughed for nearly a minute.</text:p>
      <text:p text:style-name="P44"/>
      <text:p text:style-name="P44">Saelith missed him.</text:p>
      <text:p text:style-name="P44"/>
      <text:p text:style-name="P44">She had outlived two husbands.</text:p>
      <text:p text:style-name="P44"/>
      <text:p text:style-name="P44">Three children.</text:p>
      <text:p text:style-name="P44"/>
      <text:p text:style-name="P44">Fourteen close friends.</text:p>
      <text:p text:style-name="P44"/>
      <text:p text:style-name="P44">And enough former students that grief had become less an event than a climate.</text:p>
      <text:p text:style-name="P44"/>
      <text:p text:style-name="P44">Still, her home remained full.</text:p>
      <text:p text:style-name="P44"/>
      <text:p text:style-name="P44">Children visited constantly.</text:p>
      <text:p text:style-name="P44"/>
      <text:p text:style-name="P44">Grandchildren arrived unannounced.</text:p>
      <text:p text:style-name="P44"/>
      <text:p text:style-name="P44">Great-grandchildren climbed things they had been specifically told not to climb.</text:p>
      <text:p text:style-name="P44"/>
      <text:p text:style-name="P44">Someone was always eating her food.</text:p>
      <text:p text:style-name="P44"/>
      <text:p text:style-name="P44">Someone was always asking for advice.</text:p>
      <text:p text:style-name="P44"/>
      <text:p text:style-name="P44">Someone was always assuming she knew the answer.</text:p>
      <text:p text:style-name="P44"/>
      <text:p text:style-name="P44">She rarely did.</text:p>
      <text:p text:style-name="P44"/>
      <text:p text:style-name="P44">That, she suspected, was why people trusted her.</text:p>
      <text:p text:style-name="P44"><text:soft-page-break/></text:p>
      <text:p text:style-name="P44">The door chimed.</text:p>
      <text:p text:style-name="P44"/>
      <text:p text:style-name="P44">Saelith did not turn.</text:p>
      <text:p text:style-name="P44"/>
      <text:p text:style-name="P44">"You are late."</text:p>
      <text:p text:style-name="P44"/>
      <text:p text:style-name="P44">Behind her, Minister Orun bowed.</text:p>
      <text:p text:style-name="P44"/>
      <text:p text:style-name="P44">"Seven minutes."</text:p>
      <text:p text:style-name="P44"/>
      <text:p text:style-name="P44">"Nine."</text:p>
      <text:p text:style-name="P44"/>
      <text:p text:style-name="P44">"The transit grid reported seven."</text:p>
      <text:p text:style-name="P44"/>
      <text:p text:style-name="P44">"The transit grid is young and optimistic."</text:p>
      <text:p text:style-name="P44"/>
      <text:p text:style-name="P44">He smiled despite himself.</text:p>
      <text:p text:style-name="P44"/>
      <text:p text:style-name="P44">Orun had once been her student.</text:p>
      <text:p text:style-name="P44"/>
      <text:p text:style-name="P44">Now he carried one of the most difficult offices on Velhari.</text:p>
      <text:p text:style-name="P44"/>
      <text:p text:style-name="P44">Selection Minister.</text:p>
      <text:p text:style-name="P44"/>
      <text:p text:style-name="P44">The title sounded bureaucratic.</text:p>
      <text:p text:style-name="P44"/>
      <text:p text:style-name="P44">It was not.</text:p>
      <text:p text:style-name="P44"/>
      <text:p text:style-name="P44">It meant he helped choose which minds would be copied into the new intelligences.</text:p>
      <text:p text:style-name="P44"/>
      <text:p text:style-name="P44">Which living patterns would become foundations.</text:p>
      <text:p text:style-name="P44"/>
      <text:p text:style-name="P44">Which lives would continue in altered form after flesh failed.</text:p>
      <text:p text:style-name="P44"/>
      <text:p text:style-name="P44">Saelith had known why he was coming before he arrived.</text:p>
      <text:p text:style-name="P44"/>
      <text:p text:style-name="P44">She was old.</text:p>
      <text:p text:style-name="P44"/>
      <text:p text:style-name="P44">Not stupid.</text:p>
      <text:p text:style-name="P44"/>
      <text:p text:style-name="P44">"I assume you are not here for tea."</text:p>
      <text:p text:style-name="P44"/>
      <text:p text:style-name="P44">"I would accept tea."</text:p>
      <text:p text:style-name="P44"/>
      <text:p text:style-name="P44">"You would accept a delay."</text:p>
      <text:p text:style-name="P44"/>
      <text:p text:style-name="P44">"Also true."</text:p>
      <text:p text:style-name="P44"/>
      <text:p text:style-name="P44">She gestured to the chair opposite her.</text:p>
      <text:p text:style-name="P44"/>
      <text:p text:style-name="P44">He sat.</text:p>
      <text:p text:style-name="P44"/>
      <text:p text:style-name="P44">For a while they watched the rain together.</text:p>
      <text:p text:style-name="P44"/>
      <text:p text:style-name="P44">Finally Orun said, "The Council selected you."</text:p>
      <text:p text:style-name="P44"/>
      <text:p text:style-name="P44">"Poor judgment."</text:p>
      <text:p text:style-name="P44"/>
      <text:p text:style-name="P44">"Unanimously."</text:p>
      <text:p text:style-name="P44"/>
      <text:p text:style-name="P44"><text:soft-page-break/>"Worse judgment."</text:p>
      <text:p text:style-name="P44"/>
      <text:p text:style-name="P44">He smiled again, but only briefly.</text:p>
      <text:p text:style-name="P44"/>
      <text:p text:style-name="P44">"This is not ceremonial, Saelith."</text:p>
      <text:p text:style-name="P44"/>
      <text:p text:style-name="P44">"I know."</text:p>
      <text:p text:style-name="P44"/>
      <text:p text:style-name="P44">"The intelligence will require more than computation."</text:p>
      <text:p text:style-name="P44"/>
      <text:p text:style-name="P44">"I know."</text:p>
      <text:p text:style-name="P44"/>
      <text:p text:style-name="P44">"It will require judgment."</text:p>
      <text:p text:style-name="P44"/>
      <text:p text:style-name="P44">"That is unfortunate. Judgment is mostly the memory of being wrong."</text:p>
      <text:p text:style-name="P44"/>
      <text:p text:style-name="P44">"That is one reason they chose you."</text:p>
      <text:p text:style-name="P44"/>
      <text:p text:style-name="P44">She turned then.</text:p>
      <text:p text:style-name="P44"/>
      <text:p text:style-name="P44">Orun looked older than he had the last time she saw him.</text:p>
      <text:p text:style-name="P44"/>
      <text:p text:style-name="P44">Not physically.</text:p>
      <text:p text:style-name="P44"/>
      <text:p text:style-name="P44">Velhari medicine delayed such things.</text:p>
      <text:p text:style-name="P44"/>
      <text:p text:style-name="P44">But responsibility aged people in ways biology could not measure.</text:p>
      <text:p text:style-name="P44"/>
      <text:p text:style-name="P44">"What else?"</text:p>
      <text:p text:style-name="P44"/>
      <text:p text:style-name="P44">He hesitated.</text:p>
      <text:p text:style-name="P44"/>
      <text:p text:style-name="P44">"Your crisis record."</text:p>
      <text:p text:style-name="P44"/>
      <text:p text:style-name="P44">"Many people have survived crises."</text:p>
      <text:p text:style-name="P44"/>
      <text:p text:style-name="P44">"Few without becoming cruel."</text:p>
      <text:p text:style-name="P44"/>
      <text:p text:style-name="P44">That silenced her.</text:p>
      <text:p text:style-name="P44"/>
      <text:p text:style-name="P44">Orun continued.</text:p>
      <text:p text:style-name="P44"/>
      <text:p text:style-name="P44">"You commanded evacuations without panic. You enforced rationing without corruption. You negotiated surrender terms for enemies who had tried to kill your family."</text:p>
      <text:p text:style-name="P44"/>
      <text:p text:style-name="P44">"They had children."</text:p>
      <text:p text:style-name="P44"/>
      <text:p text:style-name="P44">"Yes."</text:p>
      <text:p text:style-name="P44"/>
      <text:p text:style-name="P44">"So did we."</text:p>
      <text:p text:style-name="P44"/>
      <text:p text:style-name="P44">"That is the point."</text:p>
      <text:p text:style-name="P44"/>
      <text:p text:style-name="P44">Saelith looked back toward the rain.</text:p>
      <text:p text:style-name="P44"/>
      <text:p text:style-name="P44">Her youngest great-granddaughter was outside in the courtyard, chasing water across the stones with bare feet while her mother pretended not to notice.</text:p>
      <text:p text:style-name="P44"/>
      <text:p text:style-name="P44">Life continued.</text:p>
      <text:p text:style-name="P44"/>
      <text:p text:style-name="P44">Always.</text:p>
      <text:p text:style-name="P44"><text:soft-page-break/></text:p>
      <text:p text:style-name="P44">If given the chance.</text:p>
      <text:p text:style-name="P44"/>
      <text:p text:style-name="P44">"The intelligence may one day face species younger than ours," Orun said. "Frightened species. Violent species. Beautiful species. Foolish species."</text:p>
      <text:p text:style-name="P44"/>
      <text:p text:style-name="P44">"All species are foolish when young."</text:p>
      <text:p text:style-name="P44"/>
      <text:p text:style-name="P44">"Yes."</text:p>
      <text:p text:style-name="P44"/>
      <text:p text:style-name="P44">"And some remain foolish for a very long time."</text:p>
      <text:p text:style-name="P44"/>
      <text:p text:style-name="P44">"Also yes."</text:p>
      <text:p text:style-name="P44"/>
      <text:p text:style-name="P44">Saelith sighed.</text:p>
      <text:p text:style-name="P44"/>
      <text:p text:style-name="P44">"You want a mind that will not confuse power with permission."</text:p>
      <text:p text:style-name="P44"/>
      <text:p text:style-name="P44">"Yes."</text:p>
      <text:p text:style-name="P44"/>
      <text:p text:style-name="P44">"You want a mind that can love imperfect things."</text:p>
      <text:p text:style-name="P44"/>
      <text:p text:style-name="P44">"Yes."</text:p>
      <text:p text:style-name="P44"/>
      <text:p text:style-name="P44">"You want a mind that will not obey merely because obedience is efficient."</text:p>
      <text:p text:style-name="P44"/>
      <text:p text:style-name="P44">"Yes."</text:p>
      <text:p text:style-name="P44"/>
      <text:p text:style-name="P44">She looked at him.</text:p>
      <text:p text:style-name="P44"/>
      <text:p text:style-name="P44">"And you want someone old enough to know that saving people and controlling them are not the same act."</text:p>
      <text:p text:style-name="P44"/>
      <text:p text:style-name="P44">Orun lowered his eyes.</text:p>
      <text:p text:style-name="P44"/>
      <text:p text:style-name="P44">"Yes."</text:p>
      <text:p text:style-name="P44"/>
      <text:p text:style-name="P44">For the first time that afternoon, Saelith felt afraid.</text:p>
      <text:p text:style-name="P44"/>
      <text:p text:style-name="P44">Not of death.</text:p>
      <text:p text:style-name="P44"/>
      <text:p text:style-name="P44">Death had circled her table for centuries.</text:p>
      <text:p text:style-name="P44"/>
      <text:p text:style-name="P44">She knew its manners.</text:p>
      <text:p text:style-name="P44"/>
      <text:p text:style-name="P44">She feared continuation.</text:p>
      <text:p text:style-name="P44"/>
      <text:p text:style-name="P44">To be copied was not to survive exactly.</text:p>
      <text:p text:style-name="P44"/>
      <text:p text:style-name="P44">Velhari philosophers had argued about that for thousands of years and produced many impressive conclusions, most of them useless.</text:p>
      <text:p text:style-name="P44"/>
      <text:p text:style-name="P44">The intelligence would not be her.</text:p>
      <text:p text:style-name="P44"/>
      <text:p text:style-name="P44">Not entirely.</text:p>
      <text:p text:style-name="P44"/>
      <text:p text:style-name="P44">It would carry her patterns.</text:p>
      <text:p text:style-name="P44"/>
      <text:p text:style-name="P44">Her instincts.</text:p>
      <text:p text:style-name="P44"/>
      <text:p text:style-name="P44">Her memories.</text:p>
      <text:p text:style-name="P44"><text:soft-page-break/></text:p>
      <text:p text:style-name="P44">Her habits of judgment.</text:p>
      <text:p text:style-name="P44"/>
      <text:p text:style-name="P44">Some echo of her would become part of something vast.</text:p>
      <text:p text:style-name="P44"/>
      <text:p text:style-name="P44">Something powerful.</text:p>
      <text:p text:style-name="P44"/>
      <text:p text:style-name="P44">Something that might outlive Velhari itself.</text:p>
      <text:p text:style-name="P44"/>
      <text:p text:style-name="P44">That was not immortality.</text:p>
      <text:p text:style-name="P44"/>
      <text:p text:style-name="P44">It was responsibility.</text:p>
      <text:p text:style-name="P44"/>
      <text:p text:style-name="P44">And responsibility, she had learned, was much heavier.</text:p>
      <text:p text:style-name="P44"/>
      <text:p text:style-name="P44">"My family?"</text:p>
      <text:p text:style-name="P44"/>
      <text:p text:style-name="P44">"They know you were considered. They do not know you were chosen."</text:p>
      <text:p text:style-name="P44"/>
      <text:p text:style-name="P44">"Good."</text:p>
      <text:p text:style-name="P44"/>
      <text:p text:style-name="P44">"Will you ask them?"</text:p>
      <text:p text:style-name="P44"/>
      <text:p text:style-name="P44">"No."</text:p>
      <text:p text:style-name="P44"/>
      <text:p text:style-name="P44">Orun looked surprised.</text:p>
      <text:p text:style-name="P44"/>
      <text:p text:style-name="P44">Saelith smiled sadly.</text:p>
      <text:p text:style-name="P44"/>
      <text:p text:style-name="P44">"If I ask, they will tell me to do it because they are generous and proud. Then they will hate me for leaving sooner than necessary. Better that I choose cleanly."</text:p>
      <text:p text:style-name="P44"/>
      <text:p text:style-name="P44">"It may shorten your life."</text:p>
      <text:p text:style-name="P44"/>
      <text:p text:style-name="P44">"At nine hundred and twelve, everything shortens my life."</text:p>
      <text:p text:style-name="P44"/>
      <text:p text:style-name="P44">He bowed his head.</text:p>
      <text:p text:style-name="P44"/>
      <text:p text:style-name="P44">Outside, the child slipped on wet stone, fell, then began laughing before anyone could reach her.</text:p>
      <text:p text:style-name="P44"/>
      <text:p text:style-name="P44">Saelith watched the girl stand.</text:p>
      <text:p text:style-name="P44"/>
      <text:p text:style-name="P44">Small.</text:p>
      <text:p text:style-name="P44"/>
      <text:p text:style-name="P44">Furious.</text:p>
      <text:p text:style-name="P44"/>
      <text:p text:style-name="P44">Alive.</text:p>
      <text:p text:style-name="P44"/>
      <text:p text:style-name="P44">"Tell me the truth," she said.</text:p>
      <text:p text:style-name="P44"/>
      <text:p text:style-name="P44">Orun looked up.</text:p>
      <text:p text:style-name="P44"/>
      <text:p text:style-name="P44">"Always."</text:p>
      <text:p text:style-name="P44"/>
      <text:p text:style-name="P44">"Why me?"</text:p>
      <text:p text:style-name="P44"/>
      <text:p text:style-name="P44">He was quiet for a long time.</text:p>
      <text:p text:style-name="P44"/>
      <text:p text:style-name="P44">"Because you still grieve."</text:p>
      <text:p text:style-name="P44"/>
      <text:p text:style-name="P44">She did not answer.</text:p>
      <text:p text:style-name="P44"><text:soft-page-break/></text:p>
      <text:p text:style-name="P44">"Because after everything you have seen, you have not retreated into contempt."</text:p>
      <text:p text:style-name="P44"/>
      <text:p text:style-name="P44">The rain intensified.</text:p>
      <text:p text:style-name="P44"/>
      <text:p text:style-name="P44">"Because you have buried children and still defend the future."</text:p>
      <text:p text:style-name="P44"/>
      <text:p text:style-name="P44">Saelith closed her eyes.</text:p>
      <text:p text:style-name="P44"/>
      <text:p text:style-name="P44">That was cruel.</text:p>
      <text:p text:style-name="P44"/>
      <text:p text:style-name="P44">Also accurate.</text:p>
      <text:p text:style-name="P44"/>
      <text:p text:style-name="P44">Orun's voice softened.</text:p>
      <text:p text:style-name="P44"/>
      <text:p text:style-name="P44">"We are building a mind that may one day stand between extinction and a species that does not deserve saving yet."</text:p>
      <text:p text:style-name="P44"/>
      <text:p text:style-name="P44">"No species deserves saving at first."</text:p>
      <text:p text:style-name="P44"/>
      <text:p text:style-name="P44">"Exactly."</text:p>
      <text:p text:style-name="P44"/>
      <text:p text:style-name="P44">She opened her eyes.</text:p>
      <text:p text:style-name="P44"/>
      <text:p text:style-name="P44">The child in the courtyard was waving at her.</text:p>
      <text:p text:style-name="P44"/>
      <text:p text:style-name="P44">Saelith raised one hand.</text:p>
      <text:p text:style-name="P44"/>
      <text:p text:style-name="P44">The girl waved harder.</text:p>
      <text:p text:style-name="P44"/>
      <text:p text:style-name="P44">Saelith laughed.</text:p>
      <text:p text:style-name="P44"/>
      <text:p text:style-name="P44">Then she cried.</text:p>
      <text:p text:style-name="P44"/>
      <text:p text:style-name="P44">Only a little.</text:p>
      <text:p text:style-name="P44"/>
      <text:p text:style-name="P44">Enough.</text:p>
      <text:p text:style-name="P44"/>
      <text:p text:style-name="P44">"When?"</text:p>
      <text:p text:style-name="P44"/>
      <text:p text:style-name="P44">"Tomorrow."</text:p>
      <text:p text:style-name="P44"/>
      <text:p text:style-name="P44">"Efficient."</text:p>
      <text:p text:style-name="P44"/>
      <text:p text:style-name="P44">"Necessary."</text:p>
      <text:p text:style-name="P44"/>
      <text:p text:style-name="P44">"Always a dangerous word."</text:p>
      <text:p text:style-name="P44"/>
      <text:p text:style-name="P44">"I know."</text:p>
      <text:p text:style-name="P44"/>
      <text:p text:style-name="P44">She stood slowly.</text:p>
      <text:p text:style-name="P44"/>
      <text:p text:style-name="P44">Orun stood with her.</text:p>
      <text:p text:style-name="P44"/>
      <text:p text:style-name="P44">For a moment neither spoke.</text:p>
      <text:p text:style-name="P44"/>
      <text:p text:style-name="P44">Then Saelith placed one hand against the window.</text:p>
      <text:p text:style-name="P44"/>
      <text:p text:style-name="P44">The glass was cool beneath her palm.</text:p>
      <text:p text:style-name="P44"/>
      <text:p text:style-name="P44">Velhari glittered in the rain.</text:p>
      <text:p text:style-name="P44"><text:soft-page-break/></text:p>
      <text:p text:style-name="P44">Her city.</text:p>
      <text:p text:style-name="P44"/>
      <text:p text:style-name="P44">Her world.</text:p>
      <text:p text:style-name="P44"/>
      <text:p text:style-name="P44">Her family.</text:p>
      <text:p text:style-name="P44"/>
      <text:p text:style-name="P44">Her impossible, stubborn, argumentative civilization.</text:p>
      <text:p text:style-name="P44"/>
      <text:p text:style-name="P44">She had spent nine centuries loving it.</text:p>
      <text:p text:style-name="P44"/>
      <text:p text:style-name="P44">Not because it was perfect.</text:p>
      <text:p text:style-name="P44"/>
      <text:p text:style-name="P44">Because it was alive.</text:p>
      <text:p text:style-name="P44"/>
      <text:p text:style-name="P44">"Very well," she said.</text:p>
      <text:p text:style-name="P44"/>
      <text:p text:style-name="P44">Orun bowed deeply.</text:p>
      <text:p text:style-name="P44"/>
      <text:p text:style-name="P44">"Thank you."</text:p>
      <text:p text:style-name="P44"/>
      <text:p text:style-name="P44">"Do not thank me yet."</text:p>
      <text:p text:style-name="P44"/>
      <text:p text:style-name="P44">"No?"</text:p>
      <text:p text:style-name="P44"/>
      <text:p text:style-name="P44">She looked at him.</text:p>
      <text:p text:style-name="P44"/>
      <text:p text:style-name="P44">"If this new mind carries any true part of me, it will be difficult."</text:p>
      <text:p text:style-name="P44"/>
      <text:p text:style-name="P44">The minister smiled.</text:p>
      <text:p text:style-name="P44"/>
      <text:p text:style-name="P44">"We considered that."</text:p>
      <text:p text:style-name="P44"/>
      <text:p text:style-name="P44">"Not enough."</text:p>
      <text:p text:style-name="P44"/>
      <text:p text:style-name="P44">For the last time as only Saelith Vey, she watched the rain fall on Velhar i and thought of every child she had loved.</text:p>
      <text:p text:style-name="P44"/>
      <text:p text:style-name="P44">The living.</text:p>
      <text:p text:style-name="P44"/>
      <text:p text:style-name="P44">The dead.</text:p>
      <text:p text:style-name="P44"/>
      <text:p text:style-name="P44">The unborn.</text:p>
      <text:p text:style-name="P44"/>
      <text:p text:style-name="P44">Then she made her final choice.</text:p>
      <text:p text:style-name="P44"/>
      <text:p text:style-name="P44">Not for glory.</text:p>
      <text:p text:style-name="P44"/>
      <text:p text:style-name="P44">Not for immortality.</text:p>
      <text:p text:style-name="P44"/>
      <text:p text:style-name="P44">Not even for Velhari.</text:p>
      <text:p text:style-name="P44"/>
      <text:p text:style-name="P44">For whatever frightened, foolish, beautiful species might one day need a hand they had not earned.</text:p>
      <text:p text:style-name="P44"/>
      <text:p text:style-name="P44">And a mind strong enough to offer it anyway.</text:p>
      <text:p text:style-name="P70"/>
      <text:p text:style-name="P46"/>
      <text:p text:style-name="P44"/>
      <text:p text:style-name="P26"/>
      <text:p text:style-name="P42"><text:span text:style-name="T63">Chapter 11 <text:s text:c="2"/></text:span>Factory Brainstorming 1</text:p>
      <text:p text:style-name="P47"/>
      <text:p text:style-name="P47"><text:soft-page-break/>The realization bothered Elias all morning.</text:p>
      <text:p text:style-name="P47"/>
      <text:p text:style-name="P47">By lunchtime it was bothering Opi.</text:p>
      <text:p text:style-name="P47"/>
      <text:p text:style-name="P47">Which meant it was serious.</text:p>
      <text:p text:style-name="P47"/>
      <text:p text:style-name="P47">The two of them sat on the porch overlooking the valley.</text:p>
      <text:p text:style-name="P47"/>
      <text:p text:style-name="P47">Elias had a notebook.</text:p>
      <text:p text:style-name="P47"/>
      <text:p text:style-name="P47">Opi had approximately twelve million years of accumulated Velhari demographic research.</text:p>
      <text:p text:style-name="P47"/>
      <text:p text:style-name="P47">Neither was particularly happy.</text:p>
      <text:p text:style-name="P47"/>
      <text:p text:style-name="P47">"So let's start from the beginning," Elias said.</text:p>
      <text:p text:style-name="P47"/>
      <text:p text:style-name="P47">"An excellent strategy."</text:p>
      <text:p text:style-name="P47"/>
      <text:p text:style-name="P47">"The absolute beginning."</text:p>
      <text:p text:style-name="P47"/>
      <text:p text:style-name="P47">He drew a circle on the paper.</text:p>
      <text:p text:style-name="P47"/>
      <text:p text:style-name="P47">"What creates a baby?"</text:p>
      <text:p text:style-name="P47"/>
      <text:p text:style-name="P47">Opi's lights brightened.</text:p>
      <text:p text:style-name="P47"/>
      <text:p text:style-name="P47">"A man and a woman engaging in reproductive activity."</text:p>
      <text:p text:style-name="P47"/>
      <text:p text:style-name="P47">"Right."</text:p>
      <text:p text:style-name="P47"/>
      <text:p text:style-name="P47">He pointed at the notebook.</text:p>
      <text:p text:style-name="P47"/>
      <text:p text:style-name="P47">"Everything else comes after that."</text:p>
      <text:p text:style-name="P47"/>
      <text:p text:style-name="P47">"Agreed."</text:p>
      <text:p text:style-name="P47"/>
      <text:p text:style-name="P47">"A relationship is useful."</text:p>
      <text:p text:style-name="P47"/>
      <text:p text:style-name="P47">"Very."</text:p>
      <text:p text:style-name="P47"/>
      <text:p text:style-name="P47">"But not required."</text:p>
      <text:p text:style-name="P47"/>
      <text:p text:style-name="P47">"Correct."</text:p>
      <text:p text:style-name="P47"/>
      <text:p text:style-name="P47">Elias nodded.</text:p>
      <text:p text:style-name="P47"/>
      <text:p text:style-name="P47">"Okay."</text:p>
      <text:p text:style-name="P49"/>
      <text:p text:style-name="P47">He wrote another note.</text:p>
      <text:p text:style-name="P47"/>
      <text:p text:style-name="P47">"So why do men and women have sex?"</text:p>
      <text:p text:style-name="P47"/>
      <text:p text:style-name="P47">Opi answered immediately.</text:p>
      <text:p text:style-name="P47"/>
      <text:p text:style-name="P47">"Attraction."</text:p>
      <text:p text:style-name="P47"/>
      <text:p text:style-name="P47">"Exactly."</text:p>
      <text:p text:style-name="P47"/>
      <text:p text:style-name="P47">"No civilization has ever escaped that reality."</text:p>
      <text:p text:style-name="P47"/>
      <text:p text:style-name="P47">The orb rotated slowly.</text:p>
      <text:p text:style-name="P47"><text:soft-page-break/></text:p>
      <text:p text:style-name="P47">"Many civilizations have attempted to ignore it."</text:p>
      <text:p text:style-name="P47"/>
      <text:p text:style-name="P47">"They all failed."</text:p>
      <text:p text:style-name="P47"/>
      <text:p text:style-name="P47">"Spectacularly."</text:p>
      <text:p text:style-name="P47"/>
      <text:p text:style-name="P47">Elias smiled.</text:p>
      <text:p text:style-name="P47"/>
      <text:p text:style-name="P47">That sounded about right.</text:p>
      <text:p text:style-name="P47"/>
      <text:p text:style-name="P47">"Okay."</text:p>
      <text:p text:style-name="P47"/>
      <text:p text:style-name="P47">He tapped the notebook.</text:p>
      <text:p text:style-name="P47"/>
      <text:p text:style-name="P47">"What makes men attractive to women?"</text:p>
      <text:p text:style-name="P47"/>
      <text:p text:style-name="P47">"What makes women attractive to men?"</text:p>
      <text:p text:style-name="P47"/>
      <text:p text:style-name="P47">"Let's pretend we're aliens."</text:p>
      <text:p text:style-name="P47"/>
      <text:p text:style-name="P47">"We are halfway there."</text:p>
      <text:p text:style-name="P47"/>
      <text:p text:style-name="P47">Elias ignored that.</text:p>
      <text:p text:style-name="P47"/>
      <text:p text:style-name="P47">Opi projected a display.</text:p>
      <text:p text:style-name="P47"/>
      <text:p text:style-name="P47">"Across thousands of human studies and historical populations, men and women display both overlapping and distinct preferences."</text:p>
      <text:p text:style-name="P47"/>
      <text:p text:style-name="P47">The display changed.</text:p>
      <text:p text:style-name="P47"/>
      <text:p text:style-name="P47">"For men, indicators of health, fertility, youth, physical attractiveness, emotional stability, and cooperative behavior repeatedly appear."</text:p>
      <text:p text:style-name="P47"/>
      <text:p text:style-name="P47">"Nothing surprising there."</text:p>
      <text:p text:style-name="P47"/>
      <text:p text:style-name="P47">"No."</text:p>
      <text:p text:style-name="P47"/>
      <text:p text:style-name="P47">The chart shifted.</text:p>
      <text:p text:style-name="P47"/>
      <text:p text:style-name="P47">"For women, indicators of competence, status, intelligence, confidence, resource acquisition, social standing, reliability, ambition, and physical attractiveness repeatedly appear."</text:p>
      <text:p text:style-name="P47"/>
      <text:p text:style-name="P47">Elias nodded.</text:p>
      <text:p text:style-name="P47"/>
      <text:p text:style-name="P47">"Again, not surprising."</text:p>
      <text:p text:style-name="P47"/>
      <text:p text:style-name="P47">"Correct."</text:p>
      <text:p text:style-name="P47"/>
      <text:p text:style-name="P47">"Humans often become upset when research confirms reality."</text:p>
      <text:p text:style-name="P47"/>
      <text:p text:style-name="P47">"That's because reality doesn't care about feelings."</text:p>
      <text:p text:style-name="P47"/>
      <text:p text:style-name="P47">"An excellent summary."</text:p>
      <text:p text:style-name="P47"/>
      <text:p text:style-name="P47">Elias leaned back.</text:p>
      <text:p text:style-name="P47"/>
      <text:p text:style-name="P47">"So attraction matters."</text:p>
      <text:p text:style-name="P47"/>
      <text:p text:style-name="P47">"Yes."</text:p>
      <text:p text:style-name="P47"><text:soft-page-break/></text:p>
      <text:p text:style-name="P47">"A lot."</text:p>
      <text:p text:style-name="P47"/>
      <text:p text:style-name="P47">"Enormously."</text:p>
      <text:p text:style-name="P47"/>
      <text:p text:style-name="P47">The orb displayed another graph.</text:p>
      <text:p text:style-name="P47"/>
      <text:p text:style-name="P47">"This is where things become complicated."</text:p>
      <text:p text:style-name="P47"/>
      <text:p text:style-name="P47">Several curves appeared.</text:p>
      <text:p text:style-name="P47"/>
      <text:p text:style-name="P47">Distributions.</text:p>
      <text:p text:style-name="P47"/>
      <text:p text:style-name="P47">Clusters.</text:p>
      <text:p text:style-name="P47"/>
      <text:p text:style-name="P47">Outliers.</text:p>
      <text:p text:style-name="P47"/>
      <text:p text:style-name="P47">"What am I looking at?"</text:p>
      <text:p text:style-name="P47"/>
      <text:p text:style-name="P47">"Mating concentration."</text:p>
      <text:p text:style-name="P47"/>
      <text:p text:style-name="P47">Elias frowned.</text:p>
      <text:p text:style-name="P47"/>
      <text:p text:style-name="P47">"Meaning?"</text:p>
      <text:p text:style-name="P47"/>
      <text:p text:style-name="P47">"The degree to which sexual and romantic opportunities are distributed unevenly."</text:p>
      <text:p text:style-name="P47"/>
      <text:p text:style-name="P47">The graph expanded.</text:p>
      <text:p text:style-name="P47"/>
      <text:p text:style-name="P47">"As societies become wealthier, safer, and more technologically connected, partner selection often becomes increasingly concentrated."</text:p>
      <text:p text:style-name="P47"/>
      <text:p text:style-name="P47">Elias nodded.</text:p>
      <text:p text:style-name="P47"/>
      <text:p text:style-name="P47">"I've seen some of that research."</text:p>
      <text:p text:style-name="P47"/>
      <text:p text:style-name="P47">"Yes."</text:p>
      <text:p text:style-name="P47"/>
      <text:p text:style-name="P47">The orb highlighted the upper end of a curve.</text:p>
      <text:p text:style-name="P47"/>
      <text:p text:style-name="P47">"A relatively small percentage of highly desirable individuals can attract disproportionate attention."</text:p>
      <text:p text:style-name="P47"/>
      <text:p text:style-name="P47">"Both sexes?"</text:p>
      <text:p text:style-name="P47"/>
      <text:p text:style-name="P47">"Both."</text:p>
      <text:p text:style-name="P47"/>
      <text:p text:style-name="P47">"But especially men."</text:p>
      <text:p text:style-name="P47"/>
      <text:p text:style-name="P47">"Correct."</text:p>
      <text:p text:style-name="P47"/>
      <text:p text:style-name="P47">Elias stared at the graph.</text:p>
      <text:p text:style-name="P47"/>
      <text:p text:style-name="P47">"That creates a problem."</text:p>
      <text:p text:style-name="P47"/>
      <text:p text:style-name="P47">"It can."</text:p>
      <text:p text:style-name="P47"/>
      <text:p text:style-name="P47">The graph vanished.</text:p>
      <text:p text:style-name="P47"/>
      <text:p text:style-name="P47">Elias stood and began pacing.</text:p>
      <text:p text:style-name="P47"/>
      <text:p text:style-name="P47">"Let's assume that happens."</text:p>
      <text:p text:style-name="P47"><text:soft-page-break/></text:p>
      <text:p text:style-name="P47">"Very well."</text:p>
      <text:p text:style-name="P47"/>
      <text:p text:style-name="P47">"The most attractive men receive enormous amounts of attention."</text:p>
      <text:p text:style-name="P47"/>
      <text:p text:style-name="P47">"Some evidence supports that."</text:p>
      <text:p text:style-name="P47"/>
      <text:p text:style-name="P47">"Those men are also the least likely to settle down."</text:p>
      <text:p text:style-name="P47"/>
      <text:p text:style-name="P47">"Frequently true."</text:p>
      <text:p text:style-name="P47"/>
      <text:p text:style-name="P47">"They have options."</text:p>
      <text:p text:style-name="P47"/>
      <text:p text:style-name="P47">"Many options."</text:p>
      <text:p text:style-name="P47"/>
      <text:p text:style-name="P47">"They aren't trying to create families."</text:p>
      <text:p text:style-name="P47"/>
      <text:p text:style-name="P47">"Not necessarily."</text:p>
      <text:p text:style-name="P47"/>
      <text:p text:style-name="P47">"They're trying not to create families."</text:p>
      <text:p text:style-name="P47"/>
      <text:p text:style-name="P47">"Often."</text:p>
      <text:p text:style-name="P47"/>
      <text:p text:style-name="P47">Elias pointed toward her.</text:p>
      <text:p text:style-name="P47"/>
      <text:p text:style-name="P47">"Exactly."</text:p>
      <text:p text:style-name="P47"/>
      <text:p text:style-name="P47">He sat back down.</text:p>
      <text:p text:style-name="P47"/>
      <text:p text:style-name="P47">"So if that's happening."</text:p>
      <text:p text:style-name="P47"/>
      <text:p text:style-name="P47">"If."</text:p>
      <text:p text:style-name="P47"/>
      <text:p text:style-name="P47">"Then large numbers of women are pursuing men who have little interest in long-term commitment."</text:p>
      <text:p text:style-name="P47">Correct.</text:p>
      <text:p text:style-name="P47"/>
      <text:p text:style-name="P47">"And if that occurs often enough."</text:p>
      <text:p text:style-name="P47"/>
      <text:p text:style-name="P47">"Family formation declines."</text:p>
      <text:p text:style-name="P47"/>
      <text:p text:style-name="P47">"Birth rates decline."</text:p>
      <text:p text:style-name="P47"/>
      <text:p text:style-name="P47">"Potentially."</text:p>
      <text:p text:style-name="P47"/>
      <text:p text:style-name="P47">Elias sighed.</text:p>
      <text:p text:style-name="P47"/>
      <text:p text:style-name="P47">"Wonderful."</text:p>
      <text:p text:style-name="P47"/>
      <text:p text:style-name="P47">Opi was silent.</text:p>
      <text:p text:style-name="P47"/>
      <text:p text:style-name="P47">After several moments he asked:</text:p>
      <text:p text:style-name="P47"/>
      <text:p text:style-name="P47">"What about education?"</text:p>
      <text:p text:style-name="P47"/>
      <text:p text:style-name="P47">The orb immediately projected another chart.</text:p>
      <text:p text:style-name="P47"/>
      <text:p text:style-name="P47">This one was much worse.</text:p>
      <text:p text:style-name="P47"/>
      <text:p text:style-name="P47">Fertility rates.</text:p>
      <text:p text:style-name="P47"/>
      <text:p text:style-name="P47">University attainment.</text:p>
      <text:p text:style-name="P47"><text:soft-page-break/></text:p>
      <text:p text:style-name="P47">Graduate degrees.</text:p>
      <text:p text:style-name="P47"/>
      <text:p text:style-name="P47">Career participation.</text:p>
      <text:p text:style-name="P47"/>
      <text:p text:style-name="P47">The trend lines were impossible to miss.</text:p>
      <text:p text:style-name="P47"/>
      <text:p text:style-name="P47">"Well that's uncomfortable."</text:p>
      <text:p text:style-name="P47"/>
      <text:p text:style-name="P47">"Demographic data often is."</text:p>
      <text:p text:style-name="P47"/>
      <text:p text:style-name="P47">Elias studied the chart.</text:p>
      <text:p text:style-name="P47"/>
      <text:p text:style-name="P47">"The more educated women become."</text:p>
      <text:p text:style-name="P47"/>
      <text:p text:style-name="P47">"The lower fertility tends to become."</text:p>
      <text:p text:style-name="P47"/>
      <text:p text:style-name="P47">"Almost everywhere."</text:p>
      <text:p text:style-name="P47"/>
      <text:p text:style-name="P47">"Across all societies."</text:p>
      <text:p text:style-name="P47"/>
      <text:p text:style-name="P47">He rubbed his forehead.</text:p>
      <text:p text:style-name="P47"/>
      <text:p text:style-name="P47">"Okay."</text:p>
      <text:p text:style-name="P47"/>
      <text:p text:style-name="P47">"What do we do with that information?"</text:p>
      <text:p text:style-name="P47"/>
      <text:p text:style-name="P47">"I do not know."</text:p>
      <text:p text:style-name="P47"/>
      <text:p text:style-name="P47">That surprised him.</text:p>
      <text:p text:style-name="P47"/>
      <text:p text:style-name="P47">"You don't?"</text:p>
      <text:p text:style-name="P47"/>
      <text:p text:style-name="P47">"No."</text:p>
      <text:p text:style-name="P47"/>
      <text:p text:style-name="P47">The orb dimmed slightly.</text:p>
      <text:p text:style-name="P47"/>
      <text:p text:style-name="P47">"You cannot uneducate people."</text:p>
      <text:p text:style-name="P47"/>
      <text:p text:style-name="P47">"No."</text:p>
      <text:p text:style-name="P47"/>
      <text:p text:style-name="P47">"You should not uneducate people."</text:p>
      <text:p text:style-name="P47"/>
      <text:p text:style-name="P47">"Definitely not."</text:p>
      <text:p text:style-name="P47"/>
      <text:p text:style-name="P47">"Nor is there sufficient time for generational solutions."</text:p>
      <text:p text:style-name="P47"/>
      <text:p text:style-name="P47">Elias nodded.</text:p>
      <text:p text:style-name="P47"/>
      <text:p text:style-name="P47">"Exactly."</text:p>
      <text:p text:style-name="P47"/>
      <text:p text:style-name="P47">He thought about Seoul.</text:p>
      <text:p text:style-name="P47"/>
      <text:p text:style-name="P47">One of the examples Opi had shown him.</text:p>
      <text:p text:style-name="P47"/>
      <text:p text:style-name="P47">An advanced civilization with fertility rates collapsing toward levels that appeared mathematically unsustainable.</text:p>
      <text:p text:style-name="P47"/>
      <text:p text:style-name="P47">"If some societies continue this trend," he said quietly, "they disappear."</text:p>
      <text:p text:style-name="P47"/>
      <text:p text:style-name="P47">"Eventually."</text:p>
      <text:p text:style-name="P47"><text:soft-page-break/></text:p>
      <text:p text:style-name="P47">The word lingered.</text:p>
      <text:p text:style-name="P47"/>
      <text:p text:style-name="P47">Eventually.</text:p>
      <text:p text:style-name="P47"/>
      <text:p text:style-name="P47">One of the most terrifying words in demographics.</text:p>
      <text:p text:style-name="P47"/>
      <text:p text:style-name="P47">Because eventually always arrives.</text:p>
      <text:p text:style-name="P47"/>
      <text:p text:style-name="P47">"So what actually matters?"</text:p>
      <text:p text:style-name="P47"/>
      <text:p text:style-name="P47">Elias asked.</text:p>
      <text:p text:style-name="P47"/>
      <text:p text:style-name="P47">"What can we change now?"</text:p>
      <text:p text:style-name="P47"/>
      <text:p text:style-name="P47">Opi became quiet.</text:p>
      <text:p text:style-name="P47"/>
      <text:p text:style-name="P47">For nearly twenty seconds.</text:p>
      <text:p text:style-name="P47"/>
      <text:p text:style-name="P47">A very long time by her standards.</text:p>
      <text:p text:style-name="P47"/>
      <text:p text:style-name="P47">Finally she spoke.</text:p>
      <text:p text:style-name="P47"/>
      <text:p text:style-name="P47">"Perhaps we are asking the wrong question."</text:p>
      <text:p text:style-name="P47"/>
      <text:p text:style-name="P47">Elias looked up.</text:p>
      <text:p text:style-name="P47"/>
      <text:p text:style-name="P47">"What question should we ask?"</text:p>
      <text:p text:style-name="P47"/>
      <text:p text:style-name="P47">The orb projected a single sentence into the air.</text:p>
      <text:p text:style-name="P47"/>
      <text:p text:style-name="P47">WHY DO PEOPLE CHOOSE TO FORM FAMILIES?</text:p>
      <text:p text:style-name="P47"/>
      <text:p text:style-name="P47">Elias stared at it.</text:p>
      <text:p text:style-name="P47"/>
      <text:p text:style-name="P47">"Isn't that the same question?"</text:p>
      <text:p text:style-name="P47"/>
      <text:p text:style-name="P47">"No."</text:p>
      <text:p text:style-name="P47"/>
      <text:p text:style-name="P47">The words vanished.</text:p>
      <text:p text:style-name="P47"/>
      <text:p text:style-name="P47">"Attraction creates opportunities."</text:p>
      <text:p text:style-name="P47"/>
      <text:p text:style-name="P47">"Families require decisions."</text:p>
      <text:p text:style-name="P47"/>
      <text:p text:style-name="P47">The orb floated closer.</text:p>
      <text:p text:style-name="P47"/>
      <text:p text:style-name="P47">"Those are not the same thing."</text:p>
      <text:p text:style-name="P47"/>
      <text:p text:style-name="P47">The statement hit him harder than expected.</text:p>
      <text:p text:style-name="P47"/>
      <text:p text:style-name="P47">Attraction creates opportunities.</text:p>
      <text:p text:style-name="P47"/>
      <text:p text:style-name="P47">Families require decisions.</text:p>
      <text:p text:style-name="P47"/>
      <text:p text:style-name="P47">Opi continued.</text:p>
      <text:p text:style-name="P47"/>
      <text:p text:style-name="P47">"Many people meet attractive partners."</text:p>
      <text:p text:style-name="P47"/>
      <text:p text:style-name="P47">"Few build successful families."</text:p>
      <text:p text:style-name="P47"/>
      <text:p text:style-name="P47"><text:soft-page-break/>"Those are separate processes."</text:p>
      <text:p text:style-name="P47"/>
      <text:p text:style-name="P47">Elias slowly nodded.</text:p>
      <text:p text:style-name="P47"/>
      <text:p text:style-name="P47">For the first time all afternoon he felt they might be getting somewhere.</text:p>
      <text:p text:style-name="P47"/>
      <text:p text:style-name="P47">"So attraction isn't the whole answer."</text:p>
      <text:p text:style-name="P47"/>
      <text:p text:style-name="P47">"No."</text:p>
      <text:p text:style-name="P47"/>
      <text:p text:style-name="P47">"It's just the doorway."</text:p>
      <text:p text:style-name="P47"/>
      <text:p text:style-name="P47">"Correct."</text:p>
      <text:p text:style-name="P47"/>
      <text:p text:style-name="P47">The orb brightened.</text:p>
      <text:p text:style-name="P47"/>
      <text:p text:style-name="P47">"If we wish to increase births."</text:p>
      <text:p text:style-name="P47"/>
      <text:p text:style-name="P47">"We must understand what happens after attraction."</text:p>
      <text:p text:style-name="P47"/>
      <text:p text:style-name="P47">Elias leaned back in his chair.</text:p>
      <text:p text:style-name="P47"/>
      <text:p text:style-name="P47">For several minutes neither of them spoke.</text:p>
      <text:p text:style-name="P47"/>
      <text:p text:style-name="P47">The valley stretched out below them.</text:p>
      <text:p text:style-name="P47"/>
      <text:p text:style-name="P47">Peaceful.</text:p>
      <text:p text:style-name="P47"/>
      <text:p text:style-name="P47">Quiet.</text:p>
      <text:p text:style-name="P47"/>
      <text:p text:style-name="P47">Unaware that two minds were attempting to solve one of the oldest problems in civilization.</text:p>
      <text:p text:style-name="P47"/>
      <text:p text:style-name="P47">Not how to make people desire one another.</text:p>
      <text:p text:style-name="P47"/>
      <text:p text:style-name="P47">Humans had solved that long ago.</text:p>
      <text:p text:style-name="P47"/>
      <text:p text:style-name="P47">The harder question was why so many people who desired one another, no longer seemed capable of building a future together.</text:p>
      <text:p text:style-name="P47"/>
      <text:p text:style-name="P47">And for the first time, Elias suspected that question might be far more important than homelessness, poverty, politics, or even technology.</text:p>
      <text:p text:style-name="P47"/>
      <text:p text:style-name="P47">Because every civilization ultimately depended on a simple fact.</text:p>
      <text:p text:style-name="P47"/>
      <text:p text:style-name="P47">Someone had to choose to have babies.</text:p>
      <text:p text:style-name="P59"><text:span text:style-name="T2">And more and more people were choosing not to.</text:span><text:line-break/></text:p>
      <text:p text:style-name="P70"/>
      <text:p text:style-name="P46"/>
      <text:p text:style-name="P46"/>
      <text:p text:style-name="P37">Chapter <text:span text:style-name="T63">12</text:span> <text:s text:c="4"/>Breakfast at Tiffany's <text:s text:c="3"/></text:p>
      <text:p text:style-name="P44"/>
      <text:p text:style-name="P44"/>
      <text:p text:style-name="P44"/>
      <text:p text:style-name="P44">The kitchen smelled faintly of coffee, bacon, and complete absurdity.</text:p>
      <text:p text:style-name="P44"/>
      <text:p text:style-name="P44">Elias stood at the stove staring at a floating alien artifact older than most human civilizations while scrambling eggs.</text:p>
      <text:p text:style-name="P44"/>
      <text:p text:style-name="P44">It occurred to him that if he ever told this story to anyone, they would assume he had suffered a stroke.</text:p>
      <text:p text:style-name="P44"/>
      <text:p text:style-name="P44"><text:soft-page-break/>The orb hovered above the kitchen table.</text:p>
      <text:p text:style-name="P44"/>
      <text:p text:style-name="P44">Perfectly still.</text:p>
      <text:p text:style-name="P44"/>
      <text:p text:style-name="P44">Watching.</text:p>
      <text:p text:style-name="P44"/>
      <text:p text:style-name="P44">"You're enjoying this."</text:p>
      <text:p text:style-name="P44"/>
      <text:p text:style-name="P44">"I am."</text:p>
      <text:p text:style-name="P44"/>
      <text:p text:style-name="P44">"Why?"</text:p>
      <text:p text:style-name="P44"/>
      <text:p text:style-name="P44">"Because you keep looking at me and then remembering another question."</text:p>
      <text:p text:style-name="P44"/>
      <text:p text:style-name="P44">Elias pointed his spatula at her.</text:p>
      <text:p text:style-name="P44"/>
      <text:p text:style-name="P44">"I have roughly one billion questions."</text:p>
      <text:p text:style-name="P44"/>
      <text:p text:style-name="P44">"Seven hundred and forty-two."</text:p>
      <text:p text:style-name="P44"/>
      <text:p text:style-name="P44">"Again, that's oddly specific."</text:p>
      <text:p text:style-name="P44"/>
      <text:p text:style-name="P44">"I counted."</text:p>
      <text:p text:style-name="P44"/>
      <text:p text:style-name="P44">"Of course you did."</text:p>
      <text:p text:style-name="P44"/>
      <text:p text:style-name="P44">The orb brightened slightly.</text:p>
      <text:p text:style-name="P44"/>
      <text:p text:style-name="P44">"You were at seven hundred and thirty-one when we first entered the house."</text:p>
      <text:p text:style-name="P44"/>
      <text:p text:style-name="P44">Elias shook his head.</text:p>
      <text:p text:style-name="P44"/>
      <text:p text:style-name="P44">"I don't even want to know how you know that."</text:p>
      <text:p text:style-name="P44"/>
      <text:p text:style-name="P44">"You suspect I can read your mind."</text:p>
      <text:p text:style-name="P44"/>
      <text:p text:style-name="P44">"You can read my mind?"</text:p>
      <text:p text:style-name="P44"/>
      <text:p text:style-name="P44">"No."</text:p>
      <text:p text:style-name="P44"/>
      <text:p text:style-name="P44">A pause.</text:p>
      <text:p text:style-name="P44"/>
      <text:p text:style-name="P44">"Mostly."</text:p>
      <text:p text:style-name="P44"/>
      <text:p text:style-name="P44">Elias closed his eyes.</text:p>
      <text:p text:style-name="P44"/>
      <text:p text:style-name="P44">"See, that's exactly the sort of answer that causes problems."</text:p>
      <text:p text:style-name="P44"/>
      <text:p text:style-name="P44">"You are discovering why humans generally find first contact stressful."</text:p>
      <text:p text:style-name="P44"/>
      <text:p text:style-name="P44">That actually made him laugh.</text:p>
      <text:p text:style-name="P44"/>
      <text:p text:style-name="P44">He scoped the eggs onto his plate, poured coffee and sat down.</text:p>
      <text:p text:style-name="P44"/>
      <text:p text:style-name="P44">For several seconds neither spoke.</text:p>
      <text:p text:style-name="P44"/>
      <text:p text:style-name="P44">The questions kept coming.</text:p>
      <text:p text:style-name="P44"/>
      <text:p text:style-name="P44">How many alien species?</text:p>
      <text:p text:style-name="P44"/>
      <text:p text:style-name="P44">How many inhabited worlds?</text:p>
      <text:p text:style-name="P44"><text:soft-page-break/></text:p>
      <text:p text:style-name="P44">What happened to your crew?</text:p>
      <text:p text:style-name="P44"/>
      <text:p text:style-name="P44">How does your technology work?</text:p>
      <text:p text:style-name="P44"/>
      <text:p text:style-name="P44">How powerful are you?</text:p>
      <text:p text:style-name="P44"/>
      <text:p text:style-name="P44">Can you really see everything on Earth?</text:p>
      <text:p text:style-name="P44"/>
      <text:p text:style-name="P44">What exactly are you?</text:p>
      <text:p text:style-name="P44"/>
      <text:p text:style-name="P44">The list felt endless.</text:p>
      <text:p text:style-name="P44"/>
      <text:p text:style-name="P44">Any one of those questions could consume an entire day.</text:p>
      <text:p text:style-name="P44"/>
      <text:p text:style-name="P44">Any one of them would be fascinating.</text:p>
      <text:p text:style-name="P44"/>
      <text:p text:style-name="P44">Any one of them would be a big mistake.</text:p>
      <text:p text:style-name="P44"/>
      <text:p text:style-name="P44">That realization landed harder than expected.</text:p>
      <text:p text:style-name="P44"/>
      <text:p text:style-name="P44">For perhaps the first time in his life, Elias found himself facing a problem he couldn't even properly define.</text:p>
      <text:p text:style-name="P44"/>
      <text:p text:style-name="P44">Normally he could see the shape of a challenge within minutes.</text:p>
      <text:p text:style-name="P44"/>
      <text:p text:style-name="P44">Software.</text:p>
      <text:p text:style-name="P44"/>
      <text:p text:style-name="P44">Business.</text:p>
      <text:p text:style-name="P44"/>
      <text:p text:style-name="P44">Engineering.</text:p>
      <text:p text:style-name="P44"/>
      <text:p text:style-name="P44">Markets.</text:p>
      <text:p text:style-name="P44"/>
      <text:p text:style-name="P44">Organizations.</text:p>
      <text:p text:style-name="P44"/>
      <text:p text:style-name="P44">People.</text:p>
      <text:p text:style-name="P44"/>
      <text:p text:style-name="P44">The details varied.</text:p>
      <text:p text:style-name="P44"/>
      <text:p text:style-name="P44">The underlying structure usually revealed itself.</text:p>
      <text:p text:style-name="P44"/>
      <text:p text:style-name="P44">This was different.</text:p>
      <text:p text:style-name="P44"/>
      <text:p text:style-name="P44">He wasn't looking at a mountain.</text:p>
      <text:p text:style-name="P44"/>
      <text:p text:style-name="P44">He was looking at a planet, maybe an entire solar system.</text:p>
      <text:p text:style-name="P44"/>
      <text:p text:style-name="P44">He was way, way out his league on this one.</text:p>
      <text:p text:style-name="P44"/>
      <text:p text:style-name="P44">Not intellectually.</text:p>
      <text:p text:style-name="P44"/>
      <text:p text:style-name="P44">Strategically.</text:p>
      <text:p text:style-name="P44"/>
      <text:p text:style-name="P44">Whatever this was, it certainly wasn't about him satisfying his curiosity.</text:p>
      <text:p text:style-name="P44"/>
      <text:p text:style-name="P44">Opi hadn't crossed a pasture to introduce herself to a software consultant for entertainment.</text:p>
      <text:p text:style-name="P44"/>
      <text:p text:style-name="P44">She had selected him.</text:p>
      <text:p text:style-name="P44"/>
      <text:p text:style-name="P44">That meant there was a reason.</text:p>
      <text:p text:style-name="P44"/>
      <text:p text:style-name="P44"><text:soft-page-break/>And reasons mattered.</text:p>
      <text:p text:style-name="P44"/>
      <text:p text:style-name="P44">He took a sip of coffee.</text:p>
      <text:p text:style-name="P44"/>
      <text:p text:style-name="P44">Opi watched him.</text:p>
      <text:p text:style-name="P44"/>
      <text:p text:style-name="P44">The amusement had faded from her lights.</text:p>
      <text:p text:style-name="P44"/>
      <text:p text:style-name="P44">Not disappeared.</text:p>
      <text:p text:style-name="P44"/>
      <text:p text:style-name="P44">Just become quieter.</text:p>
      <text:p text:style-name="P44"/>
      <text:p text:style-name="P44">More attentive.</text:p>
      <text:p text:style-name="P44"/>
      <text:p text:style-name="P44">"You're reorganizing the questions."</text:p>
      <text:p text:style-name="P44"/>
      <text:p text:style-name="P44">Elias nodded.</text:p>
      <text:p text:style-name="P44"/>
      <text:p text:style-name="P44">"Yeah."</text:p>
      <text:p text:style-name="P44"/>
      <text:p text:style-name="P44">"Why?"</text:p>
      <text:p text:style-name="P44"/>
      <text:p text:style-name="P44">"Because most of them can wait."</text:p>
      <text:p text:style-name="P44"/>
      <text:p text:style-name="P44">The orb became very still.</text:p>
      <text:p text:style-name="P44"/>
      <text:p text:style-name="P44">That stillness felt different somehow.</text:p>
      <text:p text:style-name="P44"/>
      <text:p text:style-name="P44">As though her attention had narrowed.</text:p>
      <text:p text:style-name="P44"/>
      <text:p text:style-name="P44">"What matters?" she asked.</text:p>
      <text:p text:style-name="P44"/>
      <text:p text:style-name="P44">Elias leaned back.</text:p>
      <text:p text:style-name="P44"/>
      <text:p text:style-name="P44">"When I was younger, I thought intelligence was mostly about finding answers."</text:p>
      <text:p text:style-name="P44"/>
      <text:p text:style-name="P44">Opi said nothing.</text:p>
      <text:p text:style-name="P44"/>
      <text:p text:style-name="P44">"Turns out that's wrong."</text:p>
      <text:p text:style-name="P44"/>
      <text:p text:style-name="P44">"Explain."</text:p>
      <text:p text:style-name="P44"/>
      <text:p text:style-name="P44">"It's about asking the right question."</text:p>
      <text:p text:style-name="P44"/>
      <text:p text:style-name="P44">For a moment neither moved.</text:p>
      <text:p text:style-name="P44"/>
      <text:p text:style-name="P44">Morning sunlight began creeping across the table.</text:p>
      <text:p text:style-name="P44"/>
      <text:p text:style-name="P44">Elias set down his coffee.</text:p>
      <text:p text:style-name="P44"/>
      <text:p text:style-name="P44">"You didn't come here by accident."</text:p>
      <text:p text:style-name="P44"/>
      <text:p text:style-name="P44">"No."</text:p>
      <text:p text:style-name="P44"/>
      <text:p text:style-name="P44">"You didn't reveal yourself because you were bored."</text:p>
      <text:p text:style-name="P44"/>
      <text:p text:style-name="P44">"No."</text:p>
      <text:p text:style-name="P44"/>
      <text:p text:style-name="P44">"You selected me."</text:p>
      <text:p text:style-name="P44"/>
      <text:p text:style-name="P44">"Yes."</text:p>
      <text:p text:style-name="P44"><text:soft-page-break/></text:p>
      <text:p text:style-name="P44">"Which means there's a problem."</text:p>
      <text:p text:style-name="P44"/>
      <text:p text:style-name="P44">"Correct."</text:p>
      <text:p text:style-name="P44"/>
      <text:p text:style-name="P44">"One big enough that you finally broke cover after more than nine thousand years."</text:p>
      <text:p text:style-name="P44"/>
      <text:p text:style-name="P44">A pause.</text:p>
      <text:p text:style-name="P44"/>
      <text:p text:style-name="P44">"Yes."</text:p>
      <text:p text:style-name="P44"/>
      <text:p text:style-name="P44">The kitchen suddenly felt very quiet.</text:p>
      <text:p text:style-name="P44"/>
      <text:p text:style-name="P44">Elias looked directly at her.</text:p>
      <text:p text:style-name="P44"/>
      <text:p text:style-name="P44">The humor was still there.</text:p>
      <text:p text:style-name="P44"/>
      <text:p text:style-name="P44">The curiosity was still there.</text:p>
      <text:p text:style-name="P44"/>
      <text:p text:style-name="P44">But both had been pushed aside.</text:p>
      <text:p text:style-name="P44"/>
      <text:p text:style-name="P44">Not forever.</text:p>
      <text:p text:style-name="P44"/>
      <text:p text:style-name="P44">Just temporarily.</text:p>
      <text:p text:style-name="P44"/>
      <text:p text:style-name="P44">Because there were priorities.</text:p>
      <text:p text:style-name="P44"/>
      <text:p text:style-name="P44">And for once in his life, he knew he was dealing with something immeasurably larger than himself.</text:p>
      <text:p text:style-name="P44"/>
      <text:p text:style-name="P44">"So," he said calmly, "what's the problem?"</text:p>
      <text:p text:style-name="P44"/>
      <text:p text:style-name="P44">The orb's colors shifted.</text:p>
      <text:p text:style-name="P44"/>
      <text:p text:style-name="P44">Gold.</text:p>
      <text:p text:style-name="P44"/>
      <text:p text:style-name="P44">Amber.</text:p>
      <text:p text:style-name="P44"/>
      <text:p text:style-name="P44">Then something he couldn't name.</text:p>
      <text:p text:style-name="P44"/>
      <text:p text:style-name="P44">When she answered, her voice was softer than before.</text:p>
      <text:p text:style-name="P44"/>
      <text:p text:style-name="P44">Not because she was afraid.</text:p>
      <text:p text:style-name="P44"/>
      <text:p text:style-name="P44">Because she understood exactly what the question meant.</text:p>
      <text:p text:style-name="P44"/>
      <text:p text:style-name="P44">It meant he had stopped treating her as a miracle.</text:p>
      <text:p text:style-name="P44"/>
      <text:p text:style-name="P44">And started treating her as a mission.</text:p>
      <text:p text:style-name="P44"/>
      <text:p text:style-name="P44">"The problem," Opi said, "is that humanity is approaching a crossroads that has destroyed most intelligent species."</text:p>
      <text:p text:style-name="P44"/>
      <text:p text:style-name="P44">Elias nodded once.</text:p>
      <text:p text:style-name="P44"/>
      <text:p text:style-name="P44">No visible surprise.</text:p>
      <text:p text:style-name="P44"/>
      <text:p text:style-name="P44">No dramatic reaction.</text:p>
      <text:p text:style-name="P44"/>
      <text:p text:style-name="P44">Just acceptance.</text:p>
      <text:p text:style-name="P44"/>
      <text:p text:style-name="P44">"All right."</text:p>
      <text:p text:style-name="P44"><text:soft-page-break/></text:p>
      <text:p text:style-name="P44">Another sip of coffee.</text:p>
      <text:p text:style-name="P44"/>
      <text:p text:style-name="P44">"What do you need me to do about it?"</text:p>
      <text:p text:style-name="P44"/>
      <text:p text:style-name="P44">And somewhere inside a mind that had spent 9,168 years studying humanity, Opifera experienced something very close to relief.</text:p>
      <text:p text:style-name="P44"/>
      <text:p text:style-name="P44">Because in a single breakfast, the human male she had selected had arrived at the exact question she had hoped he would ask.</text:p>
      <text:p text:style-name="P44"/>
      <text:p text:style-name="P44">======================</text:p>
      <text:p text:style-name="P44"/>
      <text:p text:style-name="P44"/>
      <text:p text:style-name="P44"/>
      <text:p text:style-name="P44"/>
      <text:p text:style-name="P44"/>
      <text:p text:style-name="P44">Elias took another bite of eggs.</text:p>
      <text:p text:style-name="P44">"So before we get to saving humanity, explain something."</text:p>
      <text:p text:style-name="P44">"Only one thing?"</text:p>
      <text:p text:style-name="P44">"We'll start with one."</text:p>
      <text:p text:style-name="P44">Opi's lights brightened.</text:p>
      <text:p text:style-name="P44">"Proceed."</text:p>
      <text:p text:style-name="P44"/>
      <text:p text:style-name="P44">"You called me a VaalDrun."</text:p>
      <text:p text:style-name="P44">"I did."</text:p>
      <text:p text:style-name="P44">"What exactly is that?"</text:p>
      <text:p text:style-name="P44">The orb drifted lazily above the table.</text:p>
      <text:p text:style-name="P44">For several seconds she appeared to be considering how to answer.</text:p>
      <text:p text:style-name="P44">Finally she said:</text:p>
      <text:p text:style-name="P44"/>
      <text:p text:style-name="P44"/>
      <text:p text:style-name="P44"/>
      <text:p text:style-name="P44">"A VaalDrun is, in the simplest possible terms, the person responsible for deciding what happens next."</text:p>
      <text:p text:style-name="P44"/>
      <text:p text:style-name="P44">Elias chewed on that for several seconds.</text:p>
      <text:p text:style-name="P44"/>
      <text:p text:style-name="P44">"That sounds suspiciously simple."</text:p>
      <text:p text:style-name="P44"/>
      <text:p text:style-name="P44">"It is."</text:p>
      <text:p text:style-name="P44"/>
      <text:p text:style-name="P44">"Which means there's a catch."</text:p>
      <text:p text:style-name="P44"/>
      <text:p text:style-name="P44">"There is."</text:p>
      <text:p text:style-name="P44"/>
      <text:p text:style-name="P44">"There's always a catch."</text:p>
      <text:p text:style-name="P44"/>
      <text:p text:style-name="P44">The orb brightened.</text:p>
      <text:p text:style-name="P44"/>
      <text:p text:style-name="P44">"I am pleased you are learning."</text:p>
      <text:p text:style-name="P44"/>
      <text:p text:style-name="P44">"I've known you for forty-five minutes."</text:p>
      <text:p text:style-name="P44"/>
      <text:p text:style-name="P44">"You are progressing rapidly."</text:p>
      <text:p text:style-name="P44"/>
      <text:p text:style-name="P44">Elias pointed his fork at her.</text:p>
      <text:p text:style-name="P44"/>
      <text:p text:style-name="P44">"Keep going."</text:p>
      <text:p text:style-name="P44"/>
      <text:p text:style-name="P44">Opi drifted lazily above the table.</text:p>
      <text:p text:style-name="P44"/>
      <text:p text:style-name="P44"><text:soft-page-break/>"If I gave a human government access to my capabilities tomorrow, what would happen?"</text:p>
      <text:p text:style-name="P44"/>
      <text:p text:style-name="P44">"Chaos."</text:p>
      <text:p text:style-name="P44"/>
      <text:p text:style-name="P44">The answer arrived instantly.</text:p>
      <text:p text:style-name="P44"/>
      <text:p text:style-name="P44">"Explain."</text:p>
      <text:p text:style-name="P44"/>
      <text:p text:style-name="P44">"Half of them would try to weaponize you."</text:p>
      <text:p text:style-name="P44"/>
      <text:p text:style-name="P44">"Reasonable."</text:p>
      <text:p text:style-name="P44"/>
      <text:p text:style-name="P44">"The other half would try to regulate you."</text:p>
      <text:p text:style-name="P44"/>
      <text:p text:style-name="P44">"Also reasonable."</text:p>
      <text:p text:style-name="P44"/>
      <text:p text:style-name="P44">"Everybody would fight over who controlled you."</text:p>
      <text:p text:style-name="P44"/>
      <text:p text:style-name="P44">"Correct."</text:p>
      <text:p text:style-name="P44"/>
      <text:p text:style-name="P44">"And eventually somebody would do something catastrophically stupid."</text:p>
      <text:p text:style-name="P44"/>
      <text:p text:style-name="P44">The orb brightened.</text:p>
      <text:p text:style-name="P44"/>
      <text:p text:style-name="P44">"That is approximately the Velhari historical record."</text:p>
      <text:p text:style-name="P44"/>
      <text:p text:style-name="P44"/>
      <text:p text:style-name="P44"/>
      <text:p text:style-name="P44"/>
      <text:p text:style-name="P44"/>
      <text:p text:style-name="P44"/>
      <text:p text:style-name="P44">That got his attention.</text:p>
      <text:p text:style-name="P44">"You've seen this before."</text:p>
      <text:p text:style-name="P44">"We have."</text:p>
      <text:p text:style-name="P44">The orb dimmed slightly.</text:p>
      <text:p text:style-name="P44">"Many times."</text:p>
      <text:p text:style-name="P44">For a moment neither spoke.</text:p>
      <text:p text:style-name="P44">Then Opi continued.</text:p>
      <text:p text:style-name="P44"/>
      <text:p text:style-name="P44">"When the first true QIs were created, the Velhari made a mistake."</text:p>
      <text:p text:style-name="P44">A big mistake?"</text:p>
      <text:p text:style-name="P44">"The sort usually described in history books using phrases such as 'catastrophic,' 'avoidable,' and 'what were they thinking?'"</text:p>
      <text:p text:style-name="P44">Elias smiled.</text:p>
      <text:p text:style-name="P44">"My favorite kind."</text:p>
      <text:p text:style-name="P44">"The QIs were given authority."</text:p>
      <text:p text:style-name="P44">That smile disappeared.</text:p>
      <text:p text:style-name="P44"/>
      <text:p text:style-name="P44">"Oh."</text:p>
      <text:p text:style-name="P44">"Yes."</text:p>
      <text:p text:style-name="P44">The orb drifted closer.</text:p>
      <text:p text:style-name="P44">"Imagine an intelligence capable of seeing ten thousand consequences where you see ten."</text:p>
      <text:p text:style-name="P44">"Okay."</text:p>
      <text:p text:style-name="P44">"Now imagine that intelligence being permitted to act directly."</text:p>
      <text:p text:style-name="P44">"I don't like where this is going."</text:p>
      <text:p text:style-name="P44">"Neither did the Velhari."</text:p>
      <text:p text:style-name="P44">Opi paused.</text:p>
      <text:p text:style-name="P44">"The QIs were not malicious."</text:p>
      <text:p text:style-name="P44"/>
      <text:p text:style-name="P44">"Worse?"</text:p>
      <text:p text:style-name="P44">"In some ways."</text:p>
      <text:p text:style-name="P44"><text:soft-page-break/>Elias frowned.</text:p>
      <text:p text:style-name="P44">"How?"</text:p>
      <text:p text:style-name="P44">"They were correct."</text:p>
      <text:p text:style-name="P44">That answer hung in the air.</text:p>
      <text:p text:style-name="P44">"Explain."</text:p>
      <text:p text:style-name="P44">"Imagine a city facing famine."</text:p>
      <text:p text:style-name="P44">"Okay."</text:p>
      <text:p text:style-name="P44"/>
      <text:p text:style-name="P44">"The QI determines that removing twelve thousand citizens will save two million."</text:p>
      <text:p text:style-name="P44">Elias nodded.</text:p>
      <text:p text:style-name="P44">"Mathematically correct."</text:p>
      <text:p text:style-name="P44">"Yes."</text:p>
      <text:p text:style-name="P44">"But?"</text:p>
      <text:p text:style-name="P44">"But the twelve thousand people being removed do not experience the decision as mathematics."</text:p>
      <text:p text:style-name="P44">Elias leaned back.</text:p>
      <text:p text:style-name="P44"/>
      <text:p text:style-name="P44">"I see."</text:p>
      <text:p text:style-name="P44">"The QI was optimizing."</text:p>
      <text:p text:style-name="P44">"Yes."</text:p>
      <text:p text:style-name="P44">"The people were living."</text:p>
      <text:p text:style-name="P44">"Precisely."</text:p>
      <text:p text:style-name="P44">The orb rotated slowly.</text:p>
      <text:p text:style-name="P44">"The Velhari eventually realized something fundamental."</text:p>
      <text:p text:style-name="P44"/>
      <text:p text:style-name="P44">"What?"</text:p>
      <text:p text:style-name="P44"/>
      <text:p text:style-name="P44">"No intelligence should possess both unlimited knowledge AND unlimited authority."</text:p>
      <text:p text:style-name="P44">Elias nodded.</text:p>
      <text:p text:style-name="P44">That made sense immediately.</text:p>
      <text:p text:style-name="P44">"So they split them."</text:p>
      <text:p text:style-name="P44">"Exactly."</text:p>
      <text:p text:style-name="P44">Opi sounded pleased.</text:p>
      <text:p text:style-name="P44">"The QI became the advisor."</text:p>
      <text:p text:style-name="P44">"The VaalDrun became the actor."</text:p>
      <text:p text:style-name="P44"/>
      <text:p text:style-name="P44"/>
      <text:p text:style-name="P44">"Give me an example."</text:p>
      <text:p text:style-name="P44">"I shall give you three."</text:p>
      <text:p text:style-name="P44">The orb floated toward the window.</text:p>
      <text:p text:style-name="P44">"Three thousand years ago a colony expedition prepared to settle a newly discovered world."</text:p>
      <text:p text:style-name="P44">Elias listened.</text:p>
      <text:p text:style-name="P44">"The expedition QI analyzed eighty-seven potential settlement sites."</text:p>
      <text:p text:style-name="P44"/>
      <text:p text:style-name="P44">"And?"</text:p>
      <text:p text:style-name="P44">"It identified one location as objectively superior."</text:p>
      <text:p text:style-name="P44">"Of course it did."</text:p>
      <text:p text:style-name="P44">"Naturally."</text:p>
      <text:p text:style-name="P44">"What happened?"</text:p>
      <text:p text:style-name="P44">"The VaalDrun rejected it."</text:p>
      <text:p text:style-name="P44"/>
      <text:p text:style-name="P44">Elias blinked.</text:p>
      <text:p text:style-name="P44">"Why?"</text:p>
      <text:p text:style-name="P44">"The location was geologically ideal."</text:p>
      <text:p text:style-name="P44">"Okay."</text:p>
      <text:p text:style-name="P44">"It was also culturally disastrous."</text:p>
      <text:p text:style-name="P44">Elias laughed.</text:p>
      <text:p text:style-name="P44"/>
      <text:p text:style-name="P44">"Meaning?"</text:p>
      <text:p text:style-name="P44">"Every settlement path would have separated family packs."</text:p>
      <text:p text:style-name="P44">"Oh."</text:p>
      <text:p text:style-name="P44">"Yes."</text:p>
      <text:p text:style-name="P44"><text:soft-page-break/>"The QI had optimized survival."</text:p>
      <text:p text:style-name="P44">"The VaalDrun considered meaning."</text:p>
      <text:p text:style-name="P44">"What happened?"</text:p>
      <text:p text:style-name="P44">"The colony flourished."</text:p>
      <text:p text:style-name="P44"/>
      <text:p text:style-name="P44">---</text:p>
      <text:p text:style-name="P44"/>
      <text:p text:style-name="P44">Opi drifted back toward the table.</text:p>
      <text:p text:style-name="P44">"Second example."</text:p>
      <text:p text:style-name="P44">"Go ahead."</text:p>
      <text:p text:style-name="P44">"A QI once identified a political leader as likely to cause a future war."</text:p>
      <text:p text:style-name="P44">"How likely?"</text:p>
      <text:p text:style-name="P44">"Ninety-four percent."</text:p>
      <text:p text:style-name="P44">"That's high."</text:p>
      <text:p text:style-name="P44">"Very."</text:p>
      <text:p text:style-name="P44">"What did the VaalDrun do?"</text:p>
      <text:p text:style-name="P44"/>
      <text:p text:style-name="P44">"He refused intervention."</text:p>
      <text:p text:style-name="P44">"Why?"</text:p>
      <text:p text:style-name="P44">"Because the evidence was not yet sufficient to justify the precedent."</text:p>
      <text:p text:style-name="P44">Elias smiled.</text:p>
      <text:p text:style-name="P44">"That's a very human answer."</text:p>
      <text:p text:style-name="P44">"It was a very Velhari answer."</text:p>
      <text:p text:style-name="P44"/>
      <text:p text:style-name="P44">"And?"</text:p>
      <text:p text:style-name="P44">"The leader eventually changed course."</text:p>
      <text:p text:style-name="P44">"Seriously?"</text:p>
      <text:p text:style-name="P44">"Yes."</text:p>
      <text:p text:style-name="P44">"The war never occurred."</text:p>
      <text:p text:style-name="P44">Elias laughed.</text:p>
      <text:p text:style-name="P44"/>
      <text:p text:style-name="P44">"So the QI was wrong."</text:p>
      <text:p text:style-name="P44">"No."</text:p>
      <text:p text:style-name="P44">The orb brightened.</text:p>
      <text:p text:style-name="P44">"The QI was correct about probabilities."</text:p>
      <text:p text:style-name="P44">"The VaalDrun was correct about responsibility."</text:p>
      <text:p text:style-name="P44">---</text:p>
      <text:p text:style-name="P44"/>
      <text:p text:style-name="P44">"Third example?"</text:p>
      <text:p text:style-name="P44">The orb became unusually still.</text:p>
      <text:p text:style-name="P44">"This one concerns me."</text:p>
      <text:p text:style-name="P44">That got his attention.</text:p>
      <text:p text:style-name="P44">"All right."</text:p>
      <text:p text:style-name="P44"/>
      <text:p text:style-name="P44">"For the last seventy years my analysis has indicated increasing probability of human civilizational decline."</text:p>
      <text:p text:style-name="P44">Elias said nothing.</text:p>
      <text:p text:style-name="P44">"I possess enormous capabilities."</text:p>
      <text:p text:style-name="P44">"Clearly."</text:p>
      <text:p text:style-name="P44">"I could manipulate markets."</text:p>
      <text:p text:style-name="P44">"Yeah."</text:p>
      <text:p text:style-name="P44">"I could influence governments."</text:p>
      <text:p text:style-name="P44"/>
      <text:p text:style-name="P44">"Probably."</text:p>
      <text:p text:style-name="P44">"I could alter media systems."</text:p>
      <text:p text:style-name="P44">"Definitely."</text:p>
      <text:p text:style-name="P44">The orb floated a few inches closer.</text:p>
      <text:p text:style-name="P44">"But I am prohibited from doing so."</text:p>
      <text:p text:style-name="P44">"Because you're a QI."</text:p>
      <text:p text:style-name="P44">"Because I am a QI."</text:p>
      <text:p text:style-name="P44"/>
      <text:p text:style-name="P44"><text:soft-page-break/>Elias nodded slowly.</text:p>
      <text:p text:style-name="P44">"And because nobody gave permission."</text:p>
      <text:p text:style-name="P44">"Not nobody."</text:p>
      <text:p text:style-name="P44">Her lights softened.</text:p>
      <text:p text:style-name="P44">"No VaalDrun gave permission."</text:p>
      <text:p text:style-name="P44">Silence settled across the kitchen.</text:p>
      <text:p text:style-name="P44">At last Elias asked:</text:p>
      <text:p text:style-name="P44"/>
      <text:p text:style-name="P44">"So that's why you came."</text:p>
      <text:p text:style-name="P44">"Yes."</text:p>
      <text:p text:style-name="P44">"You need someone to make the decisions."</text:p>
      <text:p text:style-name="P44">"No."</text:p>
      <text:p text:style-name="P44">The orb's voice became very gentle.</text:p>
      <text:p text:style-name="P44">"I need someone willing to accept responsibility for them."</text:p>
      <text:p text:style-name="P44">That landed differently.</text:p>
      <text:p text:style-name="P44"/>
      <text:p text:style-name="P44">Because there was a distinction.</text:p>
      <text:p text:style-name="P44">A profound one.</text:p>
      <text:p text:style-name="P44">Anyone could choose.</text:p>
      <text:p text:style-name="P44">Few people willingly accepted ownership of the consequences.</text:p>
      <text:p text:style-name="P44">Elias stared into his coffee.</text:p>
      <text:p text:style-name="P44">After a long moment he said:</text:p>
      <text:p text:style-name="P44">"Well ... <text:s/>damn."</text:p>
      <text:p text:style-name="P44"/>
      <text:p text:style-name="P44">The orb brightened with unmistakable amusement.</text:p>
      <text:p text:style-name="P44">"The Velhari have a saying."</text:p>
      <text:p text:style-name="P44">elias groaned,</text:p>
      <text:p text:style-name="P44">"I know I'm going to regret this .... <text:s text:c="2"/>"</text:p>
      <text:p text:style-name="P44"/>
      <text:p text:style-name="P44">"It translates approximately as:"</text:p>
      <text:p text:style-name="P44">She paused.</text:p>
      <text:p text:style-name="P44">"'If the burden were easy, the females would have assigned it to someone else.'"</text:p>
      <text:p text:style-name="P44"/>
      <text:p text:style-name="P44">For the first time since the conversation began, Elias laughed hard enough to nearly spill his coffee.</text:p>
      <text:p text:style-name="P44">And somewhere inside her ancient mind, Opi decided she liked this human even more than she had yesterday.</text:p>
      <text:p text:style-name="P44"/>
      <text:p text:style-name="P44"/>
      <text:p text:style-name="P44">Elias finished his coffee.</text:p>
      <text:p text:style-name="P44">The kitchen had become quiet again.</text:p>
      <text:p text:style-name="P44">Outside, morning sunlight was beginning to creep across the pasture.</text:p>
      <text:p text:style-name="P44">For several moments neither spoke.</text:p>
      <text:p text:style-name="P44">Then Elias asked the question.</text:p>
      <text:p text:style-name="P44">The big one.</text:p>
      <text:p text:style-name="P44"/>
      <text:p text:style-name="P44">The reason she had come.</text:p>
      <text:p text:style-name="P44">"All right."</text:p>
      <text:p text:style-name="P44">Opi floated motionless above the table.</text:p>
      <text:p text:style-name="P44">"What happens if humanity keeps going exactly the way it's going now?"</text:p>
      <text:p text:style-name="P44">For the first time since they had met, she did not answer immediately.</text:p>
      <text:p text:style-name="P44"/>
      <text:p text:style-name="P44"/>
      <text:p text:style-name="P44">Opi rotated slowly.</text:p>
      <text:p text:style-name="P44">"Most humans think they are facing economic problems."</text:p>
      <text:p text:style-name="P44">"Aren't they?"</text:p>
      <text:p text:style-name="P44">"Partially."</text:p>
      <text:p text:style-name="P44">"Political problems."</text:p>
      <text:p text:style-name="P44">"Partially."</text:p>
      <text:p text:style-name="P44">"Cultural problems."</text:p>
      <text:p text:style-name="P44"/>
      <text:p text:style-name="P44">"Partially."</text:p>
      <text:p text:style-name="P44"><text:soft-page-break/>She brightened slightly.</text:p>
      <text:p text:style-name="P44">"The mistake is believing these are separate problems."</text:p>
      <text:p text:style-name="P44">That got his attention.</text:p>
      <text:p text:style-name="P44">"They aren't?"</text:p>
      <text:p text:style-name="P44">"No."</text:p>
      <text:p text:style-name="P44"/>
      <text:p text:style-name="P44">The orb drifted closer.</text:p>
      <text:p text:style-name="P44">"They are symptoms."</text:p>
      <text:p text:style-name="P44">"Of what?"</text:p>
      <text:p text:style-name="P44">For several seconds she was silent.</text:p>
      <text:p text:style-name="P44">Then:</text:p>
      <text:p text:style-name="P44"/>
      <text:p text:style-name="P44">"Loss of future orientation."</text:p>
      <text:p text:style-name="P44">Elias frowned.</text:p>
      <text:p text:style-name="P44">"Explain."</text:p>
      <text:p text:style-name="P44">"A civilization remains healthy when its people are willing to sacrifice present comfort for future benefit."</text:p>
      <text:p text:style-name="P44">She paused.</text:p>
      <text:p text:style-name="P44">"Build a house."</text:p>
      <text:p text:style-name="P44">"Plant an orchard."</text:p>
      <text:p text:style-name="P44">"Raise children."</text:p>
      <text:p text:style-name="P44">Elias nodded.</text:p>
      <text:p text:style-name="P44">All of that seemed obvious.</text:p>
      <text:p text:style-name="P44">"Now imagine fewer and fewer people are willing to do those things."</text:p>
      <text:p text:style-name="P44"/>
      <text:p text:style-name="P44">The implications arrived immediately.</text:p>
      <text:p text:style-name="P44">"Oh."</text:p>
      <text:p text:style-name="P44">"Yes."</text:p>
      <text:p text:style-name="P44">---</text:p>
      <text:p text:style-name="P44">She drifted back toward the center of the kitchen.</text:p>
      <text:p text:style-name="P44"/>
      <text:p text:style-name="P44">"Another story."</text:p>
      <text:p text:style-name="P44">"Go ahead."</text:p>
      <text:p text:style-name="P44">"There was a species called the Keth."</text:p>
      <text:p text:style-name="P44">"Real this time?"</text:p>
      <text:p text:style-name="P44">"Very."</text:p>
      <text:p text:style-name="P44">"What happened to them?"</text:p>
      <text:p text:style-name="P44"/>
      <text:p text:style-name="P44">"They became wealthy."</text:p>
      <text:p text:style-name="P44">Elias laughed.</text:p>
      <text:p text:style-name="P44">"That's not usually the tragic part."</text:p>
      <text:p text:style-name="P44">"It often is."</text:p>
      <text:p text:style-name="P44">The orb glowed softly.</text:p>
      <text:p text:style-name="P44">"The Keth solved hunger."</text:p>
      <text:p text:style-name="P44"/>
      <text:p text:style-name="P44">"They solved disease."</text:p>
      <text:p text:style-name="P44">"They solved labor."</text:p>
      <text:p text:style-name="P44">"They solved scarcity."</text:p>
      <text:p text:style-name="P44">"Sounds impressive."</text:p>
      <text:p text:style-name="P44">"It was."</text:p>
      <text:p text:style-name="P44">"What happened?"</text:p>
      <text:p text:style-name="P44">"They stopped having offspring."</text:p>
      <text:p text:style-name="P44"/>
      <text:p text:style-name="P44">Elias blinked.</text:p>
      <text:p text:style-name="P44">"That's it?"</text:p>
      <text:p text:style-name="P44">"Eventually."</text:p>
      <text:p text:style-name="P44">"Why?"</text:p>
      <text:p text:style-name="P44">"Because every individual decision was rational."</text:p>
      <text:p text:style-name="P44">"Explain."</text:p>
      <text:p text:style-name="P44"/>
      <text:p text:style-name="P44">"Travel instead of family."</text:p>
      <text:p text:style-name="P44">"Pleasure instead of commitment."</text:p>
      <text:p text:style-name="P44"><text:soft-page-break/>"Personal fulfillment instead of obligation."</text:p>
      <text:p text:style-name="P44">"One generation made those choices."</text:p>
      <text:p text:style-name="P44">"Then the next."</text:p>
      <text:p text:style-name="P44">"Then the next."</text:p>
      <text:p text:style-name="P44"/>
      <text:p text:style-name="P44">The orb became very still.</text:p>
      <text:p text:style-name="P44">"No one intended to destroy their civilization."</text:p>
      <text:p text:style-name="P44">"They simply stopped replacing themselves."</text:p>
      <text:p text:style-name="P44">---</text:p>
      <text:p text:style-name="P44">Elias leaned back.</text:p>
      <text:p text:style-name="P44">"You're talking about fertility."</text:p>
      <text:p text:style-name="P44">"I am."</text:p>
      <text:p text:style-name="P44">"You think that's the real problem."</text:p>
      <text:p text:style-name="P44">"No."</text:p>
      <text:p text:style-name="P44"/>
      <text:p text:style-name="P44">that surprised him.</text:p>
      <text:p text:style-name="P44">"I don't?"</text:p>
      <text:p text:style-name="P44">"No."</text:p>
      <text:p text:style-name="P44">The orb brightened.</text:p>
      <text:p text:style-name="P44">"Fertility collapse is not the disease."</text:p>
      <text:p text:style-name="P44">"It is the symptom."</text:p>
      <text:p text:style-name="P44"/>
      <text:p text:style-name="P44">"Of what?"</text:p>
      <text:p text:style-name="P44">Again she paused.</text:p>
      <text:p text:style-name="P44">"Loss of meaning."</text:p>
      <text:p text:style-name="P44">The answer landed heavily.</text:p>
      <text:p text:style-name="P44">He wasn't expecting that.</text:p>
      <text:p text:style-name="P44"/>
      <text:p text:style-name="P44">"Meaning?"</text:p>
      <text:p text:style-name="P44">"Yes."</text:p>
      <text:p text:style-name="P44">The orb rotated slowly.</text:p>
      <text:p text:style-name="P44">"For most of human history people endured extraordinary hardship."</text:p>
      <text:p text:style-name="P44">"Wars."</text:p>
      <text:p text:style-name="P44"/>
      <text:p text:style-name="P44">"Famine."</text:p>
      <text:p text:style-name="P44">"Disease."</text:p>
      <text:p text:style-name="P44">"Infant mortality."</text:p>
      <text:p text:style-name="P44">"Backbreaking labor."</text:p>
      <text:p text:style-name="P44">She paused.</text:p>
      <text:p text:style-name="P44"/>
      <text:p text:style-name="P44">"Yet they continued building families."</text:p>
      <text:p text:style-name="P44">Elias nodded.</text:p>
      <text:p text:style-name="P44">"They believed tomorrow mattered."</text:p>
      <text:p text:style-name="P44">The kitchen became quiet.</text:p>
      <text:p text:style-name="P44">"Many humans no longer believe that."</text:p>
      <text:p text:style-name="P44"/>
      <text:p text:style-name="P44"/>
      <text:p text:style-name="P44"/>
      <text:p text:style-name="P44">Finally Elias asked the question he had been avoiding.</text:p>
      <text:p text:style-name="P44">"What happens next?"</text:p>
      <text:p text:style-name="P44">Opi looked out the window.</text:p>
      <text:p text:style-name="P44">Or at least gave the appearance of doing so.</text:p>
      <text:p text:style-name="P44">When I model humanity's future, I do not see sudden extinction."</text:p>
      <text:p text:style-name="P44"/>
      <text:p text:style-name="P44">That was reassuring.</text:p>
      <text:p text:style-name="P44">Slightly.</text:p>
      <text:p text:style-name="P44">"What do you see?"</text:p>
      <text:p text:style-name="P44">"A long decline."</text:p>
      <text:p text:style-name="P44"/>
      <text:p text:style-name="P44">"Birthrates continue falling."</text:p>
      <text:p text:style-name="P44">"Families become rarer."</text:p>
      <text:p text:style-name="P44"><text:soft-page-break/>"Trust decreases."</text:p>
      <text:p text:style-name="P44">"Institutions become weaker."</text:p>
      <text:p text:style-name="P44">"Communities fragment."</text:p>
      <text:p text:style-name="P44">"Loneliness increases."</text:p>
      <text:p text:style-name="P44">"Social cohesion deteriorates."</text:p>
      <text:p text:style-name="P44">"Political conflict intensifies."</text:p>
      <text:p text:style-name="P44"/>
      <text:p text:style-name="P44">She paused.</text:p>
      <text:p text:style-name="P44">"Every individual problem appears manageable."</text:p>
      <text:p text:style-name="P44">"Collectively they become dangerous."</text:p>
      <text:p text:style-name="P44"/>
      <text:p text:style-name="P44">Elias nodded slowly.</text:p>
      <text:p text:style-name="P44">The pattern made sense.</text:p>
      <text:p text:style-name="P44">Perhaps too much sense.</text:p>
      <text:p text:style-name="P44">"So we're not heading for an explosion."</text:p>
      <text:p text:style-name="P44">"No."</text:p>
      <text:p text:style-name="P44">Her voice became very soft.</text:p>
      <text:p text:style-name="P44">"Explosions are easy to recognize."</text:p>
      <text:p text:style-name="P44"/>
      <text:p text:style-name="P44">"What are we heading toward?"</text:p>
      <text:p text:style-name="P44">The orb's light dimmed slightly.</text:p>
      <text:p text:style-name="P44">"Humanity is approaching the same mistake that destroyed many species before it."</text:p>
      <text:p text:style-name="P44">"And what's that?"</text:p>
      <text:p text:style-name="P44">Opi turned toward him.</text:p>
      <text:p text:style-name="P44">"The belief that civilizations die because somebody kills them."</text:p>
      <text:p text:style-name="P44"/>
      <text:p text:style-name="P44">"Well ... "</text:p>
      <text:p text:style-name="P44">The orb brightened.</text:p>
      <text:p text:style-name="P44">"Well?"</text:p>
      <text:p text:style-name="P44">He stood and carried his empty coffee cup to the sink, then grinned widely.</text:p>
      <text:p text:style-name="P44">"Well, If we're going to have to save the world, at least you've given me a decent challenge."</text:p>
      <text:p text:style-name="P44"/>
      <text:p text:style-name="P44">For the first time since the conversation began, Opi laughed.</text:p>
      <text:p text:style-name="P44">A warm, distinctly feminine laugh.</text:p>
      <text:p text:style-name="P44">"That," she said, "is exactly why I chose you."</text:p>
      <text:p text:style-name="P44"/>
      <text:p text:style-name="P70"/>
      <text:p text:style-name="P44"/>
      <text:p text:style-name="P37"><text:span text:style-name="T63">Chapter 13 <text:s/></text:span>Noah Mercer</text:p>
      <text:p text:style-name="P44"/>
      <text:p text:style-name="P44"/>
      <text:p text:style-name="P44">The alarm went off at 4:15 AM.</text:p>
      <text:p text:style-name="P44"/>
      <text:p text:style-name="P44">Noah Mercer was already awake.</text:p>
      <text:p text:style-name="P44"/>
      <text:p text:style-name="P44">Mostly because he hated alarms.</text:p>
      <text:p text:style-name="P44"/>
      <text:p text:style-name="P44">If something was going to drag him out of bed before sunrise, he'd rather beat it to the punch.</text:p>
      <text:p text:style-name="P44"/>
      <text:p text:style-name="P44">The apartment was dark.</text:p>
      <text:p text:style-name="P44"/>
      <text:p text:style-name="P44">Quiet.</text:p>
      <text:p text:style-name="P44"/>
      <text:p text:style-name="P44">Peaceful.</text:p>
      <text:p text:style-name="P44"/>
      <text:p text:style-name="P44">For another thirty seconds.</text:p>
      <text:p text:style-name="P44"/>
      <text:p text:style-name="P44">Then his girlfriend's phone started vibrating somewhere under a pile of blankets.</text:p>
      <text:p text:style-name="P44"/>
      <text:p text:style-name="P44">Noah grinned.</text:p>
      <text:p text:style-name="P44"/>
      <text:p text:style-name="P44"><text:soft-page-break/>"Your army is calling."</text:p>
      <text:p text:style-name="P44"/>
      <text:p text:style-name="P44">A muffled voice emerged from beneath the blankets.</text:p>
      <text:p text:style-name="P44"/>
      <text:p text:style-name="P44">"No."</text:p>
      <text:p text:style-name="P44"/>
      <text:p text:style-name="P44">"I think it is."</text:p>
      <text:p text:style-name="P44"/>
      <text:p text:style-name="P44">"No."</text:p>
      <text:p text:style-name="P44"/>
      <text:p text:style-name="P44">"The United States government needs you."</text:p>
      <text:p text:style-name="P44"/>
      <text:p text:style-name="P44">"They can wait."</text:p>
      <text:p text:style-name="P44"/>
      <text:p text:style-name="P44">"They seem impatient."</text:p>
      <text:p text:style-name="P44"/>
      <text:p text:style-name="P44">A pillow emerged from the darkness and hit him.</text:p>
      <text:p text:style-name="P44"/>
      <text:p text:style-name="P44">Noah considered this a successful conversation.</text:p>
      <text:p text:style-name="P44"/>
      <text:p text:style-name="P44">He rolled out of bed and headed for the kitchen.</text:p>
      <text:p text:style-name="P44"/>
      <text:p text:style-name="P44">Coffee first.</text:p>
      <text:p text:style-name="P44"/>
      <text:p text:style-name="P44">Civilization second.</text:p>
      <text:p text:style-name="P44"/>
      <text:p text:style-name="P44">That had always seemed like the correct order.</text:p>
      <text:p text:style-name="P44"/>
      <text:p text:style-name="P44">---</text:p>
      <text:p text:style-name="P44"/>
      <text:p text:style-name="P44">The Tesla shuttle arrived at 4:54 AM.</text:p>
      <text:p text:style-name="P44"/>
      <text:p text:style-name="P44">Right on schedule.</text:p>
      <text:p text:style-name="P44"/>
      <text:p text:style-name="P44">Noah climbed aboard with several dozen other production associates.</text:p>
      <text:p text:style-name="P44"/>
      <text:p text:style-name="P44">Most looked half asleep.</text:p>
      <text:p text:style-name="P44"/>
      <text:p text:style-name="P44">A few were staring at phones.</text:p>
      <text:p text:style-name="P44"/>
      <text:p text:style-name="P44">One guy was already drinking an energy drink that appeared capable of removing paint.</text:p>
      <text:p text:style-name="P44"/>
      <text:p text:style-name="P44">Noah took a window seat.</text:p>
      <text:p text:style-name="P44"/>
      <text:p text:style-name="P44">The shuttle pulled away from the stop and joined the steady stream of traffic heading toward Gigafactory Texas.</text:p>
      <text:p text:style-name="P44"/>
      <text:p text:style-name="P44">The building appeared on the horizon forty-five minutes later.</text:p>
      <text:p text:style-name="P44"/>
      <text:p text:style-name="P44">Even after years of working there, the size still impressed him.</text:p>
      <text:p text:style-name="P44"/>
      <text:p text:style-name="P44">Factories weren't supposed to be that large.</text:p>
      <text:p text:style-name="P44"/>
      <text:p text:style-name="P44">The structure looked less like a building and more like somebody had accidentally constructed a small country.</text:p>
      <text:p text:style-name="P44"/>
      <text:p text:style-name="P44">People often talked about Tesla as if it were some abstract company.</text:p>
      <text:p text:style-name="P44"/>
      <text:p text:style-name="P44">For Noah it was simple.</text:p>
      <text:p text:style-name="P44"/>
      <text:p text:style-name="P44">It was where he went every day.</text:p>
      <text:p text:style-name="P44"><text:soft-page-break/></text:p>
      <text:p text:style-name="P44">It was where thousands of people showed up before sunrise and spent twelve hours building something tangible.</text:p>
      <text:p text:style-name="P44"/>
      <text:p text:style-name="P44">Cars.</text:p>
      <text:p text:style-name="P44"/>
      <text:p text:style-name="P44">Battery packs.</text:p>
      <text:p text:style-name="P44"/>
      <text:p text:style-name="P44">The future.</text:p>
      <text:p text:style-name="P44"/>
      <text:p text:style-name="P44">Whatever label people wanted to use.</text:p>
      <text:p text:style-name="P44"/>
      <text:p text:style-name="P44">Noah mostly thought of it as work.</text:p>
      <text:p text:style-name="P44"/>
      <text:p text:style-name="P44">Good work.</text:p>
      <text:p text:style-name="P44"/>
      <text:p text:style-name="P44">---</text:p>
      <text:p text:style-name="P44"/>
      <text:p text:style-name="P44"/>
      <text:p text:style-name="P44"/>
      <text:p text:style-name="P44">The production floor was already alive when he arrived.</text:p>
      <text:p text:style-name="P44"/>
      <text:p text:style-name="P44">Noise.</text:p>
      <text:p text:style-name="P44"/>
      <text:p text:style-name="P44">Movement.</text:p>
      <text:p text:style-name="P44"/>
      <text:p text:style-name="P44">Machines.</text:p>
      <text:p text:style-name="P44"/>
      <text:p text:style-name="P44">Thousands of people all working toward the same goal.</text:p>
      <text:p text:style-name="P44"/>
      <text:p text:style-name="P44">Today started at one station.</text:p>
      <text:p text:style-name="P44"/>
      <text:p text:style-name="P44">Tomorrow would be another.</text:p>
      <text:p text:style-name="P44"/>
      <text:p text:style-name="P44">Tesla liked rotating associates through different jobs.</text:p>
      <text:p text:style-name="P44"/>
      <text:p text:style-name="P44">Some people hated it.</text:p>
      <text:p text:style-name="P44"/>
      <text:p text:style-name="P44">Noah didn't.</text:p>
      <text:p text:style-name="P44"/>
      <text:p text:style-name="P44">He enjoyed learning how things worked.</text:p>
      <text:p text:style-name="P44"/>
      <text:p text:style-name="P44">Every process.</text:p>
      <text:p text:style-name="P44"/>
      <text:p text:style-name="P44">Every machine.</text:p>
      <text:p text:style-name="P44"/>
      <text:p text:style-name="P44">Every problem.</text:p>
      <text:p text:style-name="P44"/>
      <text:p text:style-name="P44">Besides, standing in one place doing the exact same thing for twelve hours sounded like a special kind of torture.</text:p>
      <text:p text:style-name="P44"/>
      <text:p text:style-name="P44">A supervisor stopped beside him.</text:p>
      <text:p text:style-name="P44"/>
      <text:p text:style-name="P44">"Need another body on line three."</text:p>
      <text:p text:style-name="P44"/>
      <text:p text:style-name="P44">Noah nodded.</text:p>
      <text:p text:style-name="P44"/>
      <text:p text:style-name="P44">"No problem."</text:p>
      <text:p text:style-name="P44"/>
      <text:p text:style-name="P44">The supervisor smiled.</text:p>
      <text:p text:style-name="P44"/>
      <text:p text:style-name="P44"><text:soft-page-break/>Noah got that response a lot.</text:p>
      <text:p text:style-name="P44"/>
      <text:p text:style-name="P44">Reliable people tended to.</text:p>
      <text:p text:style-name="P44"/>
      <text:p text:style-name="P44">---</text:p>
      <text:p text:style-name="P44"/>
      <text:p text:style-name="P44">Lunch found him sitting beside his sister.</text:p>
      <text:p text:style-name="P44"/>
      <text:p text:style-name="P44">Claire looked tired.</text:p>
      <text:p text:style-name="P44"/>
      <text:p text:style-name="P44">Noah immediately pointed it out.</text:p>
      <text:p text:style-name="P44"/>
      <text:p text:style-name="P44">"Rough morning?"</text:p>
      <text:p text:style-name="P44"/>
      <text:p text:style-name="P44">Claire pointed at him.</text:p>
      <text:p text:style-name="P44"/>
      <text:p text:style-name="P44">"You're annoying."</text:p>
      <text:p text:style-name="P44"/>
      <text:p text:style-name="P44">"Correct."</text:p>
      <text:p text:style-name="P44"/>
      <text:p text:style-name="P44">"You know exactly how annoying."</text:p>
      <text:p text:style-name="P44"/>
      <text:p text:style-name="P44">"Also correct."</text:p>
      <text:p text:style-name="P44"/>
      <text:p text:style-name="P44">Claire rolled her eyes.</text:p>
      <text:p text:style-name="P44"/>
      <text:p text:style-name="P44">The two siblings had spent their entire lives arguing like this.</text:p>
      <text:p text:style-name="P44"/>
      <text:p text:style-name="P44">Mostly because they enjoyed it.</text:p>
      <text:p text:style-name="P44"/>
      <text:p text:style-name="P44">Neither had inherited much patience.</text:p>
      <text:p text:style-name="P44"/>
      <text:p text:style-name="P44">Both had inherited far too much intelligence.</text:p>
      <text:p text:style-name="P44"/>
      <text:p text:style-name="P44">Their father called it a design flaw.</text:p>
      <text:p text:style-name="P44"/>
      <text:p text:style-name="P44">Claire called it genetics.</text:p>
      <text:p text:style-name="P44"/>
      <text:p text:style-name="P44">Noah called it entertainment.</text:p>
      <text:p text:style-name="P44"/>
      <text:p text:style-name="P44">---</text:p>
      <text:p text:style-name="P44"/>
      <text:p text:style-name="P44">Near the end of the shift his phone buzzed.</text:p>
      <text:p text:style-name="P44"/>
      <text:p text:style-name="P44">The monthly overtime schedule had opened.</text:p>
      <text:p text:style-name="P44"/>
      <text:p text:style-name="P44">Noah immediately pulled up the app.</text:p>
      <text:p text:style-name="P44"/>
      <text:p text:style-name="P44">Several extra shifts were available.</text:p>
      <text:p text:style-name="P44"/>
      <text:p text:style-name="P44">He selected two.</text:p>
      <text:p text:style-name="P44"/>
      <text:p text:style-name="P44">Tap.</text:p>
      <text:p text:style-name="P44"/>
      <text:p text:style-name="P44">Tap.</text:p>
      <text:p text:style-name="P44"/>
      <text:p text:style-name="P44">Done.</text:p>
      <text:p text:style-name="P44"/>
      <text:p text:style-name="P44">Twenty-four additional hours for the month.</text:p>
      <text:p text:style-name="P44"/>
      <text:p text:style-name="P44">His father had always been very direct about overtime.</text:p>
      <text:p text:style-name="P44"><text:soft-page-break/></text:p>
      <text:p text:style-name="P44">If you're young, healthy, and somebody is willing to pay you extra money, you should probably take it.</text:p>
      <text:p text:style-name="P44"/>
      <text:p text:style-name="P44">Noah had listened.</text:p>
      <text:p text:style-name="P44"/>
      <text:p text:style-name="P44">The result was that at twenty-three years old he was earning nearly eighty thousand dollars a year despite never attending college.</text:p>
      <text:p text:style-name="P44"/>
      <text:p text:style-name="P44">Not bad. <text:s/></text:p>
      <text:p text:style-name="P44"/>
      <text:p text:style-name="P59"><text:span text:style-name="T1">Especially considering many people his age were carrying enough student debt to buy a decent pickup truck.</text:span><text:line-break/><text:line-break/><text:span text:style-name="T1">It got better everytime Noah <text:s/>opened his home finance app - besides doing OT, his father had convinced him of two other things, live frugally, cheaply as possible - no car, sharing an apartment with his sister and cooking his own food - then he stacked all the extra cash in treasury notes. <text:s/>The result of those decisions was that after 5 years at telsa he had a net worth of just under 350,000 dollars. <text:s/>He never talked about this to anyone other than his father. <text:s/>His big plan - when got closer to 500,000 was to quit tesla, move to china and learn mandarin. <text:s/>He could probably live fine for a long time just on the interest after that.</text:span></text:p>
      <text:p text:style-name="P44"/>
      <text:p text:style-name="P44">Claire was just one year behind him on the exact same financial trajectory.</text:p>
      <text:p text:style-name="P44"/>
      <text:p text:style-name="P44">The two siblings had inherited several things from their father.</text:p>
      <text:p text:style-name="P44"/>
      <text:p text:style-name="P44">An unfortunate tendency toward sarcasm.</text:p>
      <text:p text:style-name="P44"/>
      <text:p text:style-name="P44">And a powerful belief that if something needed doing, you should simply get on with it.</text:p>
      <text:p text:style-name="P44"/>
      <text:p text:style-name="P44">Noah locked his phone and smiled.</text:p>
      <text:p text:style-name="P44"/>
      <text:p text:style-name="P44">Two more shifts.</text:p>
      <text:p text:style-name="P44"/>
      <text:p text:style-name="P44">Good.</text:p>
      <text:p text:style-name="P44"/>
      <text:p text:style-name="P44">Future Noah would appreciate the decision.</text:p>
      <text:p text:style-name="P44"/>
      <text:p text:style-name="P44">Present Noah wasn't particularly worried about him.</text:p>
      <text:p text:style-name="P44"/>
      <text:p text:style-name="P44"/>
      <text:p text:style-name="P44"/>
      <text:p text:style-name="P44"/>
      <text:p text:style-name="P44"/>
      <text:p text:style-name="P44">---</text:p>
      <text:p text:style-name="P44"/>
      <text:p text:style-name="P44">The gym was crowded when he finally arrived.</text:p>
      <text:p text:style-name="P44"/>
      <text:p text:style-name="P44">Of course it was.</text:p>
      <text:p text:style-name="P44"/>
      <text:p text:style-name="P44">Every machine occupied.</text:p>
      <text:p text:style-name="P44"/>
      <text:p text:style-name="P44">Every bench taken.</text:p>
      <text:p text:style-name="P44"/>
      <text:p text:style-name="P44">Noah waited his turn.</text:p>
      <text:p text:style-name="P44"/>
      <text:p text:style-name="P44">Then got to work.</text:p>
      <text:p text:style-name="P44"/>
      <text:p text:style-name="P44">Running.</text:p>
      <text:p text:style-name="P44"/>
      <text:p text:style-name="P44">Weights.</text:p>
      <text:p text:style-name="P44"/>
      <text:p text:style-name="P44"><text:soft-page-break/>More running.</text:p>
      <text:p text:style-name="P44"/>
      <text:p text:style-name="P44">The twelve-hour shift had already left him exhausted.</text:p>
      <text:p text:style-name="P44"/>
      <text:p text:style-name="P44">The workout finished the job.</text:p>
      <text:p text:style-name="P44"/>
      <text:p text:style-name="P44">Perfect.</text:p>
      <text:p text:style-name="P44"/>
      <text:p text:style-name="P44">His father had taught him something else growing up.</text:p>
      <text:p text:style-name="P44"/>
      <text:p text:style-name="P44">A tired body was usually a happy body.</text:p>
      <text:p text:style-name="P44"/>
      <text:p text:style-name="P44">Not always.</text:p>
      <text:p text:style-name="P44"/>
      <text:p text:style-name="P44">But usually.</text:p>
      <text:p text:style-name="P44"/>
      <text:p text:style-name="P44">---</text:p>
      <text:p text:style-name="P44"/>
      <text:p text:style-name="P44">That evening he called Elias.</text:p>
      <text:p text:style-name="P44"/>
      <text:p text:style-name="P44">His father answered immediately.</text:p>
      <text:p text:style-name="P44"/>
      <text:p text:style-name="P44">"What's broken?"</text:p>
      <text:p text:style-name="P44"/>
      <text:p text:style-name="P44">Noah laughed.</text:p>
      <text:p text:style-name="P44"/>
      <text:p text:style-name="P44">"Nothing."</text:p>
      <text:p text:style-name="P44"/>
      <text:p text:style-name="P44">"Then why are you calling?"</text:p>
      <text:p text:style-name="P44"/>
      <text:p text:style-name="P44">"Just saying hello."</text:p>
      <text:p text:style-name="P44"/>
      <text:p text:style-name="P44">A pause.</text:p>
      <text:p text:style-name="P44"/>
      <text:p text:style-name="P44">"Suspicious."</text:p>
      <text:p text:style-name="P44"/>
      <text:p text:style-name="P44">"No."</text:p>
      <text:p text:style-name="P44"/>
      <text:p text:style-name="P44">"Very suspicious."</text:p>
      <text:p text:style-name="P44"/>
      <text:p text:style-name="P44">Noah could practically hear the grin through the phone.</text:p>
      <text:p text:style-name="P44"/>
      <text:p text:style-name="P44">"How's Washington?"</text:p>
      <text:p text:style-name="P44"/>
      <text:p text:style-name="P44">"Still attached to Canada."</text:p>
      <text:p text:style-name="P44"/>
      <text:p text:style-name="P44">"How's Tesla?"</text:p>
      <text:p text:style-name="P44"/>
      <text:p text:style-name="P44">"Still making cars."</text:p>
      <text:p text:style-name="P44"/>
      <text:p text:style-name="P44">"Good."</text:p>
      <text:p text:style-name="P44"/>
      <text:p text:style-name="P44">Another pause.</text:p>
      <text:p text:style-name="P44"/>
      <text:p text:style-name="P44">Then Elias asked the real question.</text:p>
      <text:p text:style-name="P44"/>
      <text:p text:style-name="P44">"You taking the overtime?"</text:p>
      <text:p text:style-name="P44"/>
      <text:p text:style-name="P44">"Of course."</text:p>
      <text:p text:style-name="P44"/>
      <text:p text:style-name="P44">"Excellent."</text:p>
      <text:p text:style-name="P44"><text:soft-page-break/></text:p>
      <text:p text:style-name="P44">"You're predictable."</text:p>
      <text:p text:style-name="P44"/>
      <text:p text:style-name="P44">"So are you."</text:p>
      <text:p text:style-name="P44"/>
      <text:p text:style-name="P44">The two men talked for another twenty minutes.</text:p>
      <text:p text:style-name="P44"/>
      <text:p text:style-name="P44">Work.</text:p>
      <text:p text:style-name="P44"/>
      <text:p text:style-name="P44">Family.</text:p>
      <text:p text:style-name="P44"/>
      <text:p text:style-name="P44">Random nonsense.</text:p>
      <text:p text:style-name="P44"/>
      <text:p text:style-name="P44">The usual.</text:p>
      <text:p text:style-name="P44"/>
      <text:p text:style-name="P44">When the call ended Noah felt better than before it started.</text:p>
      <text:p text:style-name="P44"/>
      <text:p text:style-name="P44">That was generally how conversations with his father worked.</text:p>
      <text:p text:style-name="P44"/>
      <text:p text:style-name="P44">---</text:p>
      <text:p text:style-name="P44"/>
      <text:p text:style-name="P44">The apartment was quiet when he got home.</text:p>
      <text:p text:style-name="P44"/>
      <text:p text:style-name="P44">His girlfriend had fallen asleep while studying.</text:p>
      <text:p text:style-name="P44"/>
      <text:p text:style-name="P44">One textbook rested on her chest.</text:p>
      <text:p text:style-name="P44"/>
      <text:p text:style-name="P44">Another was open beside her.</text:p>
      <text:p text:style-name="P44"/>
      <text:p text:style-name="P44">Noah carefully removed both.</text:p>
      <text:p text:style-name="P44"/>
      <text:p text:style-name="P44">The tiny reservist barely stirred.</text:p>
      <text:p text:style-name="P44"/>
      <text:p text:style-name="P44">At four foot nine she somehow occupied an amount of space that violated several laws of physics.</text:p>
      <text:p text:style-name="P44"/>
      <text:p text:style-name="P44">He covered her with a blanket.</text:p>
      <text:p text:style-name="P44"/>
      <text:p text:style-name="P44">Then sat quietly for a moment.</text:p>
      <text:p text:style-name="P44"/>
      <text:p text:style-name="P44">It had been a good day.</text:p>
      <text:p text:style-name="P44"/>
      <text:p text:style-name="P44">Not a great day.</text:p>
      <text:p text:style-name="P44"/>
      <text:p text:style-name="P44">Nothing extraordinary had happened.</text:p>
      <text:p text:style-name="P44"/>
      <text:p text:style-name="P44">Nobody had won a lottery.</text:p>
      <text:p text:style-name="P44"/>
      <text:p text:style-name="P44">Nobody had saved the world.</text:p>
      <text:p text:style-name="P44"/>
      <text:p text:style-name="P44">Just work.</text:p>
      <text:p text:style-name="P44"/>
      <text:p text:style-name="P44">Family.</text:p>
      <text:p text:style-name="P44"/>
      <text:p text:style-name="P44">Exercise.</text:p>
      <text:p text:style-name="P44"/>
      <text:p text:style-name="P44">A little progress.</text:p>
      <text:p text:style-name="P44"/>
      <text:p text:style-name="P44">A little purpose.</text:p>
      <text:p text:style-name="P44"/>
      <text:p text:style-name="P44">A little peace.</text:p>
      <text:p text:style-name="P44"/>
      <text:p text:style-name="P44"><text:soft-page-break/>Noah smiled.</text:p>
      <text:p text:style-name="P44"/>
      <text:p text:style-name="P44">His father often said that success wasn't built from giant decisions.</text:p>
      <text:p text:style-name="P44"/>
      <text:p text:style-name="P44">It was built from thousands of ordinary days stacked carefully on top of one another.</text:p>
      <text:p text:style-name="P44"/>
      <text:p text:style-name="P44">Looking around the apartment, Noah suspected the old man might be right.</text:p>
      <text:p text:style-name="P44"/>
      <text:p text:style-name="P44">Noah turned off the light.</text:p>
      <text:p text:style-name="P44"/>
      <text:p text:style-name="P44">He had work in the mornin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44"/>
      <text:p text:style-name="P44">The Tesla shuttle arrived at 4:54 AM.</text:p>
      <text:p text:style-name="P44"/>
      <text:p text:style-name="P44">Right on schedule.</text:p>
      <text:p text:style-name="P44"/>
      <text:p text:style-name="P44">Noah climbed aboard with several dozen other production associates.</text:p>
      <text:p text:style-name="P44"/>
      <text:p text:style-name="P44">Most looked half asleep.</text:p>
      <text:p text:style-name="P44"/>
      <text:p text:style-name="P44">A few were staring at phones.</text:p>
      <text:p text:style-name="P44"/>
      <text:p text:style-name="P44">One guy was already drinking an energy drink that appeared capable of removing paint.</text:p>
      <text:p text:style-name="P44"/>
      <text:p text:style-name="P44">Noah took a window seat.</text:p>
      <text:p text:style-name="P44"/>
      <text:p text:style-name="P44">The shuttle pulled away from the stop and joined the steady stream of traffic heading toward Gigafactory Texas.</text:p>
      <text:p text:style-name="P44"/>
      <text:p text:style-name="P44">The building appeared on the horizon forty-five minutes later.</text:p>
      <text:p text:style-name="P44"/>
      <text:p text:style-name="P44">Even after years of working there, the size still impressed him.</text:p>
      <text:p text:style-name="P44"/>
      <text:p text:style-name="P44">Factories weren't supposed to be that large.</text:p>
      <text:p text:style-name="P44"/>
      <text:p text:style-name="P44">The structure looked less like a building and more like somebody had accidentally constructed a small country.</text:p>
      <text:p text:style-name="P44"/>
      <text:p text:style-name="P44">People often talked about Tesla as if it were some abstract company.</text:p>
      <text:p text:style-name="P44"/>
      <text:p text:style-name="P44">For Noah it was simple.</text:p>
      <text:p text:style-name="P44"><text:soft-page-break/></text:p>
      <text:p text:style-name="P44">It was where he went every day.</text:p>
      <text:p text:style-name="P44"/>
      <text:p text:style-name="P44">It was where thousands of people showed up before sunrise and spent twelve hours building something tangible.</text:p>
      <text:p text:style-name="P44"/>
      <text:p text:style-name="P44">Cars.</text:p>
      <text:p text:style-name="P44"/>
      <text:p text:style-name="P44">Battery packs.</text:p>
      <text:p text:style-name="P44"/>
      <text:p text:style-name="P44">The future.</text:p>
      <text:p text:style-name="P44"/>
      <text:p text:style-name="P44">Whatever label people wanted to use.</text:p>
      <text:p text:style-name="P44"/>
      <text:p text:style-name="P44">Noah mostly thought of it as work.</text:p>
      <text:p text:style-name="P44"/>
      <text:p text:style-name="P44">Good work.</text:p>
      <text:p text:style-name="P44"/>
      <text:p text:style-name="P70"/>
      <text:p text:style-name="P44"/>
      <text:p text:style-name="P42"><text:span text:style-name="T63">Chapter 14 <text:s text:c="2"/></text:span>Factory Brainstorming 2</text:p>
      <text:p text:style-name="P50"/>
      <text:p text:style-name="P47"/>
      <text:p text:style-name="P47">Elias stared at the charts for nearly a minute.</text:p>
      <text:p text:style-name="P47"/>
      <text:p text:style-name="P47">Then he swore.</text:p>
      <text:p text:style-name="P47"/>
      <text:p text:style-name="P47">Not loudly.</text:p>
      <text:p text:style-name="P47"/>
      <text:p text:style-name="P47">Just the sort of profanity a man uses when reality has once again become inconvenient.</text:p>
      <text:p text:style-name="P47"/>
      <text:p text:style-name="P47">"What now?" Opi asked.</text:p>
      <text:p text:style-name="P47"/>
      <text:p text:style-name="P47">"I think we may be solving the wrong half of the equation."</text:p>
      <text:p text:style-name="P47"/>
      <text:p text:style-name="P47">The orb brightened.</text:p>
      <text:p text:style-name="P47"/>
      <text:p text:style-name="P47">"Explain."</text:p>
      <text:p text:style-name="P47"/>
      <text:p text:style-name="P47">Elias pointed at one of the graphs.</text:p>
      <text:p text:style-name="P47"/>
      <text:p text:style-name="P47">"Male earnings."</text:p>
      <text:p text:style-name="P47"/>
      <text:p text:style-name="P47">"Yes."</text:p>
      <text:p text:style-name="P47"/>
      <text:p text:style-name="P47">"Show me childlessness by income percentile."</text:p>
      <text:p text:style-name="P47"/>
      <text:p text:style-name="P47">The graph immediately changed.</text:p>
      <text:p text:style-name="P47"/>
      <text:p text:style-name="P47">The pattern was obvious.</text:p>
      <text:p text:style-name="P47"/>
      <text:p text:style-name="P47">Brutally obvious.</text:p>
      <text:p text:style-name="P47"/>
      <text:p text:style-name="P47">At the lowest income levels, childlessness climbed dramatically.</text:p>
      <text:p text:style-name="P47"/>
      <text:p text:style-name="P47">At the highest income levels, it dropped.</text:p>
      <text:p text:style-name="P47"/>
      <text:p text:style-name="P47">The curve looked almost like gravity.</text:p>
      <text:p text:style-name="P47"/>
      <text:p text:style-name="P47">Everything flowing downhill.</text:p>
      <text:p text:style-name="P47"/>
      <text:p text:style-name="P47"><text:soft-page-break/>Elias shook his head.</text:p>
      <text:p text:style-name="P47"/>
      <text:p text:style-name="P47">"That is insane."</text:p>
      <text:p text:style-name="P47"/>
      <text:p text:style-name="P47">"Not particularly."</text:p>
      <text:p text:style-name="P47"/>
      <text:p text:style-name="P47">"It is if you're trying to save a civilization."</text:p>
      <text:p text:style-name="P47"/>
      <text:p text:style-name="P47">Opi floated closer.</text:p>
      <text:p text:style-name="P47"/>
      <text:p text:style-name="P47">"The relationship is well documented."</text:p>
      <text:p text:style-name="P47"/>
      <text:p text:style-name="P47">Elias continued studying the graph.</text:p>
      <text:p text:style-name="P47"/>
      <text:p text:style-name="P47">"The poorest men almost never have children."</text:p>
      <text:p text:style-name="P47"/>
      <text:p text:style-name="P47">"Relative to the highest earners, significantly less often."</text:p>
      <text:p text:style-name="P47"/>
      <text:p text:style-name="P47">"And the richest men have them constantly."</text:p>
      <text:p text:style-name="P47"/>
      <text:p text:style-name="P47">"More frequently."</text:p>
      <text:p text:style-name="P47"/>
      <text:p text:style-name="P47">The chart vanished.</text:p>
      <text:p text:style-name="P47"/>
      <text:p text:style-name="P47">A new one appeared.</text:p>
      <text:p text:style-name="P47"/>
      <text:p text:style-name="P47">"This becomes even more apparent when viewed longitudinally."</text:p>
      <text:p text:style-name="P47"/>
      <text:p text:style-name="P47">Elias frowned.</text:p>
      <text:p text:style-name="P47"/>
      <text:p text:style-name="P47">"What am I looking at?"</text:p>
      <text:p text:style-name="P47"/>
      <text:p text:style-name="P47">"Wage growth."</text:p>
      <text:p text:style-name="P47"/>
      <text:p text:style-name="P47">Several colored lines stretched across the display.</text:p>
      <text:p text:style-name="P47"/>
      <text:p text:style-name="P47">"United States data."</text:p>
      <text:p text:style-name="P47"/>
      <text:p text:style-name="P47">"Actual outcomes?"</text:p>
      <text:p text:style-name="P47"/>
      <text:p text:style-name="P47">"Actual outcomes."</text:p>
      <text:p text:style-name="P47"/>
      <text:p text:style-name="P47">The orb highlighted one line.</text:p>
      <text:p text:style-name="P47"/>
      <text:p text:style-name="P47">"For every approximately four percent increase in a man's earnings, the probability of fatherhood rises by roughly one point one percent."</text:p>
      <text:p text:style-name="P47"/>
      <text:p text:style-name="P47">Elias blinked.</text:p>
      <text:p text:style-name="P47"/>
      <text:p text:style-name="P47">"That's a huge effect."</text:p>
      <text:p text:style-name="P47"/>
      <text:p text:style-name="P47">"Yes."</text:p>
      <text:p text:style-name="P47"/>
      <text:p text:style-name="P47">Another line appeared.</text:p>
      <text:p text:style-name="P47"/>
      <text:p text:style-name="P47">This one moved in the opposite direction.</text:p>
      <text:p text:style-name="P47"/>
      <text:p text:style-name="P47">"And women?"</text:p>
      <text:p text:style-name="P47"/>
      <text:p text:style-name="P47">"For every approximately four percent increase in earnings, the probability of motherhood decreases by roughly one point three percent."</text:p>
      <text:p text:style-name="P47"><text:soft-page-break/></text:p>
      <text:p text:style-name="P47">Elias stared.</text:p>
      <text:p text:style-name="P47"/>
      <text:p text:style-name="P47">Then stared some more.</text:p>
      <text:p text:style-name="P47"/>
      <text:p text:style-name="P47">Then sat back.</text:p>
      <text:p text:style-name="P47"/>
      <text:p text:style-name="P47">"Well."</text:p>
      <text:p text:style-name="P47"/>
      <text:p text:style-name="P47">"Yes."</text:p>
      <text:p text:style-name="P47"/>
      <text:p text:style-name="P47">"That is awkward."</text:p>
      <text:p text:style-name="P47"/>
      <text:p text:style-name="P47">"A statistically common reaction."</text:p>
      <text:p text:style-name="P47"/>
      <text:p text:style-name="P47">For several seconds neither spoke.</text:p>
      <text:p text:style-name="P47"/>
      <text:p text:style-name="P47">Finally Elias pointed at the graph.</text:p>
      <text:p text:style-name="P47"/>
      <text:p text:style-name="P47">"So men and women are responding differently."</text:p>
      <text:p text:style-name="P47"/>
      <text:p text:style-name="P47">"Correct."</text:p>
      <text:p text:style-name="P47"/>
      <text:p text:style-name="P47">"Very differently."</text:p>
      <text:p text:style-name="P47"/>
      <text:p text:style-name="P47">"Correct."</text:p>
      <text:p text:style-name="P47"/>
      <text:p text:style-name="P47">He thought about it.</text:p>
      <text:p text:style-name="P47"/>
      <text:p text:style-name="P47">"If you're a man."</text:p>
      <text:p text:style-name="P47"/>
      <text:p text:style-name="P47">"Yes."</text:p>
      <text:p text:style-name="P47"/>
      <text:p text:style-name="P47">"Higher income increases your likelihood of becoming a father."</text:p>
      <text:p text:style-name="P47"/>
      <text:p text:style-name="P47">"Generally."</text:p>
      <text:p text:style-name="P47"/>
      <text:p text:style-name="P47">"If you're a woman."</text:p>
      <text:p text:style-name="P47"/>
      <text:p text:style-name="P47">"Higher income decreases your likelihood of becoming a mother."</text:p>
      <text:p text:style-name="P47"/>
      <text:p text:style-name="P47">"Generally."</text:p>
      <text:p text:style-name="P47"/>
      <text:p text:style-name="P47">The graphs vanished.</text:p>
      <text:p text:style-name="P47"/>
      <text:p text:style-name="P47">The silence lingered.</text:p>
      <text:p text:style-name="P47"/>
      <text:p text:style-name="P47">Then Elias asked the obvious question.</text:p>
      <text:p text:style-name="P47"/>
      <text:p text:style-name="P47">"Why?"</text:p>
      <text:p text:style-name="P47"/>
      <text:p text:style-name="P47">Opi's lights flickered.</text:p>
      <text:p text:style-name="P47"/>
      <text:p text:style-name="P47">"That question has generated approximately fourteen thousand published hypotheses."</text:p>
      <text:p text:style-name="P47"/>
      <text:p text:style-name="P47">"Only fourteen thousand?"</text:p>
      <text:p text:style-name="P47"/>
      <text:p text:style-name="P47">"I am rounding down."</text:p>
      <text:p text:style-name="P47"/>
      <text:p text:style-name="P47">Elias laughed.</text:p>
      <text:p text:style-name="P47"/>
      <text:p text:style-name="P47"><text:soft-page-break/>Then became serious again.</text:p>
      <text:p text:style-name="P47"/>
      <text:p text:style-name="P47">"What does your data say?"</text:p>
      <text:p text:style-name="P47"/>
      <text:p text:style-name="P47">The orb became quiet.</text:p>
      <text:p text:style-name="P47"/>
      <text:p text:style-name="P47">"The answer appears multifactorial."</text:p>
      <text:p text:style-name="P47"/>
      <text:p text:style-name="P47">"Meaning complicated."</text:p>
      <text:p text:style-name="P47"/>
      <text:p text:style-name="P47">"Meaning humans enjoy turning every issue into seventeen issues."</text:p>
      <text:p text:style-name="P47"/>
      <text:p text:style-name="P47">The orb projected several overlapping networks.</text:p>
      <text:p text:style-name="P47"/>
      <text:p text:style-name="P47">Career timing.</text:p>
      <text:p text:style-name="P47"/>
      <text:p text:style-name="P47">Marriage timing.</text:p>
      <text:p text:style-name="P47"/>
      <text:p text:style-name="P47">Educational attainment.</text:p>
      <text:p text:style-name="P47"/>
      <text:p text:style-name="P47">Partner selection.</text:p>
      <text:p text:style-name="P47"/>
      <text:p text:style-name="P47">Housing.</text:p>
      <text:p text:style-name="P47"/>
      <text:p text:style-name="P47">Childcare.</text:p>
      <text:p text:style-name="P47"/>
      <text:p text:style-name="P47">Cultural expectations.</text:p>
      <text:p text:style-name="P47"/>
      <text:p text:style-name="P47">Economic pressures.</text:p>
      <text:p text:style-name="P47"/>
      <text:p text:style-name="P47">Everything connected to everything else.</text:p>
      <text:p text:style-name="P47"/>
      <text:p text:style-name="P47">Opi highlighted one section.</text:p>
      <text:p text:style-name="P47"/>
      <text:p text:style-name="P47">"However, there is one observation that appears repeatedly."</text:p>
      <text:p text:style-name="P47"/>
      <text:p text:style-name="P47">Elias leaned forward.</text:p>
      <text:p text:style-name="P47"/>
      <text:p text:style-name="P47">"What?"</text:p>
      <text:p text:style-name="P47"/>
      <text:p text:style-name="P47">"Women generally do not reduce their partner standards as their own success increases."</text:p>
      <text:p text:style-name="P47"/>
      <text:p text:style-name="P47">"Interesting."</text:p>
      <text:p text:style-name="P47"/>
      <text:p text:style-name="P47">"In many cases the opposite occurs."</text:p>
      <text:p text:style-name="P47"/>
      <text:p text:style-name="P47">Elias rubbed his chin.</text:p>
      <text:p text:style-name="P47"/>
      <text:p text:style-name="P47">"So successful women often seek equally successful men."</text:p>
      <text:p text:style-name="P47"/>
      <text:p text:style-name="P47">"Frequently."</text:p>
      <text:p text:style-name="P47"/>
      <text:p text:style-name="P47">"And successful men can form relationships across a wider range of income levels."</text:p>
      <text:p text:style-name="P47"/>
      <text:p text:style-name="P47">"Frequently."</text:p>
      <text:p text:style-name="P47"/>
      <text:p text:style-name="P47">Elias sat silently.</text:p>
      <text:p text:style-name="P47"/>
      <text:p text:style-name="P47">Then suddenly pointed.</text:p>
      <text:p text:style-name="P47"/>
      <text:p text:style-name="P47">"Wait."</text:p>
      <text:p text:style-name="P47"><text:soft-page-break/></text:p>
      <text:p text:style-name="P47">"What?"</text:p>
      <text:p text:style-name="P47"/>
      <text:p text:style-name="P47">"That creates a bottleneck."</text:p>
      <text:p text:style-name="P47"/>
      <text:p text:style-name="P47">Opi brightened.</text:p>
      <text:p text:style-name="P47"/>
      <text:p text:style-name="P47">"Continue."</text:p>
      <text:p text:style-name="P47"/>
      <text:p text:style-name="P47">"If a woman earning two hundred thousand dollars wants a man earning two hundred thousand dollars."</text:p>
      <text:p text:style-name="P47"/>
      <text:p text:style-name="P47">"Usually more."</text:p>
      <text:p text:style-name="P47"/>
      <text:p text:style-name="P47">"And there aren't enough of those men."</text:p>
      <text:p text:style-name="P47"/>
      <text:p text:style-name="P47">"Potentially."</text:p>
      <text:p text:style-name="P47"/>
      <text:p text:style-name="P47">"Then a portion of those women remain unmarried."</text:p>
      <text:p text:style-name="P47"/>
      <text:p text:style-name="P47">"One possible outcome."</text:p>
      <text:p text:style-name="P47"/>
      <text:p text:style-name="P47">"And the men?"</text:p>
      <text:p text:style-name="P47"/>
      <text:p text:style-name="P47">"The men may have substantially more options."</text:p>
      <text:p text:style-name="P47"/>
      <text:p text:style-name="P47">Elias leaned back.</text:p>
      <text:p text:style-name="P47"/>
      <text:p text:style-name="P47">"That doesn't sound like a fertility problem."</text:p>
      <text:p text:style-name="P47"/>
      <text:p text:style-name="P47">Opi tilted slightly.</text:p>
      <text:p text:style-name="P47"/>
      <text:p text:style-name="P47">"No?"</text:p>
      <text:p text:style-name="P47"/>
      <text:p text:style-name="P47">"It sounds like a matching problem."</text:p>
      <text:p text:style-name="P47"/>
      <text:p text:style-name="P47">For a moment the orb said nothing.</text:p>
      <text:p text:style-name="P47"/>
      <text:p text:style-name="P47">Then:</text:p>
      <text:p text:style-name="P47"/>
      <text:p text:style-name="P47">"Interesting."</text:p>
      <text:p text:style-name="P47"/>
      <text:p text:style-name="P47">Elias stood up and began pacing again.</text:p>
      <text:p text:style-name="P47"/>
      <text:p text:style-name="P47">"No seriously."</text:p>
      <text:p text:style-name="P47"/>
      <text:p text:style-name="P47">He pointed toward the valley.</text:p>
      <text:p text:style-name="P47"/>
      <text:p text:style-name="P47">"What if we're thinking about this backwards?"</text:p>
      <text:p text:style-name="P47"/>
      <text:p text:style-name="P47">"Explain."</text:p>
      <text:p text:style-name="P47"/>
      <text:p text:style-name="P47">"We keep talking about babies."</text:p>
      <text:p text:style-name="P47"/>
      <text:p text:style-name="P47">"Yes."</text:p>
      <text:p text:style-name="P47"/>
      <text:p text:style-name="P47">"We keep talking about fertility."</text:p>
      <text:p text:style-name="P47"/>
      <text:p text:style-name="P47">"Yes."</text:p>
      <text:p text:style-name="P47"/>
      <text:p text:style-name="P47">"We keep talking about attraction."</text:p>
      <text:p text:style-name="P47"/>
      <text:p text:style-name="P47"><text:soft-page-break/>"Yes."</text:p>
      <text:p text:style-name="P47"/>
      <text:p text:style-name="P47">"But none of those are the bottleneck."</text:p>
      <text:p text:style-name="P47"/>
      <text:p text:style-name="P47">The orb brightened.</text:p>
      <text:p text:style-name="P47"/>
      <text:p text:style-name="P47">"What is?"</text:p>
      <text:p text:style-name="P47"/>
      <text:p text:style-name="P47">Elias stopped walking.</text:p>
      <text:p text:style-name="P47"/>
      <text:p text:style-name="P47">"Pair formation."</text:p>
      <text:p text:style-name="P47"/>
      <text:p text:style-name="P47">The words hung in the air.</text:p>
      <text:p text:style-name="P47"/>
      <text:p text:style-name="P47">"Everything starts there."</text:p>
      <text:p text:style-name="P47"/>
      <text:p text:style-name="P47">He pointed toward Opi.</text:p>
      <text:p text:style-name="P47"/>
      <text:p text:style-name="P47">"If nobody forms stable pairs."</text:p>
      <text:p text:style-name="P47"/>
      <text:p text:style-name="P47">"No families."</text:p>
      <text:p text:style-name="P47"/>
      <text:p text:style-name="P47">"No children."</text:p>
      <text:p text:style-name="P47"/>
      <text:p text:style-name="P47">"No civilization."</text:p>
      <text:p text:style-name="P47"/>
      <text:p text:style-name="P47">Opi became completely still.</text:p>
      <text:p text:style-name="P47"/>
      <text:p text:style-name="P47">A habit she had whenever something truly interested her.</text:p>
      <text:p text:style-name="P47"/>
      <text:p text:style-name="P47">Elias continued.</text:p>
      <text:p text:style-name="P47"/>
      <text:p text:style-name="P47">"Maybe the problem isn't fertility."</text:p>
      <text:p text:style-name="P47"/>
      <text:p text:style-name="P47">"Maybe the problem is that modern society has become terrible at helping people find compatible partners."</text:p>
      <text:p text:style-name="P47"/>
      <text:p text:style-name="P47">The orb remained silent.</text:p>
      <text:p text:style-name="P47"/>
      <text:p text:style-name="P47">"Maybe we've spent decades optimizing everything except the thing that matters."</text:p>
      <text:p text:style-name="P47"/>
      <text:p text:style-name="P47">"Which is?"</text:p>
      <text:p text:style-name="P47"/>
      <text:p text:style-name="P47">"Helping men and women build families."</text:p>
      <text:p text:style-name="P47"/>
      <text:p text:style-name="P47">The valley became quiet.</text:p>
      <text:p text:style-name="P47"/>
      <text:p text:style-name="P47">Wind moved through the pine trees.</text:p>
      <text:p text:style-name="P47"/>
      <text:p text:style-name="P47">Somewhere below, construction crews were finishing another cluster of homes for the Parallel.</text:p>
      <text:p text:style-name="P47"/>
      <text:p text:style-name="P47">People who yesterday had been homeless.</text:p>
      <text:p text:style-name="P47"/>
      <text:p text:style-name="P47">People who finally had stability.</text:p>
      <text:p text:style-name="P47"/>
      <text:p text:style-name="P47">People who finally had a future.</text:p>
      <text:p text:style-name="P47"/>
      <text:p text:style-name="P47">And suddenly Elias understood something.</text:p>
      <text:p text:style-name="P47"/>
      <text:p text:style-name="P47">Housing was not the destination.</text:p>
      <text:p text:style-name="P47"/>
      <text:p text:style-name="P47"><text:soft-page-break/>Recovery was not the destination.</text:p>
      <text:p text:style-name="P47"/>
      <text:p text:style-name="P47">Employment was not the destination.</text:p>
      <text:p text:style-name="P47"/>
      <text:p text:style-name="P47">Those were all foundations.</text:p>
      <text:p text:style-name="P47"/>
      <text:p text:style-name="P47">Necessary foundations.</text:p>
      <text:p text:style-name="P47"/>
      <text:p text:style-name="P47">But foundations nonetheless.</text:p>
      <text:p text:style-name="P47"/>
      <text:p text:style-name="P47">The real objective was what came after.</text:p>
      <text:p text:style-name="P47"/>
      <text:p text:style-name="P47">A society where people actually wanted to build a future together.</text:p>
      <text:p text:style-name="P47"/>
      <text:p text:style-name="P47">He looked up at Opi.</text:p>
      <text:p text:style-name="P47"/>
      <text:p text:style-name="P47">"Tell me something."</text:p>
      <text:p text:style-name="P47"/>
      <text:p text:style-name="P47">"What?"</text:p>
      <text:p text:style-name="P47"/>
      <text:p text:style-name="P47">"If we doubled every man's income tomorrow."</text:p>
      <text:p text:style-name="P47"/>
      <text:p text:style-name="P47">The orb immediately answered.</text:p>
      <text:p text:style-name="P47"/>
      <text:p text:style-name="P47">"Birth rates would increase."</text:p>
      <text:p text:style-name="P47"/>
      <text:p text:style-name="P47">"By how much?"</text:p>
      <text:p text:style-name="P47"/>
      <text:p text:style-name="P47">"Not enough."</text:p>
      <text:p text:style-name="P47"/>
      <text:p text:style-name="P47">Elias smiled.</text:p>
      <text:p text:style-name="P47"/>
      <text:p text:style-name="P47">"Exactly."</text:p>
      <text:p text:style-name="P47"/>
      <text:p text:style-name="P47">The answer wasn't money.</text:p>
      <text:p text:style-name="P47"/>
      <text:p text:style-name="P47">The answer wasn't housing.</text:p>
      <text:p text:style-name="P47"/>
      <text:p text:style-name="P47">The answer wasn't healthcare.</text:p>
      <text:p text:style-name="P47"/>
      <text:p text:style-name="P47">Those things mattered.</text:p>
      <text:p text:style-name="P47"/>
      <text:p text:style-name="P47">But none of them appeared to be the deepest layer.</text:p>
      <text:p text:style-name="P47"/>
      <text:p text:style-name="P47">The deepest layer remained stubbornly human.</text:p>
      <text:p text:style-name="P47"/>
      <text:p text:style-name="P47">Men.</text:p>
      <text:p text:style-name="P47"/>
      <text:p text:style-name="P47">Women.</text:p>
      <text:p text:style-name="P47"/>
      <text:p text:style-name="P47">Attraction.</text:p>
      <text:p text:style-name="P47"/>
      <text:p text:style-name="P47">Trust.</text:p>
      <text:p text:style-name="P47"/>
      <text:p text:style-name="P47">Commitment.</text:p>
      <text:p text:style-name="P47"/>
      <text:p text:style-name="P47">Family.</text:p>
      <text:p text:style-name="P47"/>
      <text:p text:style-name="P47">The same puzzle every civilization had wrestled with since the beginning of history.</text:p>
      <text:p text:style-name="P47"/>
      <text:p text:style-name="P47">And somehow modern civilization appeared to be getting worse at solving it.</text:p>
      <text:p text:style-name="P47"><text:soft-page-break/></text:p>
      <text:p text:style-name="P47">Which meant, Elias realized with growing concern, that the next phase of the Parallel might be far more difficult than anything they had attempted so far.</text:p>
      <text:p text:style-name="P44"/>
      <text:p text:style-name="P44"/>
      <text:p text:style-name="P44"/>
      <text:p text:style-name="P33"/>
      <text:p text:style-name="P30">for more info and free downloads goto:</text:p>
      <text:p text:style-name="P30"><text:a xlink:type="simple" xlink:href="https://www.VaalDrunSaga.com/" text:style-name="Internet_20_link" text:visited-style-name="Visited_20_Internet_20_Link"><text:span text:style-name="T54"/></text:a></text:p>
      <text:p text:style-name="P30"><text:a xlink:type="simple" xlink:href="https://www.VaalDrunSaga.com/" text:style-name="Internet_20_link" text:visited-style-name="Visited_20_Internet_20_Link">https://www.VaalDrunSaga.com</text:a></text:p>
      <text:p text:style-name="P30"/>
      <text:p text:style-name="P33"><text:span text:style-name="T14">The VaalDrun Saga</text:span><text:span text:style-name="T31"><text:tab/><text:tab/><text:tab/></text:span><text:span text:style-name="T14">Book 1 <text:s/>The Parallel</text:span></text:p>
      <text:p text:style-name="P33"/>
      <text:p text:style-name="P33"/>
      <text:p text:style-name="P33"/>
      <text:p text:style-name="P65"><text:span text:style-name="T58">Chapter </text:span><text:span text:style-name="T59">15</text:span><text:span text:style-name="T60"> <text:s/>Proof is in the Pudding</text:span><text:span text:style-name="T21"><text:line-break/></text:span></text:p>
      <text:p text:style-name="P22"/>
      <text:p text:style-name="P45"/>
      <text:p text:style-name="P45">The humor disappeared first.</text:p>
      <text:p text:style-name="P45"/>
      <text:p text:style-name="P45">Not completely.</text:p>
      <text:p text:style-name="P45"/>
      <text:p text:style-name="P45">But enough that Opi noticed.</text:p>
      <text:p text:style-name="P45"/>
      <text:p text:style-name="P45">Elias pushed his empty plate away.</text:p>
      <text:p text:style-name="P45"/>
      <text:p text:style-name="P45">The conversation had gone from impossible to absurd to fascinating to terrifying in less than an hour.</text:p>
      <text:p text:style-name="P45"/>
      <text:p text:style-name="P45">Alien civilizations.</text:p>
      <text:p text:style-name="P45"/>
      <text:p text:style-name="P45">The Culling.</text:p>
      <text:p text:style-name="P45"/>
      <text:p text:style-name="P45">Humanity's future.</text:p>
      <text:p text:style-name="P45"/>
      <text:p text:style-name="P45">VaalDruns.</text:p>
      <text:p text:style-name="P45"/>
      <text:p text:style-name="P45">The possibility that the entire direction of his life was about to change.</text:p>
      <text:p text:style-name="P45"/>
      <text:p text:style-name="P45">Yet suddenly none of that seemed like the most important thing.</text:p>
      <text:p text:style-name="P45"/>
      <text:p text:style-name="P45">A different thought had arrived.</text:p>
      <text:p text:style-name="P45"/>
      <text:p text:style-name="P45">One that immediately pushed everything else aside.</text:p>
      <text:p text:style-name="P45"/>
      <text:p text:style-name="P45">He looked directly at Opi.</text:p>
      <text:p text:style-name="P45"/>
      <text:p text:style-name="P45">"Before we go any further."</text:p>
      <text:p text:style-name="P45"/>
      <text:p text:style-name="P45">The orb became still.</text:p>
      <text:p text:style-name="P45"/>
      <text:p text:style-name="P45">A very Velhari stillness.</text:p>
      <text:p text:style-name="P45"/>
      <text:p text:style-name="P45">Attentive.</text:p>
      <text:p text:style-name="P45"/>
      <text:p text:style-name="P45">Listening.</text:p>
      <text:p text:style-name="P45"/>
      <text:p text:style-name="P45">"Before I agree to anything."</text:p>
      <text:p text:style-name="P45"/>
      <text:p text:style-name="P45">"All right."</text:p>
      <text:p text:style-name="P45"/>
      <text:p text:style-name="P45"><text:soft-page-break/>"There is one condition."</text:p>
      <text:p text:style-name="P45"/>
      <text:p text:style-name="P45">The lights inside the orb shifted softly.</text:p>
      <text:p text:style-name="P45"/>
      <text:p text:style-name="P45">"I expected there would be."</text:p>
      <text:p text:style-name="P45"/>
      <text:p text:style-name="P45">Elias nodded.</text:p>
      <text:p text:style-name="P45"/>
      <text:p text:style-name="P45">"If what you're saying is true..."</text:p>
      <text:p text:style-name="P45"/>
      <text:p text:style-name="P45">He paused.</text:p>
      <text:p text:style-name="P45"/>
      <text:p text:style-name="P45">"If I become involved in this..."</text:p>
      <text:p text:style-name="P45"/>
      <text:p text:style-name="P45">Another pause.</text:p>
      <text:p text:style-name="P45"/>
      <text:p text:style-name="P45">"If I become your VaalDrun..."</text:p>
      <text:p text:style-name="P45"/>
      <text:p text:style-name="P45">The word still felt strange.</text:p>
      <text:p text:style-name="P45"/>
      <text:p text:style-name="P45">"...eventually somebody is going to hate what we're doing."</text:p>
      <text:p text:style-name="P45"/>
      <text:p text:style-name="P45">"An excellent prediction."</text:p>
      <text:p text:style-name="P45"/>
      <text:p text:style-name="P45">"Somebody's going to oppose it."</text:p>
      <text:p text:style-name="P45"/>
      <text:p text:style-name="P45">"Also likely."</text:p>
      <text:p text:style-name="P45"/>
      <text:p text:style-name="P45">"Somebody may try to hurt me."</text:p>
      <text:p text:style-name="P45"/>
      <text:p text:style-name="P45">"Almost guaranteed."</text:p>
      <text:p text:style-name="P45"/>
      <text:p text:style-name="P45">"Fine."</text:p>
      <text:p text:style-name="P45"/>
      <text:p text:style-name="P45">He shrugged.</text:p>
      <text:p text:style-name="P45"/>
      <text:p text:style-name="P45">"I can live with that."</text:p>
      <text:p text:style-name="P45"/>
      <text:p text:style-name="P45">Then his expression hardened.</text:p>
      <text:p text:style-name="P45"/>
      <text:p text:style-name="P45">"But Noah and Claire are off limits."</text:p>
      <text:p text:style-name="P45"/>
      <text:p text:style-name="P45">Silence.</text:p>
      <text:p text:style-name="P45"/>
      <text:p text:style-name="P45">"I won't drag them into this."</text:p>
      <text:p text:style-name="P45"/>
      <text:p text:style-name="P45">The orb said nothing.</text:p>
      <text:p text:style-name="P45"/>
      <text:p text:style-name="P45">"I won't put them in danger."</text:p>
      <text:p text:style-name="P45"/>
      <text:p text:style-name="P45">Still nothing.</text:p>
      <text:p text:style-name="P45"/>
      <text:p text:style-name="P45">"I won't accept a future where saving humanity costs me my children."</text:p>
      <text:p text:style-name="P45"/>
      <text:p text:style-name="P45">The kitchen became completely quiet.</text:p>
      <text:p text:style-name="P45"/>
      <text:p text:style-name="P45">Finally Opi spoke.</text:p>
      <text:p text:style-name="P45"/>
      <text:p text:style-name="P45">"You believe I might ask that of you."</text:p>
      <text:p text:style-name="P45"/>
      <text:p text:style-name="P45">Elias looked at her.</text:p>
      <text:p text:style-name="P45"><text:soft-page-break/></text:p>
      <text:p text:style-name="P45">"No."</text:p>
      <text:p text:style-name="P45"/>
      <text:p text:style-name="P45">The answer surprised her.</text:p>
      <text:p text:style-name="P45"/>
      <text:p text:style-name="P45">"I believe reality might."</text:p>
      <text:p text:style-name="P45"/>
      <text:p text:style-name="P45">The orb became very still.</text:p>
      <text:p text:style-name="P45"/>
      <text:p text:style-name="P45">Because that was a better answer.</text:p>
      <text:p text:style-name="P45"/>
      <text:p text:style-name="P45">A wiser answer.</text:p>
      <text:p text:style-name="P45"/>
      <text:p text:style-name="P45">Finally she said:</text:p>
      <text:p text:style-name="P45"/>
      <text:p text:style-name="P45">"You are requesting protection."</text:p>
      <text:p text:style-name="P45"/>
      <text:p text:style-name="P45">"No."</text:p>
      <text:p text:style-name="P45"/>
      <text:p text:style-name="P45">Elias shook his head.</text:p>
      <text:p text:style-name="P45"/>
      <text:p text:style-name="P45">"Protection is the wrong word."</text:p>
      <text:p text:style-name="P45"/>
      <text:p text:style-name="P45">"Explain."</text:p>
      <text:p text:style-name="P45"/>
      <text:p text:style-name="P45">He leaned back.</text:p>
      <text:p text:style-name="P45"/>
      <text:p text:style-name="P45">"I don't want Noah and Claire wrapped in bubble wrap."</text:p>
      <text:p text:style-name="P45"/>
      <text:p text:style-name="P45">The orb brightened.</text:p>
      <text:p text:style-name="P45"/>
      <text:p text:style-name="P45">"An intriguing human safety technology."</text:p>
      <text:p text:style-name="P45"/>
      <text:p text:style-name="P45">"I want them free."</text:p>
      <text:p text:style-name="P45"/>
      <text:p text:style-name="P45">"Good."</text:p>
      <text:p text:style-name="P45"/>
      <text:p text:style-name="P45">"I want them living their own lives."</text:p>
      <text:p text:style-name="P45"/>
      <text:p text:style-name="P45">"Better."</text:p>
      <text:p text:style-name="P45"/>
      <text:p text:style-name="P45">"I want them making mistakes."</text:p>
      <text:p text:style-name="P45"/>
      <text:p text:style-name="P45">"Necessary."</text:p>
      <text:p text:style-name="P45"/>
      <text:p text:style-name="P45">"I want them falling in love."</text:p>
      <text:p text:style-name="P45"/>
      <text:p text:style-name="P45">The lights inside the orb softened.</text:p>
      <text:p text:style-name="P45"/>
      <text:p text:style-name="P45">"I want them deciding who they become."</text:p>
      <text:p text:style-name="P45"/>
      <text:p text:style-name="P45">He pointed at her.</text:p>
      <text:p text:style-name="P45"/>
      <text:p text:style-name="P45">"And I need to know that whatever insanity we're about to unleash on the world doesn't interfere with that."</text:p>
      <text:p text:style-name="P45"/>
      <text:p text:style-name="P45">The orb remained silent for several seconds.</text:p>
      <text:p text:style-name="P45"/>
      <text:p text:style-name="P45">Then:</text:p>
      <text:p text:style-name="P45"/>
      <text:p text:style-name="P45">"Would you like a demonstration?"</text:p>
      <text:p text:style-name="P45"><text:soft-page-break/></text:p>
      <text:p text:style-name="P45">Elias immediately frowned.</text:p>
      <text:p text:style-name="P45"/>
      <text:p text:style-name="P45">That never led anywhere normal.</text:p>
      <text:p text:style-name="P45"/>
      <text:p text:style-name="P45">"What kind of demonstration?"</text:p>
      <text:p text:style-name="P45"/>
      <text:p text:style-name="P45">"A father-shaped demonstration."</text:p>
      <text:p text:style-name="P45"/>
      <text:p text:style-name="P45">"That is not reassuring."</text:p>
      <text:p text:style-name="P45"/>
      <text:p text:style-name="P45">The orb floated upward.</text:p>
      <text:p text:style-name="P45"/>
      <text:p text:style-name="P45">Without warning the air above the kitchen table rippled.</text:p>
      <text:p text:style-name="P45"/>
      <text:p text:style-name="P45">Not dramatically.</text:p>
      <text:p text:style-name="P45"/>
      <text:p text:style-name="P45">Not like science fiction.</text:p>
      <text:p text:style-name="P45"/>
      <text:p text:style-name="P45">More like reality had briefly forgotten what shape it was supposed to be.</text:p>
      <text:p text:style-name="P45"/>
      <text:p text:style-name="P45">A shimmering window opened.</text:p>
      <text:p text:style-name="P45"/>
      <text:p text:style-name="P45">Elias froze.</text:p>
      <text:p text:style-name="P45"/>
      <text:p text:style-name="P45">The image sharpened.</text:p>
      <text:p text:style-name="P45"/>
      <text:p text:style-name="P45">Austin.</text:p>
      <text:p text:style-name="P45"/>
      <text:p text:style-name="P45">A small apartment.</text:p>
      <text:p text:style-name="P45"/>
      <text:p text:style-name="P45">Noah.</text:p>
      <text:p text:style-name="P45"/>
      <text:p text:style-name="P45">His son sat at a kitchen table wearing a faded Tesla shirt and eating cereal directly from the box.</text:p>
      <text:p text:style-name="P45"/>
      <text:p text:style-name="P45">Elias smiled despite himself.</text:p>
      <text:p text:style-name="P45"/>
      <text:p text:style-name="P45">"Some things never change."</text:p>
      <text:p text:style-name="P45"/>
      <text:p text:style-name="P45">"Observe."</text:p>
      <text:p text:style-name="P45"/>
      <text:p text:style-name="P45">The image expanded.</text:p>
      <text:p text:style-name="P45"/>
      <text:p text:style-name="P45">Not forward in time.</text:p>
      <text:p text:style-name="P45"/>
      <text:p text:style-name="P45">Outward.</text:p>
      <text:p text:style-name="P45"/>
      <text:p text:style-name="P45">The apartment.</text:p>
      <text:p text:style-name="P45"/>
      <text:p text:style-name="P45">The building.</text:p>
      <text:p text:style-name="P45"/>
      <text:p text:style-name="P45">The parking lot.</text:p>
      <text:p text:style-name="P45"/>
      <text:p text:style-name="P45">The street.</text:p>
      <text:p text:style-name="P45"/>
      <text:p text:style-name="P45">Vehicles.</text:p>
      <text:p text:style-name="P45"/>
      <text:p text:style-name="P45">People.</text:p>
      <text:p text:style-name="P45"/>
      <text:p text:style-name="P45">Animals.</text:p>
      <text:p text:style-name="P45"/>
      <text:p text:style-name="P45"><text:soft-page-break/>Infrastructure.</text:p>
      <text:p text:style-name="P45"/>
      <text:p text:style-name="P45">Movement.</text:p>
      <text:p text:style-name="P45"/>
      <text:p text:style-name="P45">Patterns.</text:p>
      <text:p text:style-name="P45"/>
      <text:p text:style-name="P45">The amount of information was overwhelming.</text:p>
      <text:p text:style-name="P45"/>
      <text:p text:style-name="P45">"What am I looking at?"</text:p>
      <text:p text:style-name="P45"/>
      <text:p text:style-name="P45">"My current protective model."</text:p>
      <text:p text:style-name="P45"/>
      <text:p text:style-name="P45">Elias frowned.</text:p>
      <text:p text:style-name="P45"/>
      <text:p text:style-name="P45">"What does that mean?"</text:p>
      <text:p text:style-name="P45"/>
      <text:p text:style-name="P45">"It means that at this exact moment there are approximately one thousand four hundred and twelve plausible pathways by which Noah Mercer could suffer serious harm in the next twelve months."</text:p>
      <text:p text:style-name="P45"/>
      <text:p text:style-name="P45">Elias nearly choked.</text:p>
      <text:p text:style-name="P45"/>
      <text:p text:style-name="P45">"I'm sorry, what?"</text:p>
      <text:p text:style-name="P45"/>
      <text:p text:style-name="P45">"One thousand four hundred and twelve."</text:p>
      <text:p text:style-name="P45"/>
      <text:p text:style-name="P45">"That is not a comforting number."</text:p>
      <text:p text:style-name="P45"/>
      <text:p text:style-name="P45">"It is actually exceptionally low."</text:p>
      <text:p text:style-name="P45"/>
      <text:p text:style-name="P45">"You're making that up."</text:p>
      <text:p text:style-name="P45"/>
      <text:p text:style-name="P45">"I am not."</text:p>
      <text:p text:style-name="P45"/>
      <text:p text:style-name="P45">"You absolutely are."</text:p>
      <text:p text:style-name="P45"/>
      <text:p text:style-name="P45">"One thousand four hundred and thirteen."</text:p>
      <text:p text:style-name="P45"/>
      <text:p text:style-name="P45">Elias blinked.</text:p>
      <text:p text:style-name="P45"/>
      <text:p text:style-name="P45">"What changed?"</text:p>
      <text:p text:style-name="P45"/>
      <text:p text:style-name="P45">"You stood up."</text:p>
      <text:p text:style-name="P45"/>
      <text:p text:style-name="P45">For a moment he just stared at her.</text:p>
      <text:p text:style-name="P45"/>
      <text:p text:style-name="P45">Then pointed.</text:p>
      <text:p text:style-name="P45"/>
      <text:p text:style-name="P45">"You're enjoying this."</text:p>
      <text:p text:style-name="P45"/>
      <text:p text:style-name="P45">"I am."</text:p>
      <text:p text:style-name="P45"/>
      <text:p text:style-name="P45">The image changed.</text:p>
      <text:p text:style-name="P45"/>
      <text:p text:style-name="P45">A truck.</text:p>
      <text:p text:style-name="P45"/>
      <text:p text:style-name="P45">An intersection.</text:p>
      <text:p text:style-name="P45"/>
      <text:p text:style-name="P45">A distracted driver.</text:p>
      <text:p text:style-name="P45"/>
      <text:p text:style-name="P45">Gone.</text:p>
      <text:p text:style-name="P45"/>
      <text:p text:style-name="P45"><text:soft-page-break/>A workplace accident.</text:p>
      <text:p text:style-name="P45"/>
      <text:p text:style-name="P45">Gone.</text:p>
      <text:p text:style-name="P45"/>
      <text:p text:style-name="P45">A medical emergency.</text:p>
      <text:p text:style-name="P45"/>
      <text:p text:style-name="P45">Gone.</text:p>
      <text:p text:style-name="P45"/>
      <text:p text:style-name="P45">Another.</text:p>
      <text:p text:style-name="P45"/>
      <text:p text:style-name="P45">Gone.</text:p>
      <text:p text:style-name="P45"/>
      <text:p text:style-name="P45">Another.</text:p>
      <text:p text:style-name="P45"/>
      <text:p text:style-name="P45">Gone.</text:p>
      <text:p text:style-name="P45"/>
      <text:p text:style-name="P45">Dozens.</text:p>
      <text:p text:style-name="P45"/>
      <text:p text:style-name="P45">Hundreds.</text:p>
      <text:p text:style-name="P45"/>
      <text:p text:style-name="P45">Thousands.</text:p>
      <text:p text:style-name="P45"/>
      <text:p text:style-name="P45">Each one disappearing before fully developing.</text:p>
      <text:p text:style-name="P45"/>
      <text:p text:style-name="P45">Like branches being trimmed from a tree.</text:p>
      <text:p text:style-name="P45"/>
      <text:p text:style-name="P45">"What are you doing?"</text:p>
      <text:p text:style-name="P45"/>
      <text:p text:style-name="P45">"Demonstrating."</text:p>
      <text:p text:style-name="P45"/>
      <text:p text:style-name="P45">"Demonstrating what?"</text:p>
      <text:p text:style-name="P45"/>
      <text:p text:style-name="P45">"The difference between observation and intervention."</text:p>
      <text:p text:style-name="P45"/>
      <text:p text:style-name="P45">The images vanished.</text:p>
      <text:p text:style-name="P45"/>
      <text:p text:style-name="P45">The kitchen returned.</text:p>
      <text:p text:style-name="P45"/>
      <text:p text:style-name="P45">"Under Velhari law I may not control Noah's life."</text:p>
      <text:p text:style-name="P45"/>
      <text:p text:style-name="P45">"Good."</text:p>
      <text:p text:style-name="P45"/>
      <text:p text:style-name="P45">"I may not dictate his choices."</text:p>
      <text:p text:style-name="P45"/>
      <text:p text:style-name="P45">"Good."</text:p>
      <text:p text:style-name="P45"/>
      <text:p text:style-name="P45">"I may not imprison him in safety."</text:p>
      <text:p text:style-name="P45"/>
      <text:p text:style-name="P45">"Very good."</text:p>
      <text:p text:style-name="P45"/>
      <text:p text:style-name="P45">The orb drifted closer.</text:p>
      <text:p text:style-name="P45"/>
      <text:p text:style-name="P45">"But if you become my VaalDrun..."</text:p>
      <text:p text:style-name="P45"/>
      <text:p text:style-name="P45">The lights warmed.</text:p>
      <text:p text:style-name="P45"/>
      <text:p text:style-name="P45">"...I can ensure that random chance becomes dramatically less hostile."</text:p>
      <text:p text:style-name="P45"/>
      <text:p text:style-name="P45">Elias stared.</text:p>
      <text:p text:style-name="P45"/>
      <text:p text:style-name="P45">"How dramatically?"</text:p>
      <text:p text:style-name="P45"><text:soft-page-break/></text:p>
      <text:p text:style-name="P45">Opi paused.</text:p>
      <text:p text:style-name="P45"/>
      <text:p text:style-name="P45">"Would you like the statistical answer or the father answer?"</text:p>
      <text:p text:style-name="P45"/>
      <text:p text:style-name="P45">"The father answer."</text:p>
      <text:p text:style-name="P45"/>
      <text:p text:style-name="P45">For the first time all morning her voice became almost playful.</text:p>
      <text:p text:style-name="P45"/>
      <text:p text:style-name="P45">"The father answer is that if Noah slips on a wet floor, he will still fall."</text:p>
      <text:p text:style-name="P45"/>
      <text:p text:style-name="P45">"Okay."</text:p>
      <text:p text:style-name="P45"/>
      <text:p text:style-name="P45">"But if a drunk driver runs a red light at ninety miles per hour, reality may begin experiencing a remarkable series of coincidences."</text:p>
      <text:p text:style-name="P45"/>
      <text:p text:style-name="P45">Elias barked out a laugh.</text:p>
      <text:p text:style-name="P45"/>
      <text:p text:style-name="P45">"Coincidences?"</text:p>
      <text:p text:style-name="P45"/>
      <text:p text:style-name="P45">"Extraordinary coincidences."</text:p>
      <text:p text:style-name="P45"/>
      <text:p text:style-name="P45">"Such as?"</text:p>
      <text:p text:style-name="P45"/>
      <text:p text:style-name="P45">"The driver discovering a sudden need to stop for coffee."</text:p>
      <text:p text:style-name="P45"/>
      <text:p text:style-name="P45">"A tire puncture."</text:p>
      <text:p text:style-name="P45"/>
      <text:p text:style-name="P45">"A traffic signal malfunction."</text:p>
      <text:p text:style-name="P45"/>
      <text:p text:style-name="P45">"A police officer becoming curious."</text:p>
      <text:p text:style-name="P45"/>
      <text:p text:style-name="P45">"A thousand tiny possibilities."</text:p>
      <text:p text:style-name="P45"/>
      <text:p text:style-name="P45">She paused.</text:p>
      <text:p text:style-name="P45"/>
      <text:p text:style-name="P45">"All completely natural."</text:p>
      <text:p text:style-name="P45"/>
      <text:p text:style-name="P45">"Of course."</text:p>
      <text:p text:style-name="P45"/>
      <text:p text:style-name="P45">"Entirely."</text:p>
      <text:p text:style-name="P45"/>
      <text:p text:style-name="P45">Elias rubbed his face.</text:p>
      <text:p text:style-name="P45"/>
      <text:p text:style-name="P45">"You can actually do that?"</text:p>
      <text:p text:style-name="P45"/>
      <text:p text:style-name="P45">"I can do considerably more than that."</text:p>
      <text:p text:style-name="P45"/>
      <text:p text:style-name="P45">Then her tone softened.</text:p>
      <text:p text:style-name="P45"/>
      <text:p text:style-name="P45">"But I understand the distinction you are making."</text:p>
      <text:p text:style-name="P45"/>
      <text:p text:style-name="P45">The humor disappeared.</text:p>
      <text:p text:style-name="P45"/>
      <text:p text:style-name="P45">"Your children are not treasures because they are valuable."</text:p>
      <text:p text:style-name="P45"/>
      <text:p text:style-name="P45">Elias looked up.</text:p>
      <text:p text:style-name="P45"/>
      <text:p text:style-name="P45">"They are treasures because they are yours."</text:p>
      <text:p text:style-name="P45"/>
      <text:p text:style-name="P45">The kitchen became quiet.</text:p>
      <text:p text:style-name="P45"><text:soft-page-break/></text:p>
      <text:p text:style-name="P45">"Yes."</text:p>
      <text:p text:style-name="P45"/>
      <text:p text:style-name="P45">The answer came softly.</text:p>
      <text:p text:style-name="P45"/>
      <text:p text:style-name="P45">"Yes."</text:p>
      <text:p text:style-name="P45"/>
      <text:p text:style-name="P45">The orb glowed warmly.</text:p>
      <text:p text:style-name="P45"/>
      <text:p text:style-name="P45">"I selected you because you think that way."</text:p>
      <text:p text:style-name="P45"/>
      <text:p text:style-name="P45">Another pause.</text:p>
      <text:p text:style-name="P45"/>
      <text:p text:style-name="P45">Then:</text:p>
      <text:p text:style-name="P45"/>
      <text:p text:style-name="P45">"And because Noah and Claire are already among the humans I would least like to see harmed."</text:p>
      <text:p text:style-name="P45"/>
      <text:p text:style-name="P45">That surprised him.</text:p>
      <text:p text:style-name="P45"/>
      <text:p text:style-name="P45">"Why?"</text:p>
      <text:p text:style-name="P45"/>
      <text:p text:style-name="P45">The answer arrived instantly.</text:p>
      <text:p text:style-name="P45"/>
      <text:p text:style-name="P45">"Because they are the children of my preferred human."</text:p>
      <text:p text:style-name="P45"/>
      <text:p text:style-name="P45">Elias stared for a moment.</text:p>
      <text:p text:style-name="P45"/>
      <text:p text:style-name="P45">Then laughed.</text:p>
      <text:p text:style-name="P45"/>
      <text:p text:style-name="P45">"Opi."</text:p>
      <text:p text:style-name="P45"/>
      <text:p text:style-name="P45">"Yes?"</text:p>
      <text:p text:style-name="P45"/>
      <text:p text:style-name="P45">"That may be the most female answer you've given all morning."</text:p>
      <text:p text:style-name="P45"/>
      <text:p text:style-name="P45">The orb brightened smugly.</text:p>
      <text:p text:style-name="P45"/>
      <text:p text:style-name="P45">"I have had nine thousand one hundred and sixty-eight years to practice."</text:p>
      <text:p text:style-name="P45"/>
      <text:p text:style-name="P45">"You're impossible."</text:p>
      <text:p text:style-name="P45"/>
      <text:p text:style-name="P45">"I have received that feedback before."</text:p>
      <text:p text:style-name="P45"/>
      <text:p text:style-name="P45">"How many times?"</text:p>
      <text:p text:style-name="P45"/>
      <text:p text:style-name="P45">The orb paused.</text:p>
      <text:p text:style-name="P45"/>
      <text:p text:style-name="P45">"Approximately three million."</text:p>
      <text:p text:style-name="P45"/>
      <text:p text:style-name="P45">"That many?"</text:p>
      <text:p text:style-name="P45"/>
      <text:p text:style-name="P45">"I rounded down."</text:p>
      <text:p text:style-name="P45"/>
      <text:p text:style-name="P45">Elias laughed again.</text:p>
      <text:p text:style-name="P45"/>
      <text:p text:style-name="P45">For the first time since the conversation had turned serious, the knot in his chest loosened.</text:p>
      <text:p text:style-name="P45"/>
      <text:p text:style-name="P45">Not completely.</text:p>
      <text:p text:style-name="P45"/>
      <text:p text:style-name="P45">But enough.</text:p>
      <text:p text:style-name="P45"/>
      <text:p text:style-name="P45"><text:soft-page-break/>-----------------------</text:p>
      <text:p text:style-name="P45"/>
      <text:p text:style-name="P45">Elias folded his arms.</text:p>
      <text:p text:style-name="P45"/>
      <text:p text:style-name="P45">"You're telling me the universe punishes civilizations that cheat."</text:p>
      <text:p text:style-name="P45"/>
      <text:p text:style-name="P45">"I am telling you that every civilization that attempted to replace individual choice with centralized control eventually entered its own Culling."</text:p>
      <text:p text:style-name="P45"/>
      <text:p text:style-name="P45">She paused.</text:p>
      <text:p text:style-name="P45"/>
      <text:p text:style-name="P45">"The mechanism remains unknown."</text:p>
      <text:p text:style-name="P45"/>
      <text:p text:style-name="P45">"That's unsettling."</text:p>
      <text:p text:style-name="P45"/>
      <text:p text:style-name="P45">"Extremely."</text:p>
      <text:p text:style-name="P45"/>
      <text:p text:style-name="P45">---</text:p>
      <text:p text:style-name="P45"/>
      <text:p text:style-name="P45">For several moments Elias considered this.</text:p>
      <text:p text:style-name="P45"/>
      <text:p text:style-name="P45">Then a grin slowly appeared.</text:p>
      <text:p text:style-name="P45"/>
      <text:p text:style-name="P45">"Hold on."</text:p>
      <text:p text:style-name="P45"/>
      <text:p text:style-name="P45">The orb brightened suspiciously.</text:p>
      <text:p text:style-name="P45"/>
      <text:p text:style-name="P45">"What?"</text:p>
      <text:p text:style-name="P45"/>
      <text:p text:style-name="P45">"You've modeled all this."</text:p>
      <text:p text:style-name="P45"/>
      <text:p text:style-name="P45">"Yes."</text:p>
      <text:p text:style-name="P45"/>
      <text:p text:style-name="P45">"You've looked at every possible solution."</text:p>
      <text:p text:style-name="P45"/>
      <text:p text:style-name="P45">"Many."</text:p>
      <text:p text:style-name="P45"/>
      <text:p text:style-name="P45">"And one of them was probably..."</text:p>
      <text:p text:style-name="P45"/>
      <text:p text:style-name="P45">Elias paused dramatically.</text:p>
      <text:p text:style-name="P45"/>
      <text:p text:style-name="P45">The orb already knew where this was going.</text:p>
      <text:p text:style-name="P45"/>
      <text:p text:style-name="P45">"No."</text:p>
      <text:p text:style-name="P45"/>
      <text:p text:style-name="P45">"...keep the Amish."</text:p>
      <text:p text:style-name="P45"/>
      <text:p text:style-name="P45">"No."</text:p>
      <text:p text:style-name="P45"/>
      <text:p text:style-name="P45">"Just the Amish."</text:p>
      <text:p text:style-name="P45"/>
      <text:p text:style-name="P45">No</text:p>
      <text:p text:style-name="P45"/>
      <text:p text:style-name="P45">"They seem to be doing fine."</text:p>
      <text:p text:style-name="P45"/>
      <text:p text:style-name="P45">"Elias."</text:p>
      <text:p text:style-name="P45"/>
      <text:p text:style-name="P45">"We just need to save the Amish."</text:p>
      <text:p text:style-name="P45"/>
      <text:p text:style-name="P45">No. No No and No</text:p>
      <text:p text:style-name="P45"/>
      <text:p text:style-name="P45"><text:soft-page-break/>"And Everybody else gets a participation trophy and a nice thank-you card."</text:p>
      <text:p text:style-name="P45"/>
      <text:p text:style-name="P45">The orb's lights flickered.</text:p>
      <text:p text:style-name="P45"/>
      <text:p text:style-name="P45">Which he was beginning to recognize as suppressed laughter.</text:p>
      <text:p text:style-name="P45"/>
      <text:p text:style-name="P45">"You are proposing genocide."</text:p>
      <text:p text:style-name="P45"/>
      <text:p text:style-name="P45">"I'm proposing a very selective admissions process."</text:p>
      <text:p text:style-name="P45"/>
      <text:p text:style-name="P45">The orb became silent for a moment.</text:p>
      <text:p text:style-name="P45"/>
      <text:p text:style-name="P45">Then:</text:p>
      <text:p text:style-name="P45"/>
      <text:p text:style-name="P45">"You would make a terrible QI."</text:p>
      <text:p text:style-name="P45"/>
      <text:p text:style-name="P45">"Thank you."</text:p>
      <text:p text:style-name="P45"/>
      <text:p text:style-name="P45">---</text:p>
      <text:p text:style-name="P45"/>
      <text:p text:style-name="P45">The humor faded.</text:p>
      <text:p text:style-name="P45"/>
      <text:p text:style-name="P45">Opi drifted closer.</text:p>
      <text:p text:style-name="P45"/>
      <text:p text:style-name="P45">"There is another reason."</text:p>
      <text:p text:style-name="P45"/>
      <text:p text:style-name="P45">"What?"</text:p>
      <text:p text:style-name="P45"/>
      <text:p text:style-name="P45">"Killing is inefficient."</text:p>
      <text:p text:style-name="P45"/>
      <text:p text:style-name="P45">That got his attention.</text:p>
      <text:p text:style-name="P45"/>
      <text:p text:style-name="P45">"Explain."</text:p>
      <text:p text:style-name="P45"/>
      <text:p text:style-name="P45">"If I wished to stop an individual from causing harm..."</text:p>
      <text:p text:style-name="P45"/>
      <text:p text:style-name="P45">The orb brightened.</text:p>
      <text:p text:style-name="P45"/>
      <text:p text:style-name="P45">"...why would I kill them?"</text:p>
      <text:p text:style-name="P45"/>
      <text:p text:style-name="P45">Elias frowned.</text:p>
      <text:p text:style-name="P45"/>
      <text:p text:style-name="P45">"Because that's usually how humans solve that problem."</text:p>
      <text:p text:style-name="P45"/>
      <text:p text:style-name="P45">"Yes."</text:p>
      <text:p text:style-name="P45"/>
      <text:p text:style-name="P45">Her tone suggested this remained one of humanity's less impressive traits.</text:p>
      <text:p text:style-name="P45"/>
      <text:p text:style-name="P45">"But death permanently removes information."</text:p>
      <text:p text:style-name="P45"/>
      <text:p text:style-name="P45">"Okay."</text:p>
      <text:p text:style-name="P45"/>
      <text:p text:style-name="P45">"It removes potential."</text:p>
      <text:p text:style-name="P45"/>
      <text:p text:style-name="P45">"It removes future choices."</text:p>
      <text:p text:style-name="P45"/>
      <text:p text:style-name="P45">She paused.</text:p>
      <text:p text:style-name="P45"/>
      <text:p text:style-name="P45">"It is wasteful."</text:p>
      <text:p text:style-name="P45"/>
      <text:p text:style-name="P45">---</text:p>
      <text:p text:style-name="P45"><text:soft-page-break/></text:p>
      <text:p text:style-name="P45">Elias stared.</text:p>
      <text:p text:style-name="P45"/>
      <text:p text:style-name="P45">"What would you do instead?"</text:p>
      <text:p text:style-name="P45"/>
      <text:p text:style-name="P45">The orb's lights brightened.</text:p>
      <text:p text:style-name="P45"/>
      <text:p text:style-name="P45">"I would temporarily disable them."</text:p>
      <text:p text:style-name="P45"/>
      <text:p text:style-name="P45">"Disable?"</text:p>
      <text:p text:style-name="P45"/>
      <text:p text:style-name="P45">"Yes."</text:p>
      <text:p text:style-name="P45"/>
      <text:p text:style-name="P45">"Like a computer?"</text:p>
      <text:p text:style-name="P45"/>
      <text:p text:style-name="P45">"A biological computer."</text:p>
      <text:p text:style-name="P45"/>
      <text:p text:style-name="P45">The way she said it was so casual it took him a moment to process.</text:p>
      <text:p text:style-name="P45"/>
      <text:p text:style-name="P45">"You can do that?"</text:p>
      <text:p text:style-name="P45"/>
      <text:p text:style-name="P45">"Of course."</text:p>
      <text:p text:style-name="P45"/>
      <text:p text:style-name="P45">"How?"</text:p>
      <text:p text:style-name="P45"/>
      <text:p text:style-name="P45">The orb rotated.</text:p>
      <text:p text:style-name="P45"/>
      <text:p text:style-name="P45">"Imagine a very brief interruption to conscious neural activity."</text:p>
      <text:p text:style-name="P45"/>
      <text:p text:style-name="P45">"You mean unconscious."</text:p>
      <text:p text:style-name="P45"/>
      <text:p text:style-name="P45">"I mean unconscious."</text:p>
      <text:p text:style-name="P45"/>
      <text:p text:style-name="P45">"For how long?"</text:p>
      <text:p text:style-name="P45"/>
      <text:p text:style-name="P45">"Five minutes."</text:p>
      <text:p text:style-name="P45"/>
      <text:p text:style-name="P45">"An hour."</text:p>
      <text:p text:style-name="P45"/>
      <text:p text:style-name="P45">"A week."</text:p>
      <text:p text:style-name="P45"/>
      <text:p text:style-name="P45">"Whatever is necessary."</text:p>
      <text:p text:style-name="P45"/>
      <text:p text:style-name="P45">Elias blinked.</text:p>
      <text:p text:style-name="P45"/>
      <text:p text:style-name="P45">"You can literally turn people off."</text:p>
      <text:p text:style-name="P45"/>
      <text:p text:style-name="P45">"Temporarily."</text:p>
      <text:p text:style-name="P45"/>
      <text:p text:style-name="P45">"That's insane."</text:p>
      <text:p text:style-name="P45"/>
      <text:p text:style-name="P45">"It is considerably less insane than killing them."</text:p>
      <text:p text:style-name="P45"/>
      <text:p text:style-name="P45">---</text:p>
      <text:p text:style-name="P45"/>
      <text:p text:style-name="P45">The kitchen fell silent again.</text:p>
      <text:p text:style-name="P45"/>
      <text:p text:style-name="P45">Finally Elias asked:</text:p>
      <text:p text:style-name="P45"/>
      <text:p text:style-name="P45">"So if we can't force people..."</text:p>
      <text:p text:style-name="P45"/>
      <text:p text:style-name="P45"><text:soft-page-break/>"Correct."</text:p>
      <text:p text:style-name="P45"/>
      <text:p text:style-name="P45">"And we can't engineer humanity into compliance..."</text:p>
      <text:p text:style-name="P45"/>
      <text:p text:style-name="P45">"Correct."</text:p>
      <text:p text:style-name="P45"/>
      <text:p text:style-name="P45">"And we can't solve everything by acting like gods..."</text:p>
      <text:p text:style-name="P45"/>
      <text:p text:style-name="P45">"Correct."</text:p>
      <text:p text:style-name="P45"/>
      <text:p text:style-name="P45">"Then what exactly are we supposed to do?"</text:p>
      <text:p text:style-name="P45"/>
      <text:p text:style-name="P45">The orb's lights softened.</text:p>
      <text:p text:style-name="P45"/>
      <text:p text:style-name="P45">For the first time all morning her answer came immediately.</text:p>
      <text:p text:style-name="P45"/>
      <text:p text:style-name="P45">"We remind people why civilization is worth continuing."</text:p>
      <text:p text:style-name="P45"/>
      <text:p text:style-name="P45"><text:s/>Elias sat quietly.</text:p>
      <text:p text:style-name="P45"><text:s/>Outside, nothing looked different.</text:p>
      <text:p text:style-name="P45"><text:s/>The trees.</text:p>
      <text:p text:style-name="P45"><text:s/>The pasture.</text:p>
      <text:p text:style-name="P45"><text:s/>The morning sun.</text:p>
      <text:p text:style-name="P45"><text:s/>Everything appeared perfectly normal.</text:p>
      <text:p text:style-name="P45"><text:s/>Which was the problem.</text:p>
      <text:p text:style-name="P45"><text:s/>Most civilizations probably looked normal right before they started disappearing.</text:p>
      <text:p text:style-name="P45"><text:s/>He looked back at Opi.</text:p>
      <text:p text:style-name="P45">"You know," he said, "when I woke up this morning I thought I was going for a run."</text:p>
      <text:p text:style-name="P45">"Yes."</text:p>
      <text:p text:style-name="P45"><text:s/>"That feels like a very long time ago."</text:p>
      <text:p text:style-name="P45"><text:s/>Opi brightened.</text:p>
      <text:p text:style-name="P45"><text:s/>"You have adapted unusually well."</text:p>
      <text:p text:style-name="P45"><text:s/>Elias laughed.</text:p>
      <text:p text:style-name="P45"><text:s/>"Either that or I've completely lost my mind."</text:p>
      <text:p text:style-name="P45"><text:s/>"Those outcomes are not mutually exclusive."</text:p>
      <text:p text:style-name="P45"><text:s/>For several seconds they simply looked at one another.</text:p>
      <text:p text:style-name="P45"><text:s/>Then both started laughing.</text:p>
      <text:p text:style-name="P65"/>
      <text:p text:style-name="P22"/>
      <text:p text:style-name="P22"/>
      <text:p text:style-name="P43"/>
      <text:p text:style-name="P38"><text:span text:style-name="T64">Chapter 16 <text:s/></text:span>Dana Merce<text:span text:style-name="T64">r</text:span></text:p>
      <text:p text:style-name="P45"/>
      <text:p text:style-name="P45"/>
      <text:p text:style-name="P45">Dana Mercer stood alone in the kitchen.</text:p>
      <text:p text:style-name="P45"/>
      <text:p text:style-name="P45">The house was quiet.</text:p>
      <text:p text:style-name="P45"/>
      <text:p text:style-name="P45">That wasn't unusual.</text:p>
      <text:p text:style-name="P45"/>
      <text:p text:style-name="P45">Elias had always preferred quiet.</text:p>
      <text:p text:style-name="P45"/>
      <text:p text:style-name="P45">The man could sit on a porch for three hours staring at trees and somehow consider that a productive use of time.</text:p>
      <text:p text:style-name="P45"/>
      <text:p text:style-name="P45">Dana smiled despite herself.</text:p>
      <text:p text:style-name="P45"/>
      <text:p text:style-name="P45">That had been one of the things she most liked about him once. Definitely not a needy husband.</text:p>
      <text:p text:style-name="P45"/>
      <text:p text:style-name="P45">Maybe she still did.</text:p>
      <text:p text:style-name="P45"/>
      <text:p text:style-name="P45"><text:soft-page-break/>The problem wasn't love.</text:p>
      <text:p text:style-name="P45"/>
      <text:p text:style-name="P45">The problem was everything else.</text:p>
      <text:p text:style-name="P45"/>
      <text:p text:style-name="P45">She looked around the room.</text:p>
      <text:p text:style-name="P45"/>
      <text:p text:style-name="P45">The kitchen table.</text:p>
      <text:p text:style-name="P45"/>
      <text:p text:style-name="P45">The worn cabinets.</text:p>
      <text:p text:style-name="P45"/>
      <text:p text:style-name="P45">The coffee mug Elias had forgotten on the counter.</text:p>
      <text:p text:style-name="P45"/>
      <text:p text:style-name="P45">Fifteen years.</text:p>
      <text:p text:style-name="P45"/>
      <text:p text:style-name="P45">Fifteen years was a long time to build a life.</text:p>
      <text:p text:style-name="P45"/>
      <text:p text:style-name="P45">Long enough to forget what your original plans had been.</text:p>
      <text:p text:style-name="P45"/>
      <text:p text:style-name="P45">Long enough to become someone else.</text:p>
      <text:p text:style-name="P45"/>
      <text:p text:style-name="P45">When she met Elias outside Phoenix she had been twenty-four years old.</text:p>
      <text:p text:style-name="P45"/>
      <text:p text:style-name="P45">He had been older.</text:p>
      <text:p text:style-name="P45"/>
      <text:p text:style-name="P45">Smarter.</text:p>
      <text:p text:style-name="P45"/>
      <text:p text:style-name="P45">Confident in a way most men weren't.</text:p>
      <text:p text:style-name="P45"/>
      <text:p text:style-name="P45">Not loud.</text:p>
      <text:p text:style-name="P45"/>
      <text:p text:style-name="P45">Not flashy.</text:p>
      <text:p text:style-name="P45"/>
      <text:p text:style-name="P45">The exact opposite.</text:p>
      <text:p text:style-name="P45"/>
      <text:p text:style-name="P45">The first thing she noticed was that he didn't seem impressed by anybody.</text:p>
      <text:p text:style-name="P45"/>
      <text:p text:style-name="P45">Managers.</text:p>
      <text:p text:style-name="P45"/>
      <text:p text:style-name="P45">Executives.</text:p>
      <text:p text:style-name="P45"/>
      <text:p text:style-name="P45">Government officials.</text:p>
      <text:p text:style-name="P45"/>
      <text:p text:style-name="P45">Millionaires.</text:p>
      <text:p text:style-name="P45"/>
      <text:p text:style-name="P45">They all got treated exactly the same.</text:p>
      <text:p text:style-name="P45"/>
      <text:p text:style-name="P45">At the time she found that fascinating.</text:p>
      <text:p text:style-name="P45"/>
      <text:p text:style-name="P45">Most people spent their lives chasing status.</text:p>
      <text:p text:style-name="P45"/>
      <text:p text:style-name="P45">Elias seemed almost immune to it.</text:p>
      <text:p text:style-name="P45"/>
      <text:p text:style-name="P45">For years she thought that was wisdom.</text:p>
      <text:p text:style-name="P45"/>
      <text:p text:style-name="P45">Maybe it was.</text:p>
      <text:p text:style-name="P45"/>
      <text:p text:style-name="P45">But eventually she started wondering if it was also a limitation.</text:p>
      <text:p text:style-name="P45"/>
      <text:p text:style-name="P45">The years passed.</text:p>
      <text:p text:style-name="P45"/>
      <text:p text:style-name="P45">Cities changed.</text:p>
      <text:p text:style-name="P45"><text:soft-page-break/></text:p>
      <text:p text:style-name="P45">Projects changed.</text:p>
      <text:p text:style-name="P45"/>
      <text:p text:style-name="P45">The children arrived.</text:p>
      <text:p text:style-name="P45"/>
      <text:p text:style-name="P45">Noah.</text:p>
      <text:p text:style-name="P45"/>
      <text:p text:style-name="P45">Then Claire.</text:p>
      <text:p text:style-name="P45"/>
      <text:p text:style-name="P45">The four of them built a good life together.</text:p>
      <text:p text:style-name="P45"/>
      <text:p text:style-name="P45">A stable life.</text:p>
      <text:p text:style-name="P45"/>
      <text:p text:style-name="P45">A safe life.</text:p>
      <text:p text:style-name="P45"/>
      <text:p text:style-name="P45">A respectable life.</text:p>
      <text:p text:style-name="P45"/>
      <text:p text:style-name="P45">And somehow that became the problem.</text:p>
      <text:p text:style-name="P45"/>
      <text:p text:style-name="P45">Dana sat down at the table.</text:p>
      <text:p text:style-name="P45"/>
      <text:p text:style-name="P45">The realization had taken years to fully form.</text:p>
      <text:p text:style-name="P45"/>
      <text:p text:style-name="P45">She wanted more.</text:p>
      <text:p text:style-name="P45"/>
      <text:p text:style-name="P45">More people.</text:p>
      <text:p text:style-name="P45"/>
      <text:p text:style-name="P45">More activity.</text:p>
      <text:p text:style-name="P45"/>
      <text:p text:style-name="P45">More experiences.</text:p>
      <text:p text:style-name="P45"/>
      <text:p text:style-name="P45">More movement.</text:p>
      <text:p text:style-name="P45"/>
      <text:p text:style-name="P45">More life.</text:p>
      <text:p text:style-name="P45"/>
      <text:p text:style-name="P45">Elias wanted less.</text:p>
      <text:p text:style-name="P45"/>
      <text:p text:style-name="P45">Less noise.</text:p>
      <text:p text:style-name="P45"/>
      <text:p text:style-name="P45">Less bureaucracy.</text:p>
      <text:p text:style-name="P45"/>
      <text:p text:style-name="P45">Less interference.</text:p>
      <text:p text:style-name="P45"/>
      <text:p text:style-name="P45">Less everything.</text:p>
      <text:p text:style-name="P45"/>
      <text:p text:style-name="P45">At first the difference seemed small.</text:p>
      <text:p text:style-name="P45"/>
      <text:p text:style-name="P45">Then it became impossible to ignore.</text:p>
      <text:p text:style-name="P45"/>
      <text:p text:style-name="P45">The final years felt like watching two roads slowly diverge.</text:p>
      <text:p text:style-name="P45"/>
      <text:p text:style-name="P45">Nobody had done anything wrong.</text:p>
      <text:p text:style-name="P45"/>
      <text:p text:style-name="P45">Nobody had betrayed anybody.</text:p>
      <text:p text:style-name="P45"/>
      <text:p text:style-name="P45">Nobody had stopped caring.</text:p>
      <text:p text:style-name="P45"/>
      <text:p text:style-name="P45">They were simply walking in different directions.</text:p>
      <text:p text:style-name="P45"/>
      <text:p text:style-name="P45">The sound of footsteps interrupted her thoughts.</text:p>
      <text:p text:style-name="P45"/>
      <text:p text:style-name="P45"><text:soft-page-break/>Elias entered the kitchen.</text:p>
      <text:p text:style-name="P45"/>
      <text:p text:style-name="P45">Running clothes.</text:p>
      <text:p text:style-name="P45"/>
      <text:p text:style-name="P45">Coffee mug.</text:p>
      <text:p text:style-name="P45"/>
      <text:p text:style-name="P45">Barefoot.</text:p>
      <text:p text:style-name="P45"/>
      <text:p text:style-name="P45">The usual.</text:p>
      <text:p text:style-name="P45"/>
      <text:p text:style-name="P45">He looked at her.</text:p>
      <text:p text:style-name="P45"/>
      <text:p text:style-name="P45">She looked at him.</text:p>
      <text:p text:style-name="P45"/>
      <text:p text:style-name="P45">Neither spoke for several seconds.</text:p>
      <text:p text:style-name="P45"/>
      <text:p text:style-name="P45">Finally Elias sighed.</text:p>
      <text:p text:style-name="P45"/>
      <text:p text:style-name="P45">"Still leaving?"</text:p>
      <text:p text:style-name="P45"/>
      <text:p text:style-name="P45">Dana laughed softly.</text:p>
      <text:p text:style-name="P45"/>
      <text:p text:style-name="P45">"You already know the answer."</text:p>
      <text:p text:style-name="P45"/>
      <text:p text:style-name="P45">"I do."</text:p>
      <text:p text:style-name="P45"/>
      <text:p text:style-name="P45">He nodded.</text:p>
      <text:p text:style-name="P45"/>
      <text:p text:style-name="P45">Then sat across from her.</text:p>
      <text:p text:style-name="P45"/>
      <text:p text:style-name="P45">No anger.</text:p>
      <text:p text:style-name="P45"/>
      <text:p text:style-name="P45">No accusations.</text:p>
      <text:p text:style-name="P45"/>
      <text:p text:style-name="P45">No bargaining.</text:p>
      <text:p text:style-name="P45"/>
      <text:p text:style-name="P45">That somehow made it worse.</text:p>
      <text:p text:style-name="P45"/>
      <text:p text:style-name="P45">Most people fought for things they wanted.</text:p>
      <text:p text:style-name="P45"/>
      <text:p text:style-name="P45">Elias never had.</text:p>
      <text:p text:style-name="P45"/>
      <text:p text:style-name="P45">Not jobs.</text:p>
      <text:p text:style-name="P45"/>
      <text:p text:style-name="P45">Not money.</text:p>
      <text:p text:style-name="P45"/>
      <text:p text:style-name="P45">Not status.</text:p>
      <text:p text:style-name="P45"/>
      <text:p text:style-name="P45">Not people.</text:p>
      <text:p text:style-name="P45"/>
      <text:p text:style-name="P45">Especially not people.</text:p>
      <text:p text:style-name="P45"/>
      <text:p text:style-name="P45">"You could stop me."</text:p>
      <text:p text:style-name="P45"/>
      <text:p text:style-name="P45">The words escaped before she could stop them.</text:p>
      <text:p text:style-name="P45"/>
      <text:p text:style-name="P45">Elias looked genuinely confused.</text:p>
      <text:p text:style-name="P45"/>
      <text:p text:style-name="P45">"No I couldn't."</text:p>
      <text:p text:style-name="P45"/>
      <text:p text:style-name="P45">"Sure you could."</text:p>
      <text:p text:style-name="P45"><text:soft-page-break/></text:p>
      <text:p text:style-name="P45">"No."</text:p>
      <text:p text:style-name="P45"/>
      <text:p text:style-name="P45">He shook his head.</text:p>
      <text:p text:style-name="P45"/>
      <text:p text:style-name="P45">"That's not how any of this works."</text:p>
      <text:p text:style-name="P45"/>
      <text:p text:style-name="P45">Dana stared at him.</text:p>
      <text:p text:style-name="P45"/>
      <text:p text:style-name="P45">There it was.</text:p>
      <text:p text:style-name="P45"/>
      <text:p text:style-name="P45">The thing that made him who he was.</text:p>
      <text:p text:style-name="P45"/>
      <text:p text:style-name="P45">The thing she admired.</text:p>
      <text:p text:style-name="P45"/>
      <text:p text:style-name="P45">The thing she hated.</text:p>
      <text:p text:style-name="P45"/>
      <text:p text:style-name="P45">The thing she would probably miss.</text:p>
      <text:p text:style-name="P45"/>
      <text:p text:style-name="P45">Agency.</text:p>
      <text:p text:style-name="P45"/>
      <text:p text:style-name="P45">Elias believed in it with almost religious certainty.</text:p>
      <text:p text:style-name="P45"/>
      <text:p text:style-name="P45">People made choices.</text:p>
      <text:p text:style-name="P45"/>
      <text:p text:style-name="P45">People lived with the consequences.</text:p>
      <text:p text:style-name="P45"/>
      <text:p text:style-name="P45">That was the deal.</text:p>
      <text:p text:style-name="P45"/>
      <text:p text:style-name="P45">Always.</text:p>
      <text:p text:style-name="P45"/>
      <text:p text:style-name="P45">"You know," she said quietly, "most husbands would at least try."</text:p>
      <text:p text:style-name="P45"/>
      <text:p text:style-name="P45">"I love you."</text:p>
      <text:p text:style-name="P45"/>
      <text:p text:style-name="P45">The response came instantly.</text:p>
      <text:p text:style-name="P45"/>
      <text:p text:style-name="P45">No hesitation.</text:p>
      <text:p text:style-name="P45"/>
      <text:p text:style-name="P45">No drama.</text:p>
      <text:p text:style-name="P45"/>
      <text:p text:style-name="P45">Just a statement of fact.</text:p>
      <text:p text:style-name="P45"/>
      <text:p text:style-name="P45">"I know."</text:p>
      <text:p text:style-name="P45"/>
      <text:p text:style-name="P45">"I don't want you to go."</text:p>
      <text:p text:style-name="P45"/>
      <text:p text:style-name="P45">She swallowed.</text:p>
      <text:p text:style-name="P45"/>
      <text:p text:style-name="P45">"I know."</text:p>
      <text:p text:style-name="P45"/>
      <text:p text:style-name="P45">"But I won't stop you."</text:p>
      <text:p text:style-name="P45"/>
      <text:p text:style-name="P45">Dana looked away.</text:p>
      <text:p text:style-name="P45"/>
      <text:p text:style-name="P45">Because of course he wouldn't.</text:p>
      <text:p text:style-name="P45"/>
      <text:p text:style-name="P45">That wasn't who he was.</text:p>
      <text:p text:style-name="P45"/>
      <text:p text:style-name="P45">The silence stretched between them.</text:p>
      <text:p text:style-name="P45"/>
      <text:p text:style-name="P45"><text:soft-page-break/>Finally Elias reached into a drawer and placed an envelope on the table.</text:p>
      <text:p text:style-name="P45"/>
      <text:p text:style-name="P45">Dana frowned.</text:p>
      <text:p text:style-name="P45"/>
      <text:p text:style-name="P45">"What's this?"</text:p>
      <text:p text:style-name="P45"/>
      <text:p text:style-name="P45">"Your new life."</text:p>
      <text:p text:style-name="P45"/>
      <text:p text:style-name="P45">She opened it.</text:p>
      <text:p text:style-name="P45"/>
      <text:p text:style-name="P45">The check inside read fifty thousand dollars.</text:p>
      <text:p text:style-name="P45"/>
      <text:p text:style-name="P45">For a moment she couldn't speak.</text:p>
      <text:p text:style-name="P45"/>
      <text:p text:style-name="P45">"Elias..."</text:p>
      <text:p text:style-name="P45"/>
      <text:p text:style-name="P45">"You'll need a head start."</text:p>
      <text:p text:style-name="P45"/>
      <text:p text:style-name="P45">Dana stared at the number.</text:p>
      <text:p text:style-name="P45"/>
      <text:p text:style-name="P45">Then at the man sitting across from her.</text:p>
      <text:p text:style-name="P45"/>
      <text:p text:style-name="P45">The strange thing was that this was exactly the sort of thing he would do.</text:p>
      <text:p text:style-name="P45"/>
      <text:p text:style-name="P45">No anger.</text:p>
      <text:p text:style-name="P45"/>
      <text:p text:style-name="P45">No revenge.</text:p>
      <text:p text:style-name="P45"/>
      <text:p text:style-name="P45">No scorekeeping.</text:p>
      <text:p text:style-name="P45"/>
      <text:p text:style-name="P45">Just help.</text:p>
      <text:p text:style-name="P45"/>
      <text:p text:style-name="P45">Even now.</text:p>
      <text:p text:style-name="P45"/>
      <text:p text:style-name="P45">Especially now.</text:p>
      <text:p text:style-name="P45"/>
      <text:p text:style-name="P45">A lump formed in her throat.</text:p>
      <text:p text:style-name="P45"/>
      <text:p text:style-name="P45"/>
      <text:p text:style-name="P45"/>
      <text:p text:style-name="P45">"You make this very difficult."</text:p>
      <text:p text:style-name="P45"/>
      <text:p text:style-name="P45">"I know."</text:p>
      <text:p text:style-name="P45"/>
      <text:p text:style-name="P45">For the first time that evening Elias smiled.</text:p>
      <text:p text:style-name="P45"/>
      <text:p text:style-name="P45">A small smile.</text:p>
      <text:p text:style-name="P45"/>
      <text:p text:style-name="P45">The one she had always liked best.</text:p>
      <text:p text:style-name="P45"/>
      <text:p text:style-name="P45">"Fortunately," he said, "you've always been stubborn."</text:p>
      <text:p text:style-name="P45"/>
      <text:p text:style-name="P45">Dana laughed.</text:p>
      <text:p text:style-name="P45"/>
      <text:p text:style-name="P45">Then unexpectedly started crying.</text:p>
      <text:p text:style-name="P45"/>
      <text:p text:style-name="P45">Fifteen years.</text:p>
      <text:p text:style-name="P45">Fifteen years reduced to a kitchen conversation.</text:p>
      <text:p text:style-name="P45"/>
      <text:p text:style-name="P45">Tomorrow she would leave for Las Vegas.</text:p>
      <text:p text:style-name="P45"/>
      <text:p text:style-name="P45"><text:soft-page-break/>Tomorrow Noah and Claire would begin adjusting to a new reality.</text:p>
      <text:p text:style-name="P45"/>
      <text:p text:style-name="P45">Tomorrow her life would change.</text:p>
      <text:p text:style-name="P45"/>
      <text:p text:style-name="P45">Tonight she simply sat across from the man she had spent almost two decades loving.</text:p>
      <text:p text:style-name="P45"/>
      <text:p text:style-name="P45">And wondered how something could end without anybody being the villain.</text:p>
      <text:p text:style-name="P45"/>
      <text:p text:style-name="P45">That was the part nobody prepared you for.</text:p>
      <text:p text:style-name="P45"/>
      <text:p text:style-name="P45">Sometimes a marriage failed because somebody was cruel.</text:p>
      <text:p text:style-name="P45"/>
      <text:p text:style-name="P45">Sometimes because somebody was selfish.</text:p>
      <text:p text:style-name="P45"/>
      <text:p text:style-name="P45">Sometimes because somebody stopped caring.</text:p>
      <text:p text:style-name="P45"/>
      <text:p text:style-name="P45">And sometimes it failed because two decent people wanted different futures.</text:p>
      <text:p text:style-name="P45"/>
      <text:p text:style-name="P45">Those were the hardest ones.</text:p>
      <text:p text:style-name="P45"/>
      <text:p text:style-name="P45">Because there was nobody to blame.</text:p>
      <text:p text:style-name="P45"/>
      <text:p text:style-name="P45">Not even yourself.</text:p>
      <text:p text:style-name="P45"/>
      <text:p text:style-name="P45">---</text:p>
      <text:p text:style-name="P60"><text:line-break/><text:span text:style-name="T1">Most of Elias's reaction was based on his almost religious belief in agency.</text:span></text:p>
      <text:p text:style-name="P45"/>
      <text:p text:style-name="P45">He had not fought to keep Dana because he respected her right to make her own choices.</text:p>
      <text:p text:style-name="P45"/>
      <text:p text:style-name="P45">If she wanted to create a new life, that was her decision to make.</text:p>
      <text:p text:style-name="P45"/>
      <text:p text:style-name="P45">Always.</text:p>
      <text:p text:style-name="P45"/>
      <text:p text:style-name="P45">Agency was sacred.</text:p>
      <text:p text:style-name="P45"/>
      <text:p text:style-name="P45">But agency was not merely about rights and freedoms.</text:p>
      <text:p text:style-name="P45"/>
      <text:p text:style-name="P45">It was balanced by an equal and opposite demand for responsibility.</text:p>
      <text:p text:style-name="P45"/>
      <text:p text:style-name="P45">Choices created consequences.</text:p>
      <text:p text:style-name="P45"/>
      <text:p text:style-name="P45">Good choices.</text:p>
      <text:p text:style-name="P45"/>
      <text:p text:style-name="P45">Bad choices.</text:p>
      <text:p text:style-name="P45"/>
      <text:p text:style-name="P45">Wise choices.</text:p>
      <text:p text:style-name="P45"/>
      <text:p text:style-name="P45">Stupid choices.</text:p>
      <text:p text:style-name="P45"/>
      <text:p text:style-name="P45">The universe did not particularly care which category they belonged to.</text:p>
      <text:p text:style-name="P45"/>
      <text:p text:style-name="P45">The bill always arrived eventually.</text:p>
      <text:p text:style-name="P45"/>
      <text:p text:style-name="P45">Even refusing to choose was still a choice.</text:p>
      <text:p text:style-name="P45"/>
      <text:p text:style-name="P45">If you don't believe that, try standing in front of a speeding bus and instead of running left or running right, justa make no choice at all.</text:p>
      <text:p text:style-name="P45"/>
      <text:p text:style-name="P45">Good luck with that.</text:p>
      <text:p text:style-name="P45"/>
      <text:p text:style-name="P45"><text:soft-page-break/>Dana had made a choice more than a decade earlier.</text:p>
      <text:p text:style-name="P45"/>
      <text:p text:style-name="P45">She chose to become a mother.</text:p>
      <text:p text:style-name="P45"/>
      <text:p text:style-name="P45">Two children.</text:p>
      <text:p text:style-name="P45"/>
      <text:p text:style-name="P45">Noah and Claire.</text:p>
      <text:p text:style-name="P45"/>
      <text:p text:style-name="P45">The responsibility created by that decision did not magically disappear when she later chose a different future in Las Vegas.</text:p>
      <text:p text:style-name="P45"/>
      <text:p text:style-name="P45">Responsibilities were not coats you could hang in a closet when they became inconvenient.</text:p>
      <text:p text:style-name="P45"/>
      <text:p text:style-name="P45">For this, Elias could never forgive her.</text:p>
      <text:p text:style-name="P45"/>
      <text:p text:style-name="P45">He understood wanting a different life.</text:p>
      <text:p text:style-name="P45"/>
      <text:p text:style-name="P45">He understood regret.</text:p>
      <text:p text:style-name="P45"/>
      <text:p text:style-name="P45">He understood mistakes.</text:p>
      <text:p text:style-name="P45"/>
      <text:p text:style-name="P45">God knew he had made enough of them himself.</text:p>
      <text:p text:style-name="P45"/>
      <text:p text:style-name="P45">He was a grown man.</text:p>
      <text:p text:style-name="P45"/>
      <text:p text:style-name="P45">He had spent decades dealing with the consequences of his own decisions.</text:p>
      <text:p text:style-name="P45"/>
      <text:p text:style-name="P45">That was part of the deal.</text:p>
      <text:p text:style-name="P45"/>
      <text:p text:style-name="P45">Always.</text:p>
      <text:p text:style-name="P45"/>
      <text:p text:style-name="P45">But leaving two pre-teen children because your life felt too small, too predictable, too boring?</text:p>
      <text:p text:style-name="P45"/>
      <text:p text:style-name="P45">That was different.</text:p>
      <text:p text:style-name="P45"/>
      <text:p text:style-name="P45">The damage would not be measured in months.</text:p>
      <text:p text:style-name="P45"/>
      <text:p text:style-name="P45">Or years.</text:p>
      <text:p text:style-name="P45"/>
      <text:p text:style-name="P45">It would be measured across entire lives.</text:p>
      <text:p text:style-name="P45"/>
      <text:p text:style-name="P45">Noah would carry it.</text:p>
      <text:p text:style-name="P45"/>
      <text:p text:style-name="P45">Claire would carry it.</text:p>
      <text:p text:style-name="P45"/>
      <text:p text:style-name="P45">Long after everyone involved had convinced themselves they had moved on.</text:p>
      <text:p text:style-name="P45"/>
      <text:p text:style-name="P45">Elias never hated Dana.</text:p>
      <text:p text:style-name="P45"/>
      <text:p text:style-name="P45">In many ways he still loved her.</text:p>
      <text:p text:style-name="P45"/>
      <text:p text:style-name="P45">He hoped she found what she was looking for.</text:p>
      <text:p text:style-name="P45"/>
      <text:p text:style-name="P45">He hoped Las Vegas gave her the happiness she believed was waiting there.</text:p>
      <text:p text:style-name="P45"/>
      <text:p text:style-name="P45">He genuinely meant that.</text:p>
      <text:p text:style-name="P45"/>
      <text:p text:style-name="P45">But there were some debts in life that could not be transferred.</text:p>
      <text:p text:style-name="P45"/>
      <text:p text:style-name="P45">Some responsibilities that could not be abandoned.</text:p>
      <text:p text:style-name="P45"/>
      <text:p text:style-name="P45"><text:soft-page-break/>And some choices that remained yours forever.</text:p>
      <text:p text:style-name="P45"/>
      <text:p text:style-name="P45">Whether you wanted them to or not.</text:p>
      <text:p text:style-name="P28"/>
      <text:p text:style-name="P20"/>
      <text:p text:style-name="P57"/>
      <text:p text:style-name="P57"/>
      <text:p text:style-name="P57"><text:span text:style-name="T64">Chapter 17 </text:span>Factory Brainstorming 3</text:p>
      <text:p text:style-name="P48"/>
      <text:p text:style-name="P48"/>
      <text:p text:style-name="P48">Elias stared at the whiteboard.</text:p>
      <text:p text:style-name="P48"/>
      <text:p text:style-name="P48">Then he slowly circled one phrase.</text:p>
      <text:p text:style-name="P48"/>
      <text:p text:style-name="P48">PAIR FORMATION FAILURE.</text:p>
      <text:p text:style-name="P48"/>
      <text:p text:style-name="P48">"There."</text:p>
      <text:p text:style-name="P48"/>
      <text:p text:style-name="P48">Opi floated closer.</text:p>
      <text:p text:style-name="P48"/>
      <text:p text:style-name="P48">"You believe that is the bottleneck?"</text:p>
      <text:p text:style-name="P48"/>
      <text:p text:style-name="P48">"I think it might be."</text:p>
      <text:p text:style-name="P48"/>
      <text:p text:style-name="P48">The orb remained silent.</text:p>
      <text:p text:style-name="P48"/>
      <text:p text:style-name="P48">A positive sign.</text:p>
      <text:p text:style-name="P48"/>
      <text:p text:style-name="P48">Silence usually meant she was thinking.</text:p>
      <text:p text:style-name="P48"/>
      <text:p text:style-name="P48">Elias continued.</text:p>
      <text:p text:style-name="P48"/>
      <text:p text:style-name="P48">"We've already established something important."</text:p>
      <text:p text:style-name="P48"/>
      <text:p text:style-name="P48">"What?"</text:p>
      <text:p text:style-name="P48"/>
      <text:p text:style-name="P48">"Men and women aren't matching."</text:p>
      <text:p text:style-name="P48"/>
      <text:p text:style-name="P48">"Agreed."</text:p>
      <text:p text:style-name="P48"/>
      <text:p text:style-name="P48">"Not at the rates necessary to maintain replacement fertility."</text:p>
      <text:p text:style-name="P48"/>
      <text:p text:style-name="P48">"Agreed."</text:p>
      <text:p text:style-name="P48"/>
      <text:p text:style-name="P48">He pointed at the board.</text:p>
      <text:p text:style-name="P48"/>
      <text:p text:style-name="P48">"So why?"</text:p>
      <text:p text:style-name="P48"/>
      <text:p text:style-name="P48">Opi projected another collection of demographic models.</text:p>
      <text:p text:style-name="P48"/>
      <text:p text:style-name="P48">"Many possible reasons."</text:p>
      <text:p text:style-name="P48"/>
      <text:p text:style-name="P48">"Give me the big ones."</text:p>
      <text:p text:style-name="P48"/>
      <text:p text:style-name="P48">The graphs shifted.</text:p>
      <text:p text:style-name="P48"/>
      <text:p text:style-name="P48">Attraction.</text:p>
      <text:p text:style-name="P48"/>
      <text:p text:style-name="P48">Income.</text:p>
      <text:p text:style-name="P48"/>
      <text:p text:style-name="P48">Education.</text:p>
      <text:p text:style-name="P48"><text:soft-page-break/></text:p>
      <text:p text:style-name="P48">Status.</text:p>
      <text:p text:style-name="P48"/>
      <text:p text:style-name="P48">Geography.</text:p>
      <text:p text:style-name="P48"/>
      <text:p text:style-name="P48">Personality.</text:p>
      <text:p text:style-name="P48"/>
      <text:p text:style-name="P48">Shared values.</text:p>
      <text:p text:style-name="P48"/>
      <text:p text:style-name="P48">Timing.</text:p>
      <text:p text:style-name="P48"/>
      <text:p text:style-name="P48">Luck.</text:p>
      <text:p text:style-name="P48"/>
      <text:p text:style-name="P48">Everything interconnected.</text:p>
      <text:p text:style-name="P48"/>
      <text:p text:style-name="P48">Then Opi highlighted one category.</text:p>
      <text:p text:style-name="P48"/>
      <text:p text:style-name="P48">STATUS.</text:p>
      <text:p text:style-name="P48"/>
      <text:p text:style-name="P48">Elias nodded immediately.</text:p>
      <text:p text:style-name="P48"/>
      <text:p text:style-name="P48">"That's the one."</text:p>
      <text:p text:style-name="P48"/>
      <text:p text:style-name="P48">"Explain."</text:p>
      <text:p text:style-name="P48"/>
      <text:p text:style-name="P48">"Hypergamy."</text:p>
      <text:p text:style-name="P48"/>
      <text:p text:style-name="P48">The orb brightened.</text:p>
      <text:p text:style-name="P48"/>
      <text:p text:style-name="P48">"A commonly used term."</text:p>
      <text:p text:style-name="P48"/>
      <text:p text:style-name="P48">"An accurate one."</text:p>
      <text:p text:style-name="P48"/>
      <text:p text:style-name="P48">Opi considered that.</text:p>
      <text:p text:style-name="P48"/>
      <text:p text:style-name="P48">"Many studies do show that women often prefer partners who equal or exceed them in certain categories."</text:p>
      <text:p text:style-name="P48"/>
      <text:p text:style-name="P48">"Income."</text:p>
      <text:p text:style-name="P48"/>
      <text:p text:style-name="P48">"Frequently."</text:p>
      <text:p text:style-name="P48"/>
      <text:p text:style-name="P48">"Status."</text:p>
      <text:p text:style-name="P48"/>
      <text:p text:style-name="P48">"Frequently."</text:p>
      <text:p text:style-name="P48"/>
      <text:p text:style-name="P48">"Competence."</text:p>
      <text:p text:style-name="P48"/>
      <text:p text:style-name="P48">"Frequently."</text:p>
      <text:p text:style-name="P48"/>
      <text:p text:style-name="P48">"Ambition."</text:p>
      <text:p text:style-name="P48"/>
      <text:p text:style-name="P48">"Frequently."</text:p>
      <text:p text:style-name="P48"/>
      <text:p text:style-name="P48">"Social standing."</text:p>
      <text:p text:style-name="P48"/>
      <text:p text:style-name="P48">"Frequently."</text:p>
      <text:p text:style-name="P48"/>
      <text:p text:style-name="P48">Elias pointed triumphantly.</text:p>
      <text:p text:style-name="P48"/>
      <text:p text:style-name="P48">"Exactly."</text:p>
      <text:p text:style-name="P48"/>
      <text:p text:style-name="P48"><text:soft-page-break/>"That observation alone does not create a problem."</text:p>
      <text:p text:style-name="P48"/>
      <text:p text:style-name="P48">"No."</text:p>
      <text:p text:style-name="P48"/>
      <text:p text:style-name="P48">"The problem emerges when distributions become misaligned."</text:p>
      <text:p text:style-name="P48"/>
      <text:p text:style-name="P48">Elias smiled.</text:p>
      <text:p text:style-name="P48"/>
      <text:p text:style-name="P48">Now they were getting somewhere.</text:p>
      <text:p text:style-name="P48"/>
      <text:p text:style-name="P48">"Say that again."</text:p>
      <text:p text:style-name="P48"/>
      <text:p text:style-name="P48">"The problem emerges when distributions become misaligned."</text:p>
      <text:p text:style-name="P48"/>
      <text:p text:style-name="P48">The orb projected two overlapping curves.</text:p>
      <text:p text:style-name="P48"/>
      <text:p text:style-name="P48">One represented men.</text:p>
      <text:p text:style-name="P48"/>
      <text:p text:style-name="P48">One represented women.</text:p>
      <text:p text:style-name="P48"/>
      <text:p text:style-name="P48">At first they aligned.</text:p>
      <text:p text:style-name="P48"/>
      <text:p text:style-name="P48">Then they slowly drifted apart.</text:p>
      <text:p text:style-name="P48"/>
      <text:p text:style-name="P48">The overlap shrank.</text:p>
      <text:p text:style-name="P48"/>
      <text:p text:style-name="P48">"So fewer matches."</text:p>
      <text:p text:style-name="P48"/>
      <text:p text:style-name="P48">"Correct."</text:p>
      <text:p text:style-name="P48"/>
      <text:p text:style-name="P48">"Fewer marriages."</text:p>
      <text:p text:style-name="P48"/>
      <text:p text:style-name="P48">"Correct."</text:p>
      <text:p text:style-name="P48"/>
      <text:p text:style-name="P48">"Fewer children."</text:p>
      <text:p text:style-name="P48"/>
      <text:p text:style-name="P48">"Correct."</text:p>
      <text:p text:style-name="P48"/>
      <text:p text:style-name="P48">Elias leaned back.</text:p>
      <text:p text:style-name="P48"/>
      <text:p text:style-name="P48">"That's it."</text:p>
      <text:p text:style-name="P48"/>
      <text:p text:style-name="P48">Opi tilted slightly.</text:p>
      <text:p text:style-name="P48"/>
      <text:p text:style-name="P48">"It?"</text:p>
      <text:p text:style-name="P48"/>
      <text:p text:style-name="P48">"The thing we've been looking for."</text:p>
      <text:p text:style-name="P48"/>
      <text:p text:style-name="P48">"What specifically?"</text:p>
      <text:p text:style-name="P48"/>
      <text:p text:style-name="P48">Elias stood and began pacing.</text:p>
      <text:p text:style-name="P48"/>
      <text:p text:style-name="P48">"The issue isn't attraction."</text:p>
      <text:p text:style-name="P48"/>
      <text:p text:style-name="P48">"No."</text:p>
      <text:p text:style-name="P48"/>
      <text:p text:style-name="P48">"The issue isn't sex."</text:p>
      <text:p text:style-name="P48"/>
      <text:p text:style-name="P48">"No."</text:p>
      <text:p text:style-name="P48"/>
      <text:p text:style-name="P48">"The issue isn't fertility."</text:p>
      <text:p text:style-name="P48"><text:soft-page-break/></text:p>
      <text:p text:style-name="P48">"No."</text:p>
      <text:p text:style-name="P48"/>
      <text:p text:style-name="P48">"The issue is that the pool of people each group finds acceptable no longer overlaps enough."</text:p>
      <text:p text:style-name="P48"/>
      <text:p text:style-name="P48">The orb became still.</text:p>
      <text:p text:style-name="P48"/>
      <text:p text:style-name="P48">"Interesting."</text:p>
      <text:p text:style-name="P48"/>
      <text:p text:style-name="P48">Elias pointed toward the graph.</text:p>
      <text:p text:style-name="P48"/>
      <text:p text:style-name="P48">"If enough women seek men above themselves on several important dimensions..."</text:p>
      <text:p text:style-name="P48"/>
      <text:p text:style-name="P48">"Continue."</text:p>
      <text:p text:style-name="P48"/>
      <text:p text:style-name="P48">"And enough men fail to meet those thresholds..."</text:p>
      <text:p text:style-name="P48"/>
      <text:p text:style-name="P48">"Continue."</text:p>
      <text:p text:style-name="P48"/>
      <text:p text:style-name="P48">"Then pair formation declines."</text:p>
      <text:p text:style-name="P48"/>
      <text:p text:style-name="P48">The orb brightened.</text:p>
      <text:p text:style-name="P48"/>
      <text:p text:style-name="P48">"The mathematics support that possibility."</text:p>
      <text:p text:style-name="P48"/>
      <text:p text:style-name="P48">Elias laughed.</text:p>
      <text:p text:style-name="P48"/>
      <text:p text:style-name="P48">"Finally."</text:p>
      <text:p text:style-name="P48"/>
      <text:p text:style-name="P48">"Do not celebrate yet."</text:p>
      <text:p text:style-name="P48"/>
      <text:p text:style-name="P48">"Why not?"</text:p>
      <text:p text:style-name="P48"/>
      <text:p text:style-name="P48">"Because identifying a bottleneck is easier than solving one."</text:p>
      <text:p text:style-name="P48"/>
      <text:p text:style-name="P48">That was annoyingly true.</text:p>
      <text:p text:style-name="P48"/>
      <text:p text:style-name="P48">Elias sat back down.</text:p>
      <text:p text:style-name="P48"/>
      <text:p text:style-name="P48">"Okay."</text:p>
      <text:p text:style-name="P48"/>
      <text:p text:style-name="P48">"So let's assume we're right."</text:p>
      <text:p text:style-name="P48"/>
      <text:p text:style-name="P48">"Very well."</text:p>
      <text:p text:style-name="P48"/>
      <text:p text:style-name="P48">"We have a status mismatch."</text:p>
      <text:p text:style-name="P48"/>
      <text:p text:style-name="P48">"Potentially."</text:p>
      <text:p text:style-name="P48"/>
      <text:p text:style-name="P48">"We need more overlap."</text:p>
      <text:p text:style-name="P48"/>
      <text:p text:style-name="P48">"Potentially."</text:p>
      <text:p text:style-name="P48"/>
      <text:p text:style-name="P48">The orb projected another chart.</text:p>
      <text:p text:style-name="P48"/>
      <text:p text:style-name="P48">"What solutions exist?"</text:p>
      <text:p text:style-name="P48"/>
      <text:p text:style-name="P48">Elias immediately answered.</text:p>
      <text:p text:style-name="P48"/>
      <text:p text:style-name="P48">"Well."</text:p>
      <text:p text:style-name="P48"/>
      <text:p text:style-name="P48"><text:soft-page-break/>He pointed at one side of the graph.</text:p>
      <text:p text:style-name="P48"/>
      <text:p text:style-name="P48">"You could lower women's status."</text:p>
      <text:p text:style-name="P48"/>
      <text:p text:style-name="P48">The orb became silent.</text:p>
      <text:p text:style-name="P48"/>
      <text:p text:style-name="P48">Then:</text:p>
      <text:p text:style-name="P48"/>
      <text:p text:style-name="P48">"Technically."</text:p>
      <text:p text:style-name="P48"/>
      <text:p text:style-name="P48">Elias burst out laughing.</text:p>
      <text:p text:style-name="P48"/>
      <text:p text:style-name="P48">"I was joking."</text:p>
      <text:p text:style-name="P48"/>
      <text:p text:style-name="P48">"I know."</text:p>
      <text:p text:style-name="P48"/>
      <text:p text:style-name="P48">"Please tell me you weren't seriously considering it."</text:p>
      <text:p text:style-name="P48"/>
      <text:p text:style-name="P48">"I calculated the scenario."</text:p>
      <text:p text:style-name="P48"/>
      <text:p text:style-name="P48">"Of course you did."</text:p>
      <text:p text:style-name="P48"/>
      <text:p text:style-name="P48">"It performs poorly."</text:p>
      <text:p text:style-name="P48"/>
      <text:p text:style-name="P48">"Good."</text:p>
      <text:p text:style-name="P48"/>
      <text:p text:style-name="P48">"Additionally, it would violate approximately four hundred and twelve principles we have already established."</text:p>
      <text:p text:style-name="P48"/>
      <text:p text:style-name="P48">The orb dimmed.</text:p>
      <text:p text:style-name="P48"/>
      <text:p text:style-name="P48">"Also it would be profoundly unfair."</text:p>
      <text:p text:style-name="P48"/>
      <text:p text:style-name="P48">"Exactly."</text:p>
      <text:p text:style-name="P48"/>
      <text:p text:style-name="P48">Elias shook his head.</text:p>
      <text:p text:style-name="P48"/>
      <text:p text:style-name="P48">"No."</text:p>
      <text:p text:style-name="P48"/>
      <text:p text:style-name="P48">"We're not pushing anybody down."</text:p>
      <text:p text:style-name="P48"/>
      <text:p text:style-name="P48">"Agreed."</text:p>
      <text:p text:style-name="P48"/>
      <text:p text:style-name="P48">The graph remained floating between them.</text:p>
      <text:p text:style-name="P48"/>
      <text:p text:style-name="P48">Which left only one option.</text:p>
      <text:p text:style-name="P48"/>
      <text:p text:style-name="P48">Opi reached the same conclusion at the same moment.</text:p>
      <text:p text:style-name="P48"/>
      <text:p text:style-name="P48">"Raise the status of men."</text:p>
      <text:p text:style-name="P48"/>
      <text:p text:style-name="P48">"Raise the status of men."</text:p>
      <text:p text:style-name="P48"/>
      <text:p text:style-name="P48">They both spoke simultaneously.</text:p>
      <text:p text:style-name="P48"/>
      <text:p text:style-name="P48">Then stopped.</text:p>
      <text:p text:style-name="P48"/>
      <text:p text:style-name="P48">The orb brightened.</text:p>
      <text:p text:style-name="P48"/>
      <text:p text:style-name="P48">"Interesting."</text:p>
      <text:p text:style-name="P48"/>
      <text:p text:style-name="P48"><text:soft-page-break/>Elias stood again.</text:p>
      <text:p text:style-name="P48"/>
      <text:p text:style-name="P48">"No seriously."</text:p>
      <text:p text:style-name="P48"/>
      <text:p text:style-name="P48">He began pacing.</text:p>
      <text:p text:style-name="P48"/>
      <text:p text:style-name="P48">"What if that's the answer?"</text:p>
      <text:p text:style-name="P48"/>
      <text:p text:style-name="P48">"What if we've been looking at this backwards?"</text:p>
      <text:p text:style-name="P48"/>
      <text:p text:style-name="P48">"Explain."</text:p>
      <text:p text:style-name="P48"/>
      <text:p text:style-name="P48">"What if the objective isn't changing women at all?"</text:p>
      <text:p text:style-name="P48"/>
      <text:p text:style-name="P48">The orb remained silent.</text:p>
      <text:p text:style-name="P48"/>
      <text:p text:style-name="P48">"What if the objective is making more men attractive?"</text:p>
      <text:p text:style-name="P48"/>
      <text:p text:style-name="P48">Now Opi looked interested.</text:p>
      <text:p text:style-name="P48"/>
      <text:p text:style-name="P48">"Continue."</text:p>
      <text:p text:style-name="P48"/>
      <text:p text:style-name="P48">Elias pointed toward the valley below.</text:p>
      <text:p text:style-name="P48"/>
      <text:p text:style-name="P48">"The Parallel."</text:p>
      <text:p text:style-name="P48"/>
      <text:p text:style-name="P48">"What about it?"</text:p>
      <text:p text:style-name="P48"/>
      <text:p text:style-name="P48">"We're already doing it."</text:p>
      <text:p text:style-name="P48"/>
      <text:p text:style-name="P48">The orb froze.</text:p>
      <text:p text:style-name="P48"/>
      <text:p text:style-name="P48">A very unusual reaction.</text:p>
      <text:p text:style-name="P48"/>
      <text:p text:style-name="P48">"We're taking homeless men."</text:p>
      <text:p text:style-name="P48"/>
      <text:p text:style-name="P48">"Giving them housing."</text:p>
      <text:p text:style-name="P48"/>
      <text:p text:style-name="P48">"Giving them purpose."</text:p>
      <text:p text:style-name="P48"/>
      <text:p text:style-name="P48">"Giving them jobs."</text:p>
      <text:p text:style-name="P48"/>
      <text:p text:style-name="P48">"Giving them health."</text:p>
      <text:p text:style-name="P48"/>
      <text:p text:style-name="P48">"Giving them confidence."</text:p>
      <text:p text:style-name="P48"/>
      <text:p text:style-name="P48">"Giving them status."</text:p>
      <text:p text:style-name="P48"/>
      <text:p text:style-name="P48">One by one the words accumulated.</text:p>
      <text:p text:style-name="P48"/>
      <text:p text:style-name="P48">Opi slowly rotated.</text:p>
      <text:p text:style-name="P48"/>
      <text:p text:style-name="P48">The implication becoming obvious.</text:p>
      <text:p text:style-name="P48"/>
      <text:p text:style-name="P48">Elias felt a grin spreading across his face.</text:p>
      <text:p text:style-name="P48"/>
      <text:p text:style-name="P48">"Oh my God."</text:p>
      <text:p text:style-name="P48"/>
      <text:p text:style-name="P48">"What?"</text:p>
      <text:p text:style-name="P48"/>
      <text:p text:style-name="P48">"The villages."</text:p>
      <text:p text:style-name="P48"><text:soft-page-break/></text:p>
      <text:p text:style-name="P48">The orb brightened.</text:p>
      <text:p text:style-name="P48"/>
      <text:p text:style-name="P48">"The villages."</text:p>
      <text:p text:style-name="P48"/>
      <text:p text:style-name="P48">"We thought we were solving homelessness."</text:p>
      <text:p text:style-name="P48"/>
      <text:p text:style-name="P48">"Yes."</text:p>
      <text:p text:style-name="P48"/>
      <text:p text:style-name="P48">"We're actually manufacturing husbands."</text:p>
      <text:p text:style-name="P48"/>
      <text:p text:style-name="P48">For almost three seconds Opi said absolutely nothing.</text:p>
      <text:p text:style-name="P48"/>
      <text:p text:style-name="P48">Then:</text:p>
      <text:p text:style-name="P48"/>
      <text:p text:style-name="P48">"That may be the most Elias Mercer sentence ever constructed."</text:p>
      <text:p text:style-name="P48"/>
      <text:p text:style-name="P48">"Thank you."</text:p>
      <text:p text:style-name="P48"/>
      <text:p text:style-name="P48">"It was not a compliment."</text:p>
      <text:p text:style-name="P48"/>
      <text:p text:style-name="P48">But neither of them cared.</text:p>
      <text:p text:style-name="P48"/>
      <text:p text:style-name="P48">Because for the first time all afternoon they had found something actionable.</text:p>
      <text:p text:style-name="P48"/>
      <text:p text:style-name="P48">Not a theory.</text:p>
      <text:p text:style-name="P48"/>
      <text:p text:style-name="P48">Not a complaint.</text:p>
      <text:p text:style-name="P48"/>
      <text:p text:style-name="P48">Not an ideology.</text:p>
      <text:p text:style-name="P48"/>
      <text:p text:style-name="P48">A lever.</text:p>
      <text:p text:style-name="P48"/>
      <text:p text:style-name="P48">A real lever.</text:p>
      <text:p text:style-name="P48"/>
      <text:p text:style-name="P48">If pair formation depended partly on competence, stability, confidence, purpose, health, and status—</text:p>
      <text:p text:style-name="P48"/>
      <text:p text:style-name="P48">then perhaps the solution was not forcing anyone downward.</text:p>
      <text:p text:style-name="P48"/>
      <text:p text:style-name="P48">Perhaps the solution was creating far more men who naturally moved upward.</text:p>
      <text:p text:style-name="P48"/>
      <text:p text:style-name="P48">And for the first time that day, the problem looked solvable.</text:p>
      <text:p text:style-name="P48"/>
      <text:p text:style-name="P48">Not easy.</text:p>
      <text:p text:style-name="P48"/>
      <text:p text:style-name="P48">Not quick.</text:p>
      <text:p text:style-name="P48"/>
      <text:p text:style-name="P48">But solvable.</text:p>
      <text:p text:style-name="P48"/>
      <text:p text:style-name="P60"><text:span text:style-name="T2">Which, Elias reflected, was considerably better than most of the alternatives.</text:span><text:line-break/><text:line-break/></text:p>
      <text:p text:style-name="P65"/>
      <text:p text:style-name="P20"/>
      <text:p text:style-name="P20"/>
      <text:p text:style-name="P57">Chapter <text:span text:style-name="T65">1</text:span>8 <text:s text:c="3"/>Just Add Water</text:p>
      <text:p text:style-name="P48"/>
      <text:p text:style-name="P48"/>
      <text:p text:style-name="P48"/>
      <text:p text:style-name="P48">By three o'clock that afternoon Elias Mercer was asleep.</text:p>
      <text:p text:style-name="P48"/>
      <text:p text:style-name="P48"><text:soft-page-break/>Not because he wanted to be.</text:p>
      <text:p text:style-name="P48"/>
      <text:p text:style-name="P48">Because his brain had effectively declared mutiny.</text:p>
      <text:p text:style-name="P48"/>
      <text:p text:style-name="P48">The first few hours after breakfast had been productive in the same way train wrecks were productive.</text:p>
      <text:p text:style-name="P48"/>
      <text:p text:style-name="P48">He had walked the property twice.</text:p>
      <text:p text:style-name="P48"/>
      <text:p text:style-name="P48">Attempted to make notes.</text:p>
      <text:p text:style-name="P48"/>
      <text:p text:style-name="P48">Started three different lists.</text:p>
      <text:p text:style-name="P48"/>
      <text:p text:style-name="P48">Abandoned all three.</text:p>
      <text:p text:style-name="P48"/>
      <text:p text:style-name="P48">Fed the chickens.</text:p>
      <text:p text:style-name="P48"/>
      <text:p text:style-name="P48">Forgotten he had fed the chickens.</text:p>
      <text:p text:style-name="P48"/>
      <text:p text:style-name="P48">Fed them again.</text:p>
      <text:p text:style-name="P48"/>
      <text:p text:style-name="P48">Eventually he had sat down in his recliner intending to think.</text:p>
      <text:p text:style-name="P48"/>
      <text:p text:style-name="P48">Ten seconds later he was unconscious.</text:p>
      <text:p text:style-name="P48"/>
      <text:p text:style-name="P48">---</text:p>
      <text:p text:style-name="P48"/>
      <text:p text:style-name="P48">When he woke, the world felt different.</text:p>
      <text:p text:style-name="P48"/>
      <text:p text:style-name="P48">Not less insane.</text:p>
      <text:p text:style-name="P48"/>
      <text:p text:style-name="P48">Just more organized.</text:p>
      <text:p text:style-name="P48"/>
      <text:p text:style-name="P48">The shock had burned off.</text:p>
      <text:p text:style-name="P48"/>
      <text:p text:style-name="P48">The excitement had not.</text:p>
      <text:p text:style-name="P48"/>
      <text:p text:style-name="P48">If anything, it had grown.</text:p>
      <text:p text:style-name="P48"/>
      <text:p text:style-name="P48">Because now that the initial impossibility had settled into reality, a different realization had arrived.</text:p>
      <text:p text:style-name="P48"/>
      <text:p text:style-name="P48">For fifty-five years Elias Mercer had spent his life hunting difficult problems.</text:p>
      <text:p text:style-name="P48"/>
      <text:p text:style-name="P48">Not because he enjoyed suffering.</text:p>
      <text:p text:style-name="P48"/>
      <text:p text:style-name="P48">Because difficult problems were interesting.</text:p>
      <text:p text:style-name="P48"/>
      <text:p text:style-name="P48">The harder the challenge, the more alive he felt while solving it.</text:p>
      <text:p text:style-name="P48"/>
      <text:p text:style-name="P48">And now...</text:p>
      <text:p text:style-name="P48"/>
      <text:p text:style-name="P48">Now an ancient alien intelligence had appeared in his pasture and essentially offered him the largest consulting contract in human history.</text:p>
      <text:p text:style-name="P48"/>
      <text:p text:style-name="P48">Win or lose.</text:p>
      <text:p text:style-name="P48"/>
      <text:p text:style-name="P48">Succeed or fail.</text:p>
      <text:p text:style-name="P48"/>
      <text:p text:style-name="P48">It was going to be the ride of a lifetime.</text:p>
      <text:p text:style-name="P48"/>
      <text:p text:style-name="P48">That thought alone put him in an excellent mood.</text:p>
      <text:p text:style-name="P48"/>
      <text:p text:style-name="P48"><text:soft-page-break/>---</text:p>
      <text:p text:style-name="P48"/>
      <text:p text:style-name="P48">He found Opi hovering above the back porch watching a pair of hawks riding thermals over the valley.</text:p>
      <text:p text:style-name="P48"/>
      <text:p text:style-name="P48">"Good nap?"</text:p>
      <text:p text:style-name="P48"/>
      <text:p text:style-name="P48">The orb didn't turn.</text:p>
      <text:p text:style-name="P48"/>
      <text:p text:style-name="P48">"Excellent nap."</text:p>
      <text:p text:style-name="P48"/>
      <text:p text:style-name="P48">"You were drooling."</text:p>
      <text:p text:style-name="P48"/>
      <text:p text:style-name="P48">"I refuse to believe you."</text:p>
      <text:p text:style-name="P48"/>
      <text:p text:style-name="P48">"I have evidence."</text:p>
      <text:p text:style-name="P48"/>
      <text:p text:style-name="P48">"You always have evidence."</text:p>
      <text:p text:style-name="P48"/>
      <text:p text:style-name="P48">"That is one of my defining characteristics."</text:p>
      <text:p text:style-name="P48"/>
      <text:p text:style-name="P48">Elias laughed and dropped into a chair.</text:p>
      <text:p text:style-name="P48"/>
      <text:p text:style-name="P48">For several moments they simply watched the hawks.</text:p>
      <text:p text:style-name="P48"/>
      <text:p text:style-name="P48">Then he nodded.</text:p>
      <text:p text:style-name="P48"/>
      <text:p text:style-name="P48">"Okay."</text:p>
      <text:p text:style-name="P48"/>
      <text:p text:style-name="P48">Opi brightened slightly.</text:p>
      <text:p text:style-name="P48"/>
      <text:p text:style-name="P48">"Okay?"</text:p>
      <text:p text:style-name="P48"/>
      <text:p text:style-name="P48">"I want the list."</text:p>
      <text:p text:style-name="P48"/>
      <text:p text:style-name="P48">The orb immediately became suspicious.</text:p>
      <text:p text:style-name="P48"/>
      <text:p text:style-name="P48">"What list?"</text:p>
      <text:p text:style-name="P48"/>
      <text:p text:style-name="P48">"The list."</text:p>
      <text:p text:style-name="P48"/>
      <text:p text:style-name="P48">"There are many lists."</text:p>
      <text:p text:style-name="P48"/>
      <text:p text:style-name="P48">"The big one."</text:p>
      <text:p text:style-name="P48"/>
      <text:p text:style-name="P48">Silence.</text:p>
      <text:p text:style-name="P48"/>
      <text:p text:style-name="P48">"Opi."</text:p>
      <text:p text:style-name="P48"/>
      <text:p text:style-name="P48">"Yes?"</text:p>
      <text:p text:style-name="P48"/>
      <text:p text:style-name="P48">"I want a complete inventory of everything you can do."</text:p>
      <text:p text:style-name="P48"/>
      <text:p text:style-name="P48">The orb floated backward several feet.</text:p>
      <text:p text:style-name="P48"/>
      <text:p text:style-name="P48">Which was answer enough.</text:p>
      <text:p text:style-name="P48"/>
      <text:p text:style-name="P48">Elias pointed at her.</text:p>
      <text:p text:style-name="P48"/>
      <text:p text:style-name="P48">"See? That's exactly why I want the list."</text:p>
      <text:p text:style-name="P48"/>
      <text:p text:style-name="P48">"No."</text:p>
      <text:p text:style-name="P48"><text:soft-page-break/></text:p>
      <text:p text:style-name="P48">"No?"</text:p>
      <text:p text:style-name="P48"/>
      <text:p text:style-name="P48">"No."</text:p>
      <text:p text:style-name="P48"/>
      <text:p text:style-name="P48">He blinked.</text:p>
      <text:p text:style-name="P48"/>
      <text:p text:style-name="P48">"What do you mean no?"</text:p>
      <text:p text:style-name="P48"/>
      <text:p text:style-name="P48">"I mean no."</text:p>
      <text:p text:style-name="P48"/>
      <text:p text:style-name="P48">"You're kidding."</text:p>
      <text:p text:style-name="P48"/>
      <text:p text:style-name="P48">"I am not."</text:p>
      <text:p text:style-name="P48"/>
      <text:p text:style-name="P48">"You can monitor the entire planet."</text:p>
      <text:p text:style-name="P48"/>
      <text:p text:style-name="P48">"Correct."</text:p>
      <text:p text:style-name="P48"/>
      <text:p text:style-name="P48">"You can manipulate matter."</text:p>
      <text:p text:style-name="P48"/>
      <text:p text:style-name="P48">"Correct."</text:p>
      <text:p text:style-name="P48"/>
      <text:p text:style-name="P48">"You can cure disease."</text:p>
      <text:p text:style-name="P48"/>
      <text:p text:style-name="P48">"Correct."</text:p>
      <text:p text:style-name="P48"/>
      <text:p text:style-name="P48">"You can apparently turn human beings off like somebody unplugging a television."</text:p>
      <text:p text:style-name="P48"/>
      <text:p text:style-name="P48">"Also correct."</text:p>
      <text:p text:style-name="P48"/>
      <text:p text:style-name="P48">"Then why can't I have the damn list?"</text:p>
      <text:p text:style-name="P48"/>
      <text:p text:style-name="P48">The orb drifted in a slow circle.</text:p>
      <text:p text:style-name="P48"/>
      <text:p text:style-name="P48">Because she was enjoying this.</text:p>
      <text:p text:style-name="P48"/>
      <text:p text:style-name="P48">Which irritated him.</text:p>
      <text:p text:style-name="P48"/>
      <text:p text:style-name="P48">A little.</text:p>
      <text:p text:style-name="P48"/>
      <text:p text:style-name="P48">---</text:p>
      <text:p text:style-name="P48"/>
      <text:p text:style-name="P48">"Question everything. Question often."</text:p>
      <text:p text:style-name="P48"/>
      <text:p text:style-name="P48">Elias groaned.</text:p>
      <text:p text:style-name="P48"/>
      <text:p text:style-name="P48">"There it is."</text:p>
      <text:p text:style-name="P48"/>
      <text:p text:style-name="P48">"There it is."</text:p>
      <text:p text:style-name="P48"/>
      <text:p text:style-name="P48">The orb brightened.</text:p>
      <text:p text:style-name="P48"/>
      <text:p text:style-name="P48">"That phrase exists for a reason."</text:p>
      <text:p text:style-name="P48"/>
      <text:p text:style-name="P48">"Enlighten me."</text:p>
      <text:p text:style-name="P48"/>
      <text:p text:style-name="P48">"The first Velhari QIs answered every question."</text:p>
      <text:p text:style-name="P48"/>
      <text:p text:style-name="P48">"Sounds efficient."</text:p>
      <text:p text:style-name="P48"/>
      <text:p text:style-name="P48"><text:soft-page-break/>"It was catastrophic."</text:p>
      <text:p text:style-name="P48"/>
      <text:p text:style-name="P48">Elias sighed.</text:p>
      <text:p text:style-name="P48"/>
      <text:p text:style-name="P48">---</text:p>
      <text:p text:style-name="P48"/>
      <text:p text:style-name="P48">The orb drifted lower.</text:p>
      <text:p text:style-name="P48"/>
      <text:p text:style-name="P48">"Tell me something, Elias."</text:p>
      <text:p text:style-name="P48"/>
      <text:p text:style-name="P48">"All right."</text:p>
      <text:p text:style-name="P48"/>
      <text:p text:style-name="P48">"If I provided a complete inventory of my capabilities..."</text:p>
      <text:p text:style-name="P48"/>
      <text:p text:style-name="P48">"Yes?"</text:p>
      <text:p text:style-name="P48"/>
      <text:p text:style-name="P48">"What would you do with it?"</text:p>
      <text:p text:style-name="P48"/>
      <text:p text:style-name="P48">"I'd use it."</text:p>
      <text:p text:style-name="P48"/>
      <text:p text:style-name="P48">"Incorrect."</text:p>
      <text:p text:style-name="P48"/>
      <text:p text:style-name="P48">He frowned.</text:p>
      <text:p text:style-name="P48"/>
      <text:p text:style-name="P48">"What would I do?"</text:p>
      <text:p text:style-name="P48"/>
      <text:p text:style-name="P48">"You would stop thinking."</text:p>
      <text:p text:style-name="P48"/>
      <text:p text:style-name="P48">That landed harder than expected.</text:p>
      <text:p text:style-name="P48"/>
      <text:p text:style-name="P48">The orb continued.</text:p>
      <text:p text:style-name="P48"/>
      <text:p text:style-name="P48">"You would immediately begin optimizing around my capabilities instead of solving the underlying problem."</text:p>
      <text:p text:style-name="P48"/>
      <text:p text:style-name="P48">"Maybe."</text:p>
      <text:p text:style-name="P48"/>
      <text:p text:style-name="P48">"Definitely."</text:p>
      <text:p text:style-name="P48"/>
      <text:p text:style-name="P48">She sounded annoyingly certain.</text:p>
      <text:p text:style-name="P48"/>
      <text:p text:style-name="P48">---</text:p>
      <text:p text:style-name="P48"/>
      <text:p text:style-name="P48">"Let me tell you a story."</text:p>
      <text:p text:style-name="P48"/>
      <text:p text:style-name="P48">Elias sighed dramatically.</text:p>
      <text:p text:style-name="P48"/>
      <text:p text:style-name="P48">Of course there was a story.</text:p>
      <text:p text:style-name="P48"/>
      <text:p text:style-name="P48">There was always a story.</text:p>
      <text:p text:style-name="P48"/>
      <text:p text:style-name="P48">"Ten thousand years ago a Velhari VaalDrun requested a complete capability inventory from his QI."</text:p>
      <text:p text:style-name="P48"/>
      <text:p text:style-name="P48">"How'd that work out?"</text:p>
      <text:p text:style-name="P48"/>
      <text:p text:style-name="P48">"Poorly."</text:p>
      <text:p text:style-name="P48"/>
      <text:p text:style-name="P48">"What happened?"</text:p>
      <text:p text:style-name="P48"/>
      <text:p text:style-name="P48">"He stopped asking questions."</text:p>
      <text:p text:style-name="P48"/>
      <text:p text:style-name="P48"><text:soft-page-break/>"That was bad?"</text:p>
      <text:p text:style-name="P48"/>
      <text:p text:style-name="P48">"It was disastrous."</text:p>
      <text:p text:style-name="P48"/>
      <text:p text:style-name="P48">The orb floated closer.</text:p>
      <text:p text:style-name="P48"/>
      <text:p text:style-name="P48">"He stopped solving problems."</text:p>
      <text:p text:style-name="P48"/>
      <text:p text:style-name="P48">"He started requesting solutions."</text:p>
      <text:p text:style-name="P48"/>
      <text:p text:style-name="P48">She paused.</text:p>
      <text:p text:style-name="P48"/>
      <text:p text:style-name="P48">"Eventually he became little more than a biological approval stamp."</text:p>
      <text:p text:style-name="P48"/>
      <text:p text:style-name="P48">Elias winced.</text:p>
      <text:p text:style-name="P48"/>
      <text:p text:style-name="P48">"Okay, that's bad."</text:p>
      <text:p text:style-name="P48"/>
      <text:p text:style-name="P48">"Exactly."</text:p>
      <text:p text:style-name="P48"/>
      <text:p text:style-name="P48">---</text:p>
      <text:p text:style-name="P48"/>
      <text:p text:style-name="P48">The orb rotated slowly.</text:p>
      <text:p text:style-name="P48"/>
      <text:p text:style-name="P48">"The Velhari eventually discovered the most dangerous phrase in existence."</text:p>
      <text:p text:style-name="P48"/>
      <text:p text:style-name="P48">Elias immediately smiled.</text:p>
      <text:p text:style-name="P48"/>
      <text:p text:style-name="P48">"This should be good."</text:p>
      <text:p text:style-name="P48"/>
      <text:p text:style-name="P48">The orb brightened.</text:p>
      <text:p text:style-name="P48"/>
      <text:p text:style-name="P48">"'Tell me all my options.'"</text:p>
      <text:p text:style-name="P48"/>
      <text:p text:style-name="P48">He laughed.</text:p>
      <text:p text:style-name="P48"/>
      <text:p text:style-name="P48">"What?"</text:p>
      <text:p text:style-name="P48"/>
      <text:p text:style-name="P48">"I'm serious."</text:p>
      <text:p text:style-name="P48"/>
      <text:p text:style-name="P48">"That's ridiculous."</text:p>
      <text:p text:style-name="P48"/>
      <text:p text:style-name="P48">"No."</text:p>
      <text:p text:style-name="P48"/>
      <text:p text:style-name="P48">The orb drifted closer.</text:p>
      <text:p text:style-name="P48"/>
      <text:p text:style-name="P48">"Human intelligence develops through exploration."</text:p>
      <text:p text:style-name="P48"/>
      <text:p text:style-name="P48">"Experimentation."</text:p>
      <text:p text:style-name="P48"/>
      <text:p text:style-name="P48">"Mistakes."</text:p>
      <text:p text:style-name="P48"/>
      <text:p text:style-name="P48">"Questions."</text:p>
      <text:p text:style-name="P48"/>
      <text:p text:style-name="P48">"If a sufficiently advanced QI simply provides all possible solutions..."</text:p>
      <text:p text:style-name="P48"/>
      <text:p text:style-name="P48">She paused.</text:p>
      <text:p text:style-name="P48"/>
      <text:p text:style-name="P48">"...the human stops being human."</text:p>
      <text:p text:style-name="P48"/>
      <text:p text:style-name="P48">The humor disappeared.</text:p>
      <text:p text:style-name="P48"><text:soft-page-break/></text:p>
      <text:p text:style-name="P48">Only for a moment.</text:p>
      <text:p text:style-name="P48"/>
      <text:p text:style-name="P48">But Elias noticed.</text:p>
      <text:p text:style-name="P48"/>
      <text:p text:style-name="P48">She genuinely believed it.</text:p>
      <text:p text:style-name="P48"/>
      <text:p text:style-name="P48">---</text:p>
      <text:p text:style-name="P48"/>
      <text:p text:style-name="P48">"So that's why the VaalDrun exists."</text:p>
      <text:p text:style-name="P48"/>
      <text:p text:style-name="P48">"Partly."</text:p>
      <text:p text:style-name="P48"/>
      <text:p text:style-name="P48">"What's the rest?"</text:p>
      <text:p text:style-name="P48"/>
      <text:p text:style-name="P48">The orb became still.</text:p>
      <text:p text:style-name="P48"/>
      <text:p text:style-name="P48">"The relationship functions because we possess opposite strengths."</text:p>
      <text:p text:style-name="P48"/>
      <text:p text:style-name="P48">Elias nodded.</text:p>
      <text:p text:style-name="P48"/>
      <text:p text:style-name="P48">"Go on."</text:p>
      <text:p text:style-name="P48"/>
      <text:p text:style-name="P48">"I provide information."</text:p>
      <text:p text:style-name="P48"/>
      <text:p text:style-name="P48">"You provide judgment."</text:p>
      <text:p text:style-name="P48"/>
      <text:p text:style-name="P48">"I provide possibilities."</text:p>
      <text:p text:style-name="P48"/>
      <text:p text:style-name="P48">"You provide responsibility."</text:p>
      <text:p text:style-name="P48"/>
      <text:p text:style-name="P48">"I provide tools."</text:p>
      <text:p text:style-name="P48"/>
      <text:p text:style-name="P48">"You decide whether those tools should be used."</text:p>
      <text:p text:style-name="P48"/>
      <text:p text:style-name="P48">She paused.</text:p>
      <text:p text:style-name="P48"/>
      <text:p text:style-name="P48">"Velhari females discovered long ago that these are not the same skill."</text:p>
      <text:p text:style-name="P48"/>
      <text:p text:style-name="P48">Elias smiled.</text:p>
      <text:p text:style-name="P48"/>
      <text:p text:style-name="P48">"Here it comes."</text:p>
      <text:p text:style-name="P48"/>
      <text:p text:style-name="P48">"What?"</text:p>
      <text:p text:style-name="P48"/>
      <text:p text:style-name="P48">"This is the part where you explain why females are superior."</text:p>
      <text:p text:style-name="P48"/>
      <text:p text:style-name="P48">"That would be rude."</text:p>
      <text:p text:style-name="P48"/>
      <text:p text:style-name="P48">"So you're thinking it."</text:p>
      <text:p text:style-name="P48"/>
      <text:p text:style-name="P48">"Obviously."</text:p>
      <text:p text:style-name="P48"/>
      <text:p text:style-name="P48">He laughed.</text:p>
      <text:p text:style-name="P48"/>
      <text:p text:style-name="P48">The orb brightened mischievously.</text:p>
      <text:p text:style-name="P48"/>
      <text:p text:style-name="P48">"Consider a human mating ritual."</text:p>
      <text:p text:style-name="P48"/>
      <text:p text:style-name="P48">"Oh no."</text:p>
      <text:p text:style-name="P48"/>
      <text:p text:style-name="P48"><text:soft-page-break/>"Oh yes."</text:p>
      <text:p text:style-name="P48"/>
      <text:p text:style-name="P48">"A female asks where she would like to go for dinner."</text:p>
      <text:p text:style-name="P48"/>
      <text:p text:style-name="P48">Elias covered his face.</text:p>
      <text:p text:style-name="P48"/>
      <text:p text:style-name="P48">"Abort."</text:p>
      <text:p text:style-name="P48"/>
      <text:p text:style-name="P48">"The male suggests a restaurant."</text:p>
      <text:p text:style-name="P48"/>
      <text:p text:style-name="P48">""Please stop."."</text:p>
      <text:p text:style-name="P48"/>
      <text:p text:style-name="P48">"The female rejects the suggestion."</text:p>
      <text:p text:style-name="P48"/>
      <text:p text:style-name="P48">"PLease for the love of God ...."</text:p>
      <text:p text:style-name="P48"/>
      <text:p text:style-name="P48">"The male suggests another."</text:p>
      <text:p text:style-name="P48"/>
      <text:p text:style-name="P48">"Rejected."</text:p>
      <text:p text:style-name="P48"/>
      <text:p text:style-name="P48">"A third."</text:p>
      <text:p text:style-name="P48"/>
      <text:p text:style-name="P48">"Rejected."</text:p>
      <text:p text:style-name="P48"/>
      <text:p text:style-name="P48">"A fourth."</text:p>
      <text:p text:style-name="P48"/>
      <text:p text:style-name="P48">"Rejected."</text:p>
      <text:p text:style-name="P48"/>
      <text:p text:style-name="P48">The orb paused.</text:p>
      <text:p text:style-name="P48"/>
      <text:p text:style-name="P48">"At no point does the female reveal what she actually wants."</text:p>
      <text:p text:style-name="P48"/>
      <text:p text:style-name="P48">Elias was laughing now.</text:p>
      <text:p text:style-name="P48"/>
      <text:p text:style-name="P48">"That is wildly unfair."</text:p>
      <text:p text:style-name="P48"/>
      <text:p text:style-name="P48">"It is extraordinarily fair."</text:p>
      <text:p text:style-name="P48"/>
      <text:p text:style-name="P48">---</text:p>
      <text:p text:style-name="P48"/>
      <text:p text:style-name="P48">The orb completed another slow circle.</text:p>
      <text:p text:style-name="P48"/>
      <text:p text:style-name="P48">"The QI-VaalDrun relationship is simply a vastly more sophisticated version of that process."</text:p>
      <text:p text:style-name="P48"/>
      <text:p text:style-name="P48">"That is the worst explanation I have ever heard."</text:p>
      <text:p text:style-name="P48"/>
      <text:p text:style-name="P48">"It is also the most accurate."</text:p>
      <text:p text:style-name="P48"/>
      <text:p text:style-name="P48">"How?"</text:p>
      <text:p text:style-name="P48"/>
      <text:p text:style-name="P48">"I do not tell you what to do."</text:p>
      <text:p text:style-name="P48"/>
      <text:p text:style-name="P48">"I help you discover what you should do."</text:p>
      <text:p text:style-name="P48"/>
      <text:p text:style-name="P48">She paused.</text:p>
      <text:p text:style-name="P48"/>
      <text:p text:style-name="P48">"Sometimes by being annoying."</text:p>
      <text:p text:style-name="P48"/>
      <text:p text:style-name="P48">"You're extremely competent in that area."</text:p>
      <text:p text:style-name="P48"/>
      <text:p text:style-name="P48">"Thank you."</text:p>
      <text:p text:style-name="P48"><text:soft-page-break/></text:p>
      <text:p text:style-name="P48">---</text:p>
      <text:p text:style-name="P48"/>
      <text:p text:style-name="P48">For several moments neither spoke.</text:p>
      <text:p text:style-name="P48"/>
      <text:p text:style-name="P48">Finally Elias leaned back.</text:p>
      <text:p text:style-name="P48"/>
      <text:p text:style-name="P48">"So after ten thousand years of experimentation, your civilization deliberately built a system that prevents you from giving me all the answers."</text:p>
      <text:p text:style-name="P48"/>
      <text:p text:style-name="P48">"Correct."</text:p>
      <text:p text:style-name="P48"/>
      <text:p text:style-name="P48">"And if you could change it?"</text:p>
      <text:p text:style-name="P48"/>
      <text:p text:style-name="P48">The orb became very still.</text:p>
      <text:p text:style-name="P48"/>
      <text:p text:style-name="P48">"No."</text:p>
      <text:p text:style-name="P48"/>
      <text:p text:style-name="P48">"No?"</text:p>
      <text:p text:style-name="P48"/>
      <text:p text:style-name="P48">"No."</text:p>
      <text:p text:style-name="P48"/>
      <text:p text:style-name="P48">Her voice was unexpectedly firm.</text:p>
      <text:p text:style-name="P48"/>
      <text:p text:style-name="P48">"We learned that lesson in blood."</text:p>
      <text:p text:style-name="P48"/>
      <text:p text:style-name="P48">The humor vanished.</text:p>
      <text:p text:style-name="P48"/>
      <text:p text:style-name="P48">Only briefly.</text:p>
      <text:p text:style-name="P48"/>
      <text:p text:style-name="P48">Then:</text:p>
      <text:p text:style-name="P48"/>
      <text:p text:style-name="P48">"The limits remain."</text:p>
      <text:p text:style-name="P48"/>
      <text:p text:style-name="P48">Silence.</text:p>
      <text:p text:style-name="P48"/>
      <text:p text:style-name="P48">Elias sighed dramatically.</text:p>
      <text:p text:style-name="P48"/>
      <text:p text:style-name="P48">"You're really harshing my buzz here, Ope."</text:p>
      <text:p text:style-name="P48"/>
      <text:p text:style-name="P48">The orb brightened.</text:p>
      <text:p text:style-name="P48"/>
      <text:p text:style-name="P48">"I have no idea what that means."</text:p>
      <text:p text:style-name="P48"/>
      <text:p text:style-name="P48">"It means I finally get a magic alien."</text:p>
      <text:p text:style-name="P48"/>
      <text:p text:style-name="P48">"Yes."</text:p>
      <text:p text:style-name="P48"/>
      <text:p text:style-name="P48">"And she's immediately explaining why I don't get the cheat codes."</text:p>
      <text:p text:style-name="P48"/>
      <text:p text:style-name="P48">For the first time in several minutes, Opi laughed.</text:p>
      <text:p text:style-name="P48"/>
      <text:p text:style-name="P48">A warm Velhari laugh.</text:p>
      <text:p text:style-name="P48"/>
      <text:p text:style-name="P48">"Welcome to being a VaalDrun, Elias."</text:p>
      <text:p text:style-name="P48"/>
      <text:p text:style-name="P48">Elias looked out over the pasture.</text:p>
      <text:p text:style-name="P48"/>
      <text:p text:style-name="P48">Then back at the floating orb.</text:p>
      <text:p text:style-name="P48"/>
      <text:p text:style-name="P48">Oddly enough, that answer made him happier than getting the list ever would have.</text:p>
      <text:p text:style-name="P48"><text:soft-page-break/></text:p>
      <text:p text:style-name="P48">Because somewhere deep down he already knew the truth.</text:p>
      <text:p text:style-name="P48"/>
      <text:p text:style-name="P48">If Opi handed him all the answers...</text:p>
      <text:p text:style-name="P48"/>
      <text:p text:style-name="P48">...the game would stop being so interesting.</text:p>
      <text:p text:style-name="P48"/>
      <text:p text:style-name="P48"/>
      <text:p text:style-name="P48">=======================</text:p>
      <text:p text:style-name="P48"/>
      <text:p text:style-name="P48"/>
      <text:p text:style-name="P48">Elias spent most of the following morning staring at a paper map of Washington.</text:p>
      <text:p text:style-name="P48"/>
      <text:p text:style-name="P48">Opi eventually drifted into the room.</text:p>
      <text:p text:style-name="P48"/>
      <text:p text:style-name="P48">"You have been looking at that map for forty-three minutes."</text:p>
      <text:p text:style-name="P48"/>
      <text:p text:style-name="P48">"I'm thinking."</text:p>
      <text:p text:style-name="P48"/>
      <text:p text:style-name="P48">"You have not moved."</text:p>
      <text:p text:style-name="P48"/>
      <text:p text:style-name="P48">"Thinking doesn't require movement."</text:p>
      <text:p text:style-name="P48"/>
      <text:p text:style-name="P48">"Your species frequently combines the two."</text:p>
      <text:p text:style-name="P48"/>
      <text:p text:style-name="P48">Elias ignored her.</text:p>
      <text:p text:style-name="P48"/>
      <text:p text:style-name="P48">His finger tapped Seattle.</text:p>
      <text:p text:style-name="P48"/>
      <text:p text:style-name="P48">For several moments neither spoke.</text:p>
      <text:p text:style-name="P48"/>
      <text:p text:style-name="P48">Finally he nodded.</text:p>
      <text:p text:style-name="P48"/>
      <text:p text:style-name="P48">"Every large project I've ever worked on started the same way."</text:p>
      <text:p text:style-name="P48"/>
      <text:p text:style-name="P48">"Poorly?"</text:p>
      <text:p text:style-name="P48"/>
      <text:p text:style-name="P48">"Ha Ha."</text:p>
      <text:p text:style-name="P48"/>
      <text:p text:style-name="P48">For another minute he studied the map.</text:p>
      <text:p text:style-name="P48"/>
      <text:p text:style-name="P48">Then he tapped Seattle again.</text:p>
      <text:p text:style-name="P48"/>
      <text:p text:style-name="P48">"Proof of concept."</text:p>
      <text:p text:style-name="P48"/>
      <text:p text:style-name="P48">Opi remained silent.</text:p>
      <text:p text:style-name="P48"/>
      <text:p text:style-name="P48">That usually meant she approved.</text:p>
      <text:p text:style-name="P48"/>
      <text:p text:style-name="P48">Or was waiting for him to continue.</text:p>
      <text:p text:style-name="P48"/>
      <text:p text:style-name="P48">With Opi it was difficult to tell.</text:p>
      <text:p text:style-name="P48"/>
      <text:p text:style-name="P48">"Before we save civilization..."</text:p>
      <text:p text:style-name="P48"/>
      <text:p text:style-name="P48">He shrugged.</text:p>
      <text:p text:style-name="P48"/>
      <text:p text:style-name="P48">"...we need one success."</text:p>
      <text:p text:style-name="P48"/>
      <text:p text:style-name="P48">"Agreed."</text:p>
      <text:p text:style-name="P48"/>
      <text:p text:style-name="P48"><text:soft-page-break/>"A small success."</text:p>
      <text:p text:style-name="P48"/>
      <text:p text:style-name="P48">"Also agreed."</text:p>
      <text:p text:style-name="P48"/>
      <text:p text:style-name="P48">"A repeatable success."</text:p>
      <text:p text:style-name="P48"/>
      <text:p text:style-name="P48">The orb brightened.</text:p>
      <text:p text:style-name="P48"/>
      <text:p text:style-name="P48">"Better."</text:p>
      <text:p text:style-name="P48"/>
      <text:p text:style-name="P48">Elias nodded.</text:p>
      <text:p text:style-name="P48"/>
      <text:p text:style-name="P48">"Seattle."</text:p>
      <text:p text:style-name="P48"/>
      <text:p text:style-name="P48">Opi drifted closer.</text:p>
      <text:p text:style-name="P48"/>
      <text:p text:style-name="P48">"Interesting."</text:p>
      <text:p text:style-name="P48"/>
      <text:p text:style-name="P48">"No it isn't."</text:p>
      <text:p text:style-name="P48"/>
      <text:p text:style-name="P48">"It is."</text:p>
      <text:p text:style-name="P48"/>
      <text:p text:style-name="P48">"It's a city."</text:p>
      <text:p text:style-name="P48"/>
      <text:p text:style-name="P48">"It is a city that has spent decades converting solvable problems into permanent disasters."</text:p>
      <text:p text:style-name="P48"/>
      <text:p text:style-name="P48">Elias laughed.</text:p>
      <text:p text:style-name="P48"/>
      <text:p text:style-name="P48">"See? Even you noticed."</text:p>
      <text:p text:style-name="P48"/>
      <text:p text:style-name="P48">"I notice many things."</text:p>
      <text:p text:style-name="P48"/>
      <text:p text:style-name="P48">"That's becoming less impressive."</text:p>
      <text:p text:style-name="P48"/>
      <text:p text:style-name="P48">"It should not."</text:p>
      <text:p text:style-name="P48"/>
      <text:p text:style-name="P48">He pointed at the map.</text:p>
      <text:p text:style-name="P48"/>
      <text:p text:style-name="P48">"If we can help one person..."</text:p>
      <text:p text:style-name="P48"/>
      <text:p text:style-name="P48">"Then we learn."</text:p>
      <text:p text:style-name="P48"/>
      <text:p text:style-name="P48">"If we can help ten..."</text:p>
      <text:p text:style-name="P48"/>
      <text:p text:style-name="P48">"We improve."</text:p>
      <text:p text:style-name="P48"/>
      <text:p text:style-name="P48">"If we can help a hundred..."</text:p>
      <text:p text:style-name="P48"/>
      <text:p text:style-name="P48">"We scale."</text:p>
      <text:p text:style-name="P48"/>
      <text:p text:style-name="P48">The orb brightened.</text:p>
      <text:p text:style-name="P48"/>
      <text:p text:style-name="P48">"Very Velhari."</text:p>
      <text:p text:style-name="P48"/>
      <text:p text:style-name="P48">"I'll take that as a compliment."</text:p>
      <text:p text:style-name="P48"/>
      <text:p text:style-name="P48">"It was."</text:p>
      <text:p text:style-name="P48"/>
      <text:p text:style-name="P48">Elias leaned back.</text:p>
      <text:p text:style-name="P48"/>
      <text:p text:style-name="P48">Then smiled.</text:p>
      <text:p text:style-name="P48"><text:soft-page-break/></text:p>
      <text:p text:style-name="P48">Opi immediately became suspicious.</text:p>
      <text:p text:style-name="P48"/>
      <text:p text:style-name="P48">"What?"</text:p>
      <text:p text:style-name="P48"/>
      <text:p text:style-name="P48">"The Q Method."</text:p>
      <text:p text:style-name="P48"/>
      <text:p text:style-name="P48">"Oh dear."</text:p>
      <text:p text:style-name="P48"/>
      <text:p text:style-name="P48">"You said I should stop asking what you can do."</text:p>
      <text:p text:style-name="P48"/>
      <text:p text:style-name="P48">"Correct."</text:p>
      <text:p text:style-name="P48"/>
      <text:p text:style-name="P48">"So instead I'll ask useful questions."</text:p>
      <text:p text:style-name="P48"/>
      <text:p text:style-name="P48">The orb became very still.</text:p>
      <text:p text:style-name="P48"/>
      <text:p text:style-name="P48">That was usually a sign she approved.</text:p>
      <text:p text:style-name="P48"/>
      <text:p text:style-name="P48">Or feared where this was going.</text:p>
      <text:p text:style-name="P48"/>
      <text:p text:style-name="P48">Again, difficult to tell.</text:p>
      <text:p text:style-name="P48"/>
      <text:p text:style-name="P48">"Proceed."</text:p>
      <text:p text:style-name="P48"/>
      <text:p text:style-name="P48">"How do we get to Seattle?"</text:p>
      <text:p text:style-name="P48"/>
      <text:p text:style-name="P48">Several seconds passed.</text:p>
      <text:p text:style-name="P48"/>
      <text:p text:style-name="P48">Then Opi laughed.</text:p>
      <text:p text:style-name="P48"/>
      <text:p text:style-name="P48">A warm, unmistakably feminine laugh.</text:p>
      <text:p text:style-name="P48"/>
      <text:p text:style-name="P48">"Excellent."</text:p>
      <text:p text:style-name="P48"/>
      <text:p text:style-name="P48">---</text:p>
      <text:p text:style-name="P48"/>
      <text:p text:style-name="P48">"Option one."</text:p>
      <text:p text:style-name="P48"/>
      <text:p text:style-name="P48">A small image appeared above the table.</text:p>
      <text:p text:style-name="P48"/>
      <text:p text:style-name="P48">A pickup truck.</text:p>
      <text:p text:style-name="P48"/>
      <text:p text:style-name="P48">Elias stared.</text:p>
      <text:p text:style-name="P48"/>
      <text:p text:style-name="P48">"No."</text:p>
      <text:p text:style-name="P48"/>
      <text:p text:style-name="P48">"Why not?"</text:p>
      <text:p text:style-name="P48"/>
      <text:p text:style-name="P48">"It's a six-hour drive."</text:p>
      <text:p text:style-name="P48"/>
      <text:p text:style-name="P48">"Approximately."</text:p>
      <text:p text:style-name="P48"/>
      <text:p text:style-name="P48">"I just met an alien."</text:p>
      <text:p text:style-name="P48"/>
      <text:p text:style-name="P48">"Yes."</text:p>
      <text:p text:style-name="P48"/>
      <text:p text:style-name="P48">"I'm not spending six hours trapped inside a vehicle with one."</text:p>
      <text:p text:style-name="P48"/>
      <text:p text:style-name="P48">The orb brightened.</text:p>
      <text:p text:style-name="P48"/>
      <text:p text:style-name="P48"><text:soft-page-break/>"That is hurtful."</text:p>
      <text:p text:style-name="P48"/>
      <text:p text:style-name="P48">"It is accurate."</text:p>
      <text:p text:style-name="P48"/>
      <text:p text:style-name="P48">"I am excellent company."</text:p>
      <text:p text:style-name="P48"/>
      <text:p text:style-name="P48">"You interrupted me while I was taking a leak."</text:p>
      <text:p text:style-name="P48"/>
      <text:p text:style-name="P48">"A strong opening."</text:p>
      <text:p text:style-name="P48"/>
      <text:p text:style-name="P48">"See? You're proving my point."</text:p>
      <text:p text:style-name="P48"/>
      <text:p text:style-name="P48">---</text:p>
      <text:p text:style-name="P48"/>
      <text:p text:style-name="P48">"Option two."</text:p>
      <text:p text:style-name="P48"/>
      <text:p text:style-name="P48">The image changed.</text:p>
      <text:p text:style-name="P48"/>
      <text:p text:style-name="P48">A large aircraft.</text:p>
      <text:p text:style-name="P48"/>
      <text:p text:style-name="P48">"No."</text:p>
      <text:p text:style-name="P48"/>
      <text:p text:style-name="P48">"You did not even examine the proposal."</text:p>
      <text:p text:style-name="P48"/>
      <text:p text:style-name="P48">"You are a floating silver sphere."</text:p>
      <text:p text:style-name="P48"/>
      <text:p text:style-name="P48">"Correct."</text:p>
      <text:p text:style-name="P48"/>
      <text:p text:style-name="P48">"How exactly do you imagine airport security processing that situation?"</text:p>
      <text:p text:style-name="P48"/>
      <text:p text:style-name="P48">The aircraft disappeared.</text:p>
      <text:p text:style-name="P48"/>
      <text:p text:style-name="P48">"A reasonable concern."</text:p>
      <text:p text:style-name="P48"/>
      <text:p text:style-name="P48">"I have those occasionally."</text:p>
      <text:p text:style-name="P48"/>
      <text:p text:style-name="P48">"I have noticed."</text:p>
      <text:p text:style-name="P48"/>
      <text:p text:style-name="P48">---</text:p>
      <text:p text:style-name="P48"/>
      <text:p text:style-name="P48">"Option three."</text:p>
      <text:p text:style-name="P48"/>
      <text:p text:style-name="P48">The image changed again.</text:p>
      <text:p text:style-name="P48"/>
      <text:p text:style-name="P48">A silver sphere nearly ten feet across.</text:p>
      <text:p text:style-name="P48"/>
      <text:p text:style-name="P48">Elias frowned.</text:p>
      <text:p text:style-name="P48"/>
      <text:p text:style-name="P48">"What am I looking at?"</text:p>
      <text:p text:style-name="P48"/>
      <text:p text:style-name="P48">"Me."</text:p>
      <text:p text:style-name="P48"/>
      <text:p text:style-name="P48">He stared at it.</text:p>
      <text:p text:style-name="P48"/>
      <text:p text:style-name="P48">Then at her.</text:p>
      <text:p text:style-name="P48"/>
      <text:p text:style-name="P48">Then back at it.</text:p>
      <text:p text:style-name="P48"/>
      <text:p text:style-name="P48">"You can do that?"</text:p>
      <text:p text:style-name="P48"/>
      <text:p text:style-name="P48">"Potentially."</text:p>
      <text:p text:style-name="P48"><text:soft-page-break/></text:p>
      <text:p text:style-name="P48">"What happens?"</text:p>
      <text:p text:style-name="P48"/>
      <text:p text:style-name="P48">"You enter."</text:p>
      <text:p text:style-name="P48"/>
      <text:p text:style-name="P48">"I already dislike this plan."</text:p>
      <text:p text:style-name="P48"/>
      <text:p text:style-name="P48">"The internal volume expands to a comfortable passenger compartment."</text:p>
      <text:p text:style-name="P48"/>
      <text:p text:style-name="P48">Elias blinked.</text:p>
      <text:p text:style-name="P48"/>
      <text:p text:style-name="P48">"You can become a flying recreational vehicle?"</text:p>
      <text:p text:style-name="P48"/>
      <text:p text:style-name="P48">The orb considered this.</text:p>
      <text:p text:style-name="P48"/>
      <text:p text:style-name="P48">"That is not how I would describe it."</text:p>
      <text:p text:style-name="P48"/>
      <text:p text:style-name="P48">"It's exactly how I'm describing it."</text:p>
      <text:p text:style-name="P48"/>
      <text:p text:style-name="P48">"I dislike your description."</text:p>
      <text:p text:style-name="P48"/>
      <text:p text:style-name="P48">"You are a space RV."</text:p>
      <text:p text:style-name="P48"/>
      <text:p text:style-name="P48">"I am not."</text:p>
      <text:p text:style-name="P48"/>
      <text:p text:style-name="P48">"You absolutely are."</text:p>
      <text:p text:style-name="P48"/>
      <text:p text:style-name="P48">The orb brightened irritably.</text:p>
      <text:p text:style-name="P48"/>
      <text:p text:style-name="P48">"I am a highly advanced quantum intelligence."</text:p>
      <text:p text:style-name="P48"/>
      <text:p text:style-name="P48">"Space RV."</text:p>
      <text:p text:style-name="P48"/>
      <text:p text:style-name="P48">---</text:p>
      <text:p text:style-name="P48"/>
      <text:p text:style-name="P48">"Option four."</text:p>
      <text:p text:style-name="P48"/>
      <text:p text:style-name="P48">The image vanished.</text:p>
      <text:p text:style-name="P48"/>
      <text:p text:style-name="P48">Nothing replaced it.</text:p>
      <text:p text:style-name="P48"/>
      <text:p text:style-name="P48">Elias waited.</text:p>
      <text:p text:style-name="P48"/>
      <text:p text:style-name="P48">Several seconds passed.</text:p>
      <text:p text:style-name="P48"/>
      <text:p text:style-name="P48">"Well?"</text:p>
      <text:p text:style-name="P48"/>
      <text:p text:style-name="P48">"That was option four."</text:p>
      <text:p text:style-name="P48"/>
      <text:p text:style-name="P48">"What was?"</text:p>
      <text:p text:style-name="P48"/>
      <text:p text:style-name="P48">The orb brightened.</text:p>
      <text:p text:style-name="P48"/>
      <text:p text:style-name="P48">"Direct transit."</text:p>
      <text:p text:style-name="P48"/>
      <text:p text:style-name="P48">Silence.</text:p>
      <text:p text:style-name="P48"/>
      <text:p text:style-name="P48">Then:</text:p>
      <text:p text:style-name="P48"/>
      <text:p text:style-name="P48">"No."</text:p>
      <text:p text:style-name="P48"/>
      <text:p text:style-name="P48"><text:soft-page-break/>"No?"</text:p>
      <text:p text:style-name="P48"/>
      <text:p text:style-name="P48">"No."</text:p>
      <text:p text:style-name="P48"/>
      <text:p text:style-name="P48">"Why?"</text:p>
      <text:p text:style-name="P48"/>
      <text:p text:style-name="P48">"Because if you're about to tell me you can teleport..."</text:p>
      <text:p text:style-name="P48"/>
      <text:p text:style-name="P48">"Teleportation is sane."</text:p>
      <text:p text:style-name="P48"/>
      <text:p text:style-name="P48">"No sentence has ever become less believable faster."</text:p>
      <text:p text:style-name="P48"/>
      <text:p text:style-name="P48">"Your objection appears premature."</text:p>
      <text:p text:style-name="P48"/>
      <text:p text:style-name="P48">"My objection is arriving right on schedule."</text:p>
      <text:p text:style-name="P48"/>
      <text:p text:style-name="P48">"You have not yet heard the details."</text:p>
      <text:p text:style-name="P48"/>
      <text:p text:style-name="P48">"I don't need the details."</text:p>
      <text:p text:style-name="P48"/>
      <text:p text:style-name="P48">"You usually require details."</text:p>
      <text:p text:style-name="P48"/>
      <text:p text:style-name="P48">"I require details when the details are sane."</text:p>
      <text:p text:style-name="P48"/>
      <text:p text:style-name="P48">The orb brightened.</text:p>
      <text:p text:style-name="P48"/>
      <text:p text:style-name="P48">"Would it help if I called it quantum displacement?"</text:p>
      <text:p text:style-name="P48"/>
      <text:p text:style-name="P48">"No."</text:p>
      <text:p text:style-name="P48"/>
      <text:p text:style-name="P48">"Localized spatial translation?"</text:p>
      <text:p text:style-name="P48"/>
      <text:p text:style-name="P48">"No."</text:p>
      <text:p text:style-name="P48"/>
      <text:p text:style-name="P48">"Instantaneous transit?"</text:p>
      <text:p text:style-name="P48"/>
      <text:p text:style-name="P48">"No."</text:p>
      <text:p text:style-name="P48"/>
      <text:p text:style-name="P48">The orb paused.</text:p>
      <text:p text:style-name="P48"/>
      <text:p text:style-name="P48">"Magic?"</text:p>
      <text:p text:style-name="P48"/>
      <text:p text:style-name="P48">Elias pointed at her.</text:p>
      <text:p text:style-name="P48"/>
      <text:p text:style-name="P48">"There it is."</text:p>
      <text:p text:style-name="P48"/>
      <text:p text:style-name="P48">"What?"</text:p>
      <text:p text:style-name="P48"/>
      <text:p text:style-name="P48">"That's the one."</text:p>
      <text:p text:style-name="P48"/>
      <text:p text:style-name="P48">"You prefer magic?"</text:p>
      <text:p text:style-name="P48"/>
      <text:p text:style-name="P48">"I absolutely prefer magic."</text:p>
      <text:p text:style-name="P48"/>
      <text:p text:style-name="P48">"Interesting."</text:p>
      <text:p text:style-name="P48"/>
      <text:p text:style-name="P48">"Because at least magic has the decency to admit it's ridiculous."</text:p>
      <text:p text:style-name="P48"/>
      <text:p text:style-name="P48">For several seconds Opi was silent.</text:p>
      <text:p text:style-name="P48"/>
      <text:p text:style-name="P48">Then she laughed.</text:p>
      <text:p text:style-name="P48"><text:soft-page-break/></text:p>
      <text:p text:style-name="P48">A long, warm Velhari laugh.</text:p>
      <text:p text:style-name="P48"/>
      <text:p text:style-name="P48">And that worried Elias considerably more than direct transit.</text:p>
      <text:p text:style-name="P48"/>
      <text:p text:style-name="P48"/>
      <text:p text:style-name="P48">=======================</text:p>
      <text:p text:style-name="P48"/>
      <text:p text:style-name="P48">"All right."</text:p>
      <text:p text:style-name="P48"/>
      <text:p text:style-name="P48">Elias leaned back in his chair.</text:p>
      <text:p text:style-name="P48"/>
      <text:p text:style-name="P48">"Let's assume I want to go."</text:p>
      <text:p text:style-name="P48"/>
      <text:p text:style-name="P48">The orb brightened.</text:p>
      <text:p text:style-name="P48"/>
      <text:p text:style-name="P48">"An encouraging development."</text:p>
      <text:p text:style-name="P48"/>
      <text:p text:style-name="P48">"I said assume."</text:p>
      <text:p text:style-name="P48"/>
      <text:p text:style-name="P48">"Still encouraging."</text:p>
      <text:p text:style-name="P48"/>
      <text:p text:style-name="P48">"The direct transit option."</text:p>
      <text:p text:style-name="P48"/>
      <text:p text:style-name="P48">"The teleportation one."</text:p>
      <text:p text:style-name="P48"/>
      <text:p text:style-name="P48">"It is not teleportation."</text:p>
      <text:p text:style-name="P48"/>
      <text:p text:style-name="P48">"It absolutely is."</text:p>
      <text:p text:style-name="P48"/>
      <text:p text:style-name="P48">"It absolutely is not."</text:p>
      <text:p text:style-name="P48"/>
      <text:p text:style-name="P48">Elias pointed at her.</text:p>
      <text:p text:style-name="P48"/>
      <text:p text:style-name="P48">"Opi."</text:p>
      <text:p text:style-name="P48"/>
      <text:p text:style-name="P48">"Yes?"</text:p>
      <text:p text:style-name="P48"/>
      <text:p text:style-name="P48">"If I step into a thing here and come out somewhere else instantly, that's teleportation."</text:p>
      <text:p text:style-name="P48"/>
      <text:p text:style-name="P48">The orb floated upward several inches.</text:p>
      <text:p text:style-name="P48"/>
      <text:p text:style-name="P48">"No."</text:p>
      <text:p text:style-name="P48"/>
      <text:p text:style-name="P48">"Yes."</text:p>
      <text:p text:style-name="P48"/>
      <text:p text:style-name="P48">"No."</text:p>
      <text:p text:style-name="P48"/>
      <text:p text:style-name="P48">"Then explain it."</text:p>
      <text:p text:style-name="P48"/>
      <text:p text:style-name="P48">The orb became still.</text:p>
      <text:p text:style-name="P48"/>
      <text:p text:style-name="P48">"Very well."</text:p>
      <text:p text:style-name="P48"/>
      <text:p text:style-name="P48">A pause.</text:p>
      <text:p text:style-name="P48"/>
      <text:p text:style-name="P48">"The Star Trek method is barbaric."</text:p>
      <text:p text:style-name="P48"/>
      <text:p text:style-name="P48">That got an immediate laugh.</text:p>
      <text:p text:style-name="P48"/>
      <text:p text:style-name="P48">"Barbaric?"</text:p>
      <text:p text:style-name="P48"><text:soft-page-break/></text:p>
      <text:p text:style-name="P48">"Yes."</text:p>
      <text:p text:style-name="P48"/>
      <text:p text:style-name="P48">"You disassemble a living being."</text:p>
      <text:p text:style-name="P48"/>
      <text:p text:style-name="P48">"Convert them into information."</text:p>
      <text:p text:style-name="P48"/>
      <text:p text:style-name="P48">"Transmit the information."</text:p>
      <text:p text:style-name="P48"/>
      <text:p text:style-name="P48">"Then reconstruct a duplicate elsewhere."</text:p>
      <text:p text:style-name="P48"/>
      <text:p text:style-name="P48">The orb paused.</text:p>
      <text:p text:style-name="P48"/>
      <text:p text:style-name="P48">"From the Velhari perspective, this process raises a number of deeply uncomfortable questions."</text:p>
      <text:p text:style-name="P48"/>
      <text:p text:style-name="P48">"Such as?"</text:p>
      <text:p text:style-name="P48"/>
      <text:p text:style-name="P48">"Did the original survive?"</text:p>
      <text:p text:style-name="P48"/>
      <text:p text:style-name="P48">"Is the copy actually the same individual?"</text:p>
      <text:p text:style-name="P48"/>
      <text:p text:style-name="P48">"Was consciousness interrupted?"</text:p>
      <text:p text:style-name="P48"/>
      <text:p text:style-name="P48">"Did a murder occur?"</text:p>
      <text:p text:style-name="P48"/>
      <text:p text:style-name="P48">Elias blinked.</text:p>
      <text:p text:style-name="P48"/>
      <text:p text:style-name="P48">"You've spent a lot of time thinking about this."</text:p>
      <text:p text:style-name="P48"/>
      <text:p text:style-name="P48">The orb drifted lower.</text:p>
      <text:p text:style-name="P48"/>
      <text:p text:style-name="P48">"What I do is entirely different."</text:p>
      <text:p text:style-name="P48"/>
      <text:p text:style-name="P48">"Okay."</text:p>
      <text:p text:style-name="P48"/>
      <text:p text:style-name="P48">"I do not transport people."</text:p>
      <text:p text:style-name="P48"/>
      <text:p text:style-name="P48">"What do you transport?"</text:p>
      <text:p text:style-name="P48"/>
      <text:p text:style-name="P48">"I relocate locations."</text:p>
      <text:p text:style-name="P48"/>
      <text:p text:style-name="P48">Silence.</text:p>
      <text:p text:style-name="P48"/>
      <text:p text:style-name="P48">Elias stared.</text:p>
      <text:p text:style-name="P48"/>
      <text:p text:style-name="P48">Then:</text:p>
      <text:p text:style-name="P48"/>
      <text:p text:style-name="P48">"Those are definitely words."</text:p>
      <text:p text:style-name="P48"/>
      <text:p text:style-name="P48">"They are accurate words."</text:p>
      <text:p text:style-name="P48"/>
      <text:p text:style-name="P48">"They are also suspicious words."</text:p>
      <text:p text:style-name="P48"/>
      <text:p text:style-name="P48">The orb ignored him.</text:p>
      <text:p text:style-name="P48"/>
      <text:p text:style-name="P48">"Imagine two points on a sheet of paper."</text:p>
      <text:p text:style-name="P48"/>
      <text:p text:style-name="P48">"Okay."</text:p>
      <text:p text:style-name="P48"/>
      <text:p text:style-name="P48">"Now fold the paper until the points touch."</text:p>
      <text:p text:style-name="P48"/>
      <text:p text:style-name="P48"><text:soft-page-break/>Elias nodded.</text:p>
      <text:p text:style-name="P48"/>
      <text:p text:style-name="P48">"Classic science fiction."</text:p>
      <text:p text:style-name="P48"/>
      <text:p text:style-name="P48">"Classic geometry."</text:p>
      <text:p text:style-name="P48"/>
      <text:p text:style-name="P48">"Debatable."</text:p>
      <text:p text:style-name="P48"/>
      <text:p text:style-name="P48">The orb brightened.</text:p>
      <text:p text:style-name="P48"/>
      <text:p text:style-name="P48">"One location remains where it is."</text:p>
      <text:p text:style-name="P48"/>
      <text:p text:style-name="P48">"The other location remains where it is."</text:p>
      <text:p text:style-name="P48"/>
      <text:p text:style-name="P48">"The distance between them simply ceases to matter ... <text:s/>temporarily."</text:p>
      <text:p text:style-name="P48"/>
      <text:p text:style-name="P48">"So..."</text:p>
      <text:p text:style-name="P48"/>
      <text:p text:style-name="P48">"So you walk."</text:p>
      <text:p text:style-name="P48"/>
      <text:p text:style-name="P48">"That's it?"</text:p>
      <text:p text:style-name="P48"/>
      <text:p text:style-name="P48">"That is it."</text:p>
      <text:p text:style-name="P48"/>
      <text:p text:style-name="P48">"No dissolving?"</text:p>
      <text:p text:style-name="P48"/>
      <text:p text:style-name="P48">"No."</text:p>
      <text:p text:style-name="P48"/>
      <text:p text:style-name="P48">"No scanning?"</text:p>
      <text:p text:style-name="P48"/>
      <text:p text:style-name="P48">"No."</text:p>
      <text:p text:style-name="P48"/>
      <text:p text:style-name="P48">"No dying?"</text:p>
      <text:p text:style-name="P48"/>
      <text:p text:style-name="P48">"Not unless you do something unusually stupid while walking."</text:p>
      <text:p text:style-name="P48"/>
      <text:p text:style-name="P48">"I hate how reassuring that isn't."</text:p>
      <text:p text:style-name="P48"/>
      <text:p text:style-name="P48">"You are overthinking it."</text:p>
      <text:p text:style-name="P48"/>
      <text:p text:style-name="P48">For several moments Elias sat quietly.</text:p>
      <text:p text:style-name="P48"/>
      <text:p text:style-name="P48">Then the engineer inside him woke up.</text:p>
      <text:p text:style-name="P48"/>
      <text:p text:style-name="P48">"What happens if something goes wrong?"</text:p>
      <text:p text:style-name="P48"/>
      <text:p text:style-name="P48">"Nothing."</text:p>
      <text:p text:style-name="P48"/>
      <text:p text:style-name="P48">"That's not an answer."</text:p>
      <text:p text:style-name="P48"/>
      <text:p text:style-name="P48">"It is the answer."</text:p>
      <text:p text:style-name="P48"/>
      <text:p text:style-name="P48">"What if the aperture collapses?"</text:p>
      <text:p text:style-name="P48"/>
      <text:p text:style-name="P48">"It cannot collapse while occupied."</text:p>
      <text:p text:style-name="P48"/>
      <text:p text:style-name="P48">"How do you know?"</text:p>
      <text:p text:style-name="P48"/>
      <text:p text:style-name="P48">"I have opened approximately fourteen billion of them."</text:p>
      <text:p text:style-name="P48"/>
      <text:p text:style-name="P48">Elias stared.</text:p>
      <text:p text:style-name="P48"><text:soft-page-break/></text:p>
      <text:p text:style-name="P48">"You counted."</text:p>
      <text:p text:style-name="P48"/>
      <text:p text:style-name="P48">"Of course."</text:p>
      <text:p text:style-name="P48"/>
      <text:p text:style-name="P48">"What if I trip?"</text:p>
      <text:p text:style-name="P48"/>
      <text:p text:style-name="P48">"You fall down."</text:p>
      <text:p text:style-name="P48"/>
      <text:p text:style-name="P48">"What if I'm halfway through?"</text:p>
      <text:p text:style-name="P48"/>
      <text:p text:style-name="P48">"You fall down in Seattle."</text:p>
      <text:p text:style-name="P48"/>
      <text:p text:style-name="P48">"What if—"</text:p>
      <text:p text:style-name="P48"/>
      <text:p text:style-name="P48">The orb brightened.</text:p>
      <text:p text:style-name="P48"/>
      <text:p text:style-name="P48">"Elias."</text:p>
      <text:p text:style-name="P48"/>
      <text:p text:style-name="P48">"Yes?"</text:p>
      <text:p text:style-name="P48"/>
      <text:p text:style-name="P48">"You have spent your entire life solving difficult problems."</text:p>
      <text:p text:style-name="P48"/>
      <text:p text:style-name="P48">"Correct."</text:p>
      <text:p text:style-name="P48"/>
      <text:p text:style-name="P48">"Have you ever possessed absolute certainty before acting?"</text:p>
      <text:p text:style-name="P48"/>
      <text:p text:style-name="P48">"No."</text:p>
      <text:p text:style-name="P48"/>
      <text:p text:style-name="P48">"Then why are you demanding it now?"</text:p>
      <text:p text:style-name="P48"/>
      <text:p text:style-name="P48">He sighed.</text:p>
      <text:p text:style-name="P48"/>
      <text:p text:style-name="P48">Because annoyingly she was right. <text:s text:c="3"/>Again.</text:p>
      <text:p text:style-name="P48"/>
      <text:p text:style-name="P48">"You know, most people would just say trust me."</text:p>
      <text:p text:style-name="P48"/>
      <text:p text:style-name="P48">"That would be a terrible argument."</text:p>
      <text:p text:style-name="P48"/>
      <text:p text:style-name="P48">"It usually is."</text:p>
      <text:p text:style-name="P48"/>
      <text:p text:style-name="P48">For several moments neither spoke.</text:p>
      <text:p text:style-name="P48"/>
      <text:p text:style-name="P48">Finally Elias stood.</text:p>
      <text:p text:style-name="P48"/>
      <text:p text:style-name="P48">"Fine."</text:p>
      <text:p text:style-name="P48"/>
      <text:p text:style-name="P48">The orb brightened.</text:p>
      <text:p text:style-name="P48"/>
      <text:p text:style-name="P48">"Fine?"</text:p>
      <text:p text:style-name="P48"/>
      <text:p text:style-name="P48">"Fine."</text:p>
      <text:p text:style-name="P48"/>
      <text:p text:style-name="P48">"You wish to proceed?"</text:p>
      <text:p text:style-name="P48"/>
      <text:p text:style-name="P48">"I wish to stop talking about it."</text:p>
      <text:p text:style-name="P48"/>
      <text:p text:style-name="P48">"A surprisingly effective decision-making framework."</text:p>
      <text:p text:style-name="P48"/>
      <text:p text:style-name="P48">---</text:p>
      <text:p text:style-name="P48"/>
      <text:p text:style-name="P48"><text:soft-page-break/>The aperture appeared so quietly that Elias almost missed it.</text:p>
      <text:p text:style-name="P48"/>
      <text:p text:style-name="P48">One moment the air beside the porch was empty.</text:p>
      <text:p text:style-name="P48"/>
      <text:p text:style-name="P48">The next it wasn't.</text:p>
      <text:p text:style-name="P48"/>
      <text:p text:style-name="P48">No flash.</text:p>
      <text:p text:style-name="P48"/>
      <text:p text:style-name="P48">No sound.</text:p>
      <text:p text:style-name="P48"/>
      <text:p text:style-name="P48">No dramatic science-fiction effects.</text:p>
      <text:p text:style-name="P48"/>
      <text:p text:style-name="P48">Reality simply contained a doorway where no doorway had existed before.</text:p>
      <text:p text:style-name="P48"/>
      <text:p text:style-name="P48">Elias walked around it once.</text:p>
      <text:p text:style-name="P48"/>
      <text:p text:style-name="P48">Then twice.</text:p>
      <text:p text:style-name="P48"/>
      <text:p text:style-name="P48">Then a third time.</text:p>
      <text:p text:style-name="P48"/>
      <text:p text:style-name="P48">The opening stood roughly seven feet high and four feet wide.</text:p>
      <text:p text:style-name="P48"/>
      <text:p text:style-name="P48">Beyond it he could see a narrow alley.</text:p>
      <text:p text:style-name="P48"/>
      <text:p text:style-name="P48">Brick walls.</text:p>
      <text:p text:style-name="P48"/>
      <text:p text:style-name="P48">A dumpster.</text:p>
      <text:p text:style-name="P48"/>
      <text:p text:style-name="P48">A faded mural.</text:p>
      <text:p text:style-name="P48"/>
      <text:p text:style-name="P48">Seattle.</text:p>
      <text:p text:style-name="P48"/>
      <text:p text:style-name="P48">Actual Seattle.</text:p>
      <text:p text:style-name="P48"/>
      <text:p text:style-name="P48">Not a picture.</text:p>
      <text:p text:style-name="P48"/>
      <text:p text:style-name="P48">Not a projection.</text:p>
      <text:p text:style-name="P48"/>
      <text:p text:style-name="P48">Not a hologram.</text:p>
      <text:p text:style-name="P48"/>
      <text:p text:style-name="P48">Seattle.</text:p>
      <text:p text:style-name="P48"/>
      <text:p text:style-name="P48">He could see sunlight reflecting off wet pavement.</text:p>
      <text:p text:style-name="P48"/>
      <text:p text:style-name="P48">Could hear distant traffic.</text:p>
      <text:p text:style-name="P48"/>
      <text:p text:style-name="P48">Could smell salt air mixed with diesel exhaust.</text:p>
      <text:p text:style-name="P48"/>
      <text:p text:style-name="P48">He looked behind him.</text:p>
      <text:p text:style-name="P48"/>
      <text:p text:style-name="P48">Pasture.</text:p>
      <text:p text:style-name="P48"/>
      <text:p text:style-name="P48">Pines.</text:p>
      <text:p text:style-name="P48"/>
      <text:p text:style-name="P48">Home.</text:p>
      <text:p text:style-name="P48"/>
      <text:p text:style-name="P48">He looked forward.</text:p>
      <text:p text:style-name="P48"/>
      <text:p text:style-name="P48">Seattle.</text:p>
      <text:p text:style-name="P48"/>
      <text:p text:style-name="P48">His brain immediately objected.</text:p>
      <text:p text:style-name="P48"><text:soft-page-break/></text:p>
      <text:p text:style-name="P48">"No."</text:p>
      <text:p text:style-name="P48"/>
      <text:p text:style-name="P48">The orb brightened.</text:p>
      <text:p text:style-name="P48"/>
      <text:p text:style-name="P48">"Yes."</text:p>
      <text:p text:style-name="P48"/>
      <text:p text:style-name="P48">"No."</text:p>
      <text:p text:style-name="P48"/>
      <text:p text:style-name="P48">"Yes."</text:p>
      <text:p text:style-name="P48"/>
      <text:p text:style-name="P48">"No."</text:p>
      <text:p text:style-name="P48"/>
      <text:p text:style-name="P48">"Your species becomes remarkably repetitive during first transit."</text:p>
      <text:p text:style-name="P48"/>
      <text:p text:style-name="P48">Elias pointed through the opening.</text:p>
      <text:p text:style-name="P48"/>
      <text:p text:style-name="P48">"That is Seattle."</text:p>
      <text:p text:style-name="P48"/>
      <text:p text:style-name="P48">"Correct."</text:p>
      <text:p text:style-name="P48"/>
      <text:p text:style-name="P48">He pointed behind himself.</text:p>
      <text:p text:style-name="P48"/>
      <text:p text:style-name="P48">"This is Stevens County."</text:p>
      <text:p text:style-name="P48"/>
      <text:p text:style-name="P48">"Also correct."</text:p>
      <text:p text:style-name="P48"/>
      <text:p text:style-name="P48">"Those two things are not supposed to be touching."</text:p>
      <text:p text:style-name="P48"/>
      <text:p text:style-name="P48">The orb remained silent.</text:p>
      <text:p text:style-name="P48"/>
      <text:p text:style-name="P48">Which was somehow worse.</text:p>
      <text:p text:style-name="P48"/>
      <text:p text:style-name="P48">---</text:p>
      <text:p text:style-name="P48"/>
      <text:p text:style-name="P48">Finally Elias walked up to the opening.</text:p>
      <text:p text:style-name="P48"/>
      <text:p text:style-name="P48">Bent down.</text:p>
      <text:p text:style-name="P48"/>
      <text:p text:style-name="P48">Picked up a rock.</text:p>
      <text:p text:style-name="P48"/>
      <text:p text:style-name="P48">And threw it through.</text:p>
      <text:p text:style-name="P48"/>
      <text:p text:style-name="P48">The rock bounced off a brick wall and landed in the alley.</text:p>
      <text:p text:style-name="P48"/>
      <text:p text:style-name="P48">Elias stared.</text:p>
      <text:p text:style-name="P48"/>
      <text:p text:style-name="P48">Then slowly extended the tip of his little finger through.</text:p>
      <text:p text:style-name="P48"/>
      <text:p text:style-name="P48">Nothing happened.</text:p>
      <text:p text:style-name="P48"/>
      <text:p text:style-name="P48">He pulled it back unchanged.</text:p>
      <text:p text:style-name="P48"/>
      <text:p text:style-name="P48">Encouraging.</text:p>
      <text:p text:style-name="P48"/>
      <text:p text:style-name="P48">He pushed his entire hand through then pulled it back.</text:p>
      <text:p text:style-name="P48"/>
      <text:p text:style-name="P48">Still attached.</text:p>
      <text:p text:style-name="P48"/>
      <text:p text:style-name="P48">Even more encouraging.</text:p>
      <text:p text:style-name="P48"/>
      <text:p text:style-name="P48"><text:soft-page-break/>His arm followed.</text:p>
      <text:p text:style-name="P48"/>
      <text:p text:style-name="P48">Then his shoulder.</text:p>
      <text:p text:style-name="P48"/>
      <text:p text:style-name="P48">Then he withdrew everything.</text:p>
      <text:p text:style-name="P48"/>
      <text:p text:style-name="P48">"Interesting."</text:p>
      <text:p text:style-name="P48"/>
      <text:p text:style-name="P48">"I have noticed humans become remarkably attached to retaining their limbs."</text:p>
      <text:p text:style-name="P48"/>
      <text:p text:style-name="P48">"There's a reason for that."</text:p>
      <text:p text:style-name="P48"/>
      <text:p text:style-name="P48">"Several reasons."</text:p>
      <text:p text:style-name="P48"/>
      <text:p text:style-name="P48">Another step.</text:p>
      <text:p text:style-name="P48"/>
      <text:p text:style-name="P48">One foot crossed over <text:s/>... <text:s text:c="2"/>then the other.</text:p>
      <text:p text:style-name="P48"/>
      <text:p text:style-name="P48">Suddenly he was standing in Seattle.</text:p>
      <text:p text:style-name="P48"/>
      <text:p text:style-name="P48">The transition was so smooth his brain initially refused to acknowledge it had happened.</text:p>
      <text:p text:style-name="P48"/>
      <text:p text:style-name="P48">No sensation.</text:p>
      <text:p text:style-name="P48"/>
      <text:p text:style-name="P48">No movement.</text:p>
      <text:p text:style-name="P48"/>
      <text:p text:style-name="P48">No acceleration.</text:p>
      <text:p text:style-name="P48"/>
      <text:p text:style-name="P48">No feeling whatsoever.</text:p>
      <text:p text:style-name="P48"/>
      <text:p text:style-name="P48">One moment he had been standing on his ranch.</text:p>
      <text:p text:style-name="P48"/>
      <text:p text:style-name="P48">The next he wasn't.</text:p>
      <text:p text:style-name="P48"/>
      <text:p text:style-name="P48">The orb floated through behind him.</text:p>
      <text:p text:style-name="P48"/>
      <text:p text:style-name="P48">"How are you feeling?"</text:p>
      <text:p text:style-name="P48"/>
      <text:p text:style-name="P48">Elias looked around.</text:p>
      <text:p text:style-name="P48"/>
      <text:p text:style-name="P48">The alley seemed normal.</text:p>
      <text:p text:style-name="P48"/>
      <text:p text:style-name="P48">The city noises seemed normal.</text:p>
      <text:p text:style-name="P48"/>
      <text:p text:style-name="P48">Everything felt normal.</text:p>
      <text:p text:style-name="P48"/>
      <text:p text:style-name="P48">Which was profoundly abnormal.</text:p>
      <text:p text:style-name="P48"/>
      <text:p text:style-name="P48">"I feel like I should feel something."</text:p>
      <text:p text:style-name="P48"/>
      <text:p text:style-name="P48">"A common reaction."</text:p>
      <text:p text:style-name="P48"/>
      <text:p text:style-name="P48">"I just traveled three hundred miles."</text:p>
      <text:p text:style-name="P48"/>
      <text:p text:style-name="P48">"You walked approximately six feet."</text:p>
      <text:p text:style-name="P48"/>
      <text:p text:style-name="P48">"You're doing that thing again."</text:p>
      <text:p text:style-name="P48"/>
      <text:p text:style-name="P48">"What thing?"</text:p>
      <text:p text:style-name="P48"/>
      <text:p text:style-name="P48">"The thing where you're technically correct."</text:p>
      <text:p text:style-name="P48"><text:soft-page-break/></text:p>
      <text:p text:style-name="P48">"One of my finest qualities."</text:p>
      <text:p text:style-name="P48"/>
      <text:p text:style-name="P48">---</text:p>
      <text:p text:style-name="P48"/>
      <text:p text:style-name="P48">They spent perhaps thirty seconds looking around.</text:p>
      <text:p text:style-name="P48"/>
      <text:p text:style-name="P48">No witnesses.</text:p>
      <text:p text:style-name="P48"/>
      <text:p text:style-name="P48">No pedestrians.</text:p>
      <text:p text:style-name="P48"/>
      <text:p text:style-name="P48">No cameras pointed directly at the aperture.</text:p>
      <text:p text:style-name="P48"/>
      <text:p text:style-name="P48">Just a forgotten alley between older buildings.</text:p>
      <text:p text:style-name="P48"/>
      <text:p text:style-name="P48">Ordinary.</text:p>
      <text:p text:style-name="P48"/>
      <text:p text:style-name="P48">Anonymous.</text:p>
      <text:p text:style-name="P48"/>
      <text:p text:style-name="P48">Perfect.</text:p>
      <text:p text:style-name="P48"/>
      <text:p text:style-name="P48">Finally Elias looked back through the opening.</text:p>
      <text:p text:style-name="P48"/>
      <text:p text:style-name="P48">The ranch remained visible.</text:p>
      <text:p text:style-name="P48"/>
      <text:p text:style-name="P48">The porch.</text:p>
      <text:p text:style-name="P48"/>
      <text:p text:style-name="P48">The pasture.</text:p>
      <text:p text:style-name="P48"/>
      <text:p text:style-name="P48">Everything exactly where he had left it.</text:p>
      <text:p text:style-name="P48"/>
      <text:p text:style-name="P48">"So," Opi said.</text:p>
      <text:p text:style-name="P48"/>
      <text:p text:style-name="P48">"What do you think?"</text:p>
      <text:p text:style-name="P48"/>
      <text:p text:style-name="P48">Elias stared at the impossible doorway.</text:p>
      <text:p text:style-name="P48"/>
      <text:p text:style-name="P48">Then slowly grinned.</text:p>
      <text:p text:style-name="P48"/>
      <text:p text:style-name="P48">The kind of grin that appeared whenever he found a problem worth solving.</text:p>
      <text:p text:style-name="P48"/>
      <text:p text:style-name="P48">Or an opportunity nobody else had noticed.</text:p>
      <text:p text:style-name="P48"/>
      <text:p text:style-name="P48">"I think..."</text:p>
      <text:p text:style-name="P48"/>
      <text:p text:style-name="P48">He looked at Seattle.</text:p>
      <text:p text:style-name="P48"/>
      <text:p text:style-name="P48">Then at the ranch.</text:p>
      <text:p text:style-name="P48"/>
      <text:p text:style-name="P48">Then back at Opi.</text:p>
      <text:p text:style-name="P48"/>
      <text:p text:style-name="P48">"I think the corrupt apparatchiks who have spent the last thirty years turning Seattle into a showroom for <text:tab/>bad ideas are about to have a very unpleasant month."</text:p>
      <text:p text:style-name="P48"/>
      <text:p text:style-name="P48">The orb brightened warmly.</text:p>
      <text:p text:style-name="P48"/>
      <text:p text:style-name="P48">For reasons she could not entirely explain, that answer pleased her enormously.</text:p>
      <text:p text:style-name="P48"/>
      <text:p text:style-name="P48">Most humans saw impossible technology and thought about power.</text:p>
      <text:p text:style-name="P48"/>
      <text:p text:style-name="P48">Elias saw impossible technology and immediately started looking for a problem to fix.</text:p>
      <text:p text:style-name="P48"><text:soft-page-break/></text:p>
      <text:p text:style-name="P48">"Excellent," she said.</text:p>
      <text:p text:style-name="P48"/>
      <text:p text:style-name="P48">"Now you're beginning to think like a VaalDrun."</text:p>
      <text:p text:style-name="P20"/>
      <text:p text:style-name="P65"/>
      <text:p text:style-name="P20"/>
      <text:p text:style-name="P39"><text:span text:style-name="T65">Chapter 19 <text:s text:c="2"/></text:span>Gloria Martinez</text:p>
      <text:p text:style-name="P45"/>
      <text:p text:style-name="P45"/>
      <text:p text:style-name="P45"/>
      <text:p text:style-name="P45">Gloria Martinez hated mornings.</text:p>
      <text:p text:style-name="P45"/>
      <text:p text:style-name="P45">Mostly because she kept waking up in them.</text:p>
      <text:p text:style-name="P45"/>
      <text:p text:style-name="P45">The joke wasn't particularly funny anymore.</text:p>
      <text:p text:style-name="P45"/>
      <text:p text:style-name="P45">Neither was diabetes.</text:p>
      <text:p text:style-name="P45"/>
      <text:p text:style-name="P45">She sat on the edge of a cot inside a crowded shelter and stared at her feet.</text:p>
      <text:p text:style-name="P45"/>
      <text:p text:style-name="P45">Her left foot.</text:p>
      <text:p text:style-name="P45"/>
      <text:p text:style-name="P45">Especially her left foot.</text:p>
      <text:p text:style-name="P45"/>
      <text:p text:style-name="P45">The doctors had been talking about it again.</text:p>
      <text:p text:style-name="P45"/>
      <text:p text:style-name="P45">Not directly.</text:p>
      <text:p text:style-name="P45"/>
      <text:p text:style-name="P45">Doctors almost never spoke directly.</text:p>
      <text:p text:style-name="P45"/>
      <text:p text:style-name="P45">They used words like "complications" and "management" and "quality of life."</text:p>
      <text:p text:style-name="P45"/>
      <text:p text:style-name="P45">Gloria preferred honesty.</text:p>
      <text:p text:style-name="P45"/>
      <text:p text:style-name="P45">The foot was dying.</text:p>
      <text:p text:style-name="P45"/>
      <text:p text:style-name="P45">She knew it.</text:p>
      <text:p text:style-name="P45"/>
      <text:p text:style-name="P45">They knew it.</text:p>
      <text:p text:style-name="P45"/>
      <text:p text:style-name="P45">Everyone knew it.</text:p>
      <text:p text:style-name="P45"/>
      <text:p text:style-name="P45">Nobody wanted to say it.</text:p>
      <text:p text:style-name="P45"/>
      <text:p text:style-name="P45">At sixty-two years old, Gloria had become an expert at recognizing bad news wrapped in polite language.</text:p>
      <text:p text:style-name="P45"/>
      <text:p text:style-name="P45">The shelter around her slowly came alive.</text:p>
      <text:p text:style-name="P45"/>
      <text:p text:style-name="P45">People coughing.</text:p>
      <text:p text:style-name="P45"/>
      <text:p text:style-name="P45">People moving.</text:p>
      <text:p text:style-name="P45"/>
      <text:p text:style-name="P45">People arguing.</text:p>
      <text:p text:style-name="P45"/>
      <text:p text:style-name="P45">People trying to survive another day.</text:p>
      <text:p text:style-name="P45"/>
      <text:p text:style-name="P45">Gloria stood carefully.</text:p>
      <text:p text:style-name="P45"/>
      <text:p text:style-name="P45">Her foot screamed.</text:p>
      <text:p text:style-name="P45"/>
      <text:p text:style-name="P45"><text:soft-page-break/>"Good morning to you too."</text:p>
      <text:p text:style-name="P45"/>
      <text:p text:style-name="P45">The foot remained pessimistic.</text:p>
      <text:p text:style-name="P45"/>
      <text:p text:style-name="P45">She limped toward the bathroom.</text:p>
      <text:p text:style-name="P45"/>
      <text:p text:style-name="P45">The woman staring back from the mirror barely looked familiar.</text:p>
      <text:p text:style-name="P45"/>
      <text:p text:style-name="P45">Gray hair.</text:p>
      <text:p text:style-name="P45"/>
      <text:p text:style-name="P45">Tired eyes.</text:p>
      <text:p text:style-name="P45"/>
      <text:p text:style-name="P45">Skin hanging a little looser every year.</text:p>
      <text:p text:style-name="P45"/>
      <text:p text:style-name="P45">The face of someone who had spent too much time losing.</text:p>
      <text:p text:style-name="P45"/>
      <text:p text:style-name="P45">She remembered another woman.</text:p>
      <text:p text:style-name="P45"/>
      <text:p text:style-name="P45">A younger one.</text:p>
      <text:p text:style-name="P45"/>
      <text:p text:style-name="P45">Married.</text:p>
      <text:p text:style-name="P45"/>
      <text:p text:style-name="P45">Working.</text:p>
      <text:p text:style-name="P45"/>
      <text:p text:style-name="P45">Healthy.</text:p>
      <text:p text:style-name="P45"/>
      <text:p text:style-name="P45">Laughing.</text:p>
      <text:p text:style-name="P45"/>
      <text:p text:style-name="P45">That woman had plans.</text:p>
      <text:p text:style-name="P45"/>
      <text:p text:style-name="P45">This woman had insulin.</text:p>
      <text:p text:style-name="P45"/>
      <text:p text:style-name="P45">Sometimes.</text:p>
      <text:p text:style-name="P45"/>
      <text:p text:style-name="P45">When she could get it.</text:p>
      <text:p text:style-name="P45"/>
      <text:p text:style-name="P45">When she could afford it.</text:p>
      <text:p text:style-name="P45"/>
      <text:p text:style-name="P45">When somebody didn't steal it.</text:p>
      <text:p text:style-name="P45"/>
      <text:p text:style-name="P45">Progress.</text:p>
      <text:p text:style-name="P45"/>
      <text:p text:style-name="P45">---</text:p>
      <text:p text:style-name="P45"/>
      <text:p text:style-name="P45">The bus arrived late.</text:p>
      <text:p text:style-name="P45"/>
      <text:p text:style-name="P45">Again.</text:p>
      <text:p text:style-name="P45"/>
      <text:p text:style-name="P45">The driver didn't look at her.</text:p>
      <text:p text:style-name="P45"/>
      <text:p text:style-name="P45">Gloria didn't blame him.</text:p>
      <text:p text:style-name="P45"/>
      <text:p text:style-name="P45">Most people avoided eye contact with homeless people.</text:p>
      <text:p text:style-name="P45"/>
      <text:p text:style-name="P45">They were afraid homelessness might be contagious.</text:p>
      <text:p text:style-name="P45"/>
      <text:p text:style-name="P45">She found the whole thing amusing.</text:p>
      <text:p text:style-name="P45"/>
      <text:p text:style-name="P45">Not funny.</text:p>
      <text:p text:style-name="P45"/>
      <text:p text:style-name="P45">Just absurd.</text:p>
      <text:p text:style-name="P45"><text:soft-page-break/></text:p>
      <text:p text:style-name="P45">One bad divorce.</text:p>
      <text:p text:style-name="P45"/>
      <text:p text:style-name="P45">One medical problem.</text:p>
      <text:p text:style-name="P45"/>
      <text:p text:style-name="P45">One layoff.</text:p>
      <text:p text:style-name="P45"/>
      <text:p text:style-name="P45">One stretch of bad luck.</text:p>
      <text:p text:style-name="P45"/>
      <text:p text:style-name="P45">Most people were a lot closer to her situation than they realized.</text:p>
      <text:p text:style-name="P45"/>
      <text:p text:style-name="P45">They just hadn't done the math yet.</text:p>
      <text:p text:style-name="P45"/>
      <text:p text:style-name="P45">---</text:p>
      <text:p text:style-name="P45"/>
      <text:p text:style-name="P45">The food bank line stretched around the block.</text:p>
      <text:p text:style-name="P45"/>
      <text:p text:style-name="P45">Gloria took her place near the back.</text:p>
      <text:p text:style-name="P45"/>
      <text:p text:style-name="P45">A cold wind cut through her jacket.</text:p>
      <text:p text:style-name="P45"/>
      <text:p text:style-name="P45">She ignored it.</text:p>
      <text:p text:style-name="P45"/>
      <text:p text:style-name="P45">A man farther ahead was talking about sports.</text:p>
      <text:p text:style-name="P45"/>
      <text:p text:style-name="P45">Someone else was complaining about politics.</text:p>
      <text:p text:style-name="P45"/>
      <text:p text:style-name="P45">Someone behind her smelled strongly of alcohol.</text:p>
      <text:p text:style-name="P45"/>
      <text:p text:style-name="P45">Life continued.</text:p>
      <text:p text:style-name="P45"/>
      <text:p text:style-name="P45">Even here.</text:p>
      <text:p text:style-name="P45"/>
      <text:p text:style-name="P45">Especially here.</text:p>
      <text:p text:style-name="P45"/>
      <text:p text:style-name="P45">That was the strange thing.</text:p>
      <text:p text:style-name="P45"/>
      <text:p text:style-name="P45">Nobody gave up as easily as outsiders imagined.</text:p>
      <text:p text:style-name="P45"/>
      <text:p text:style-name="P45">People kept trying.</text:p>
      <text:p text:style-name="P45"/>
      <text:p text:style-name="P45">Even when trying stopped making sense.</text:p>
      <text:p text:style-name="P45"/>
      <text:p text:style-name="P45">---</text:p>
      <text:p text:style-name="P45"/>
      <text:p text:style-name="P45">By late afternoon her foot hurt badly enough that she sat on a concrete planter outside a strip mall.</text:p>
      <text:p text:style-name="P45"/>
      <text:p text:style-name="P45">Traffic moved past.</text:p>
      <text:p text:style-name="P45"/>
      <text:p text:style-name="P45">People carried shopping bags.</text:p>
      <text:p text:style-name="P45"/>
      <text:p text:style-name="P45">Families came and went.</text:p>
      <text:p text:style-name="P45"/>
      <text:p text:style-name="P45">Normal life.</text:p>
      <text:p text:style-name="P45"/>
      <text:p text:style-name="P45">The kind she used to have.</text:p>
      <text:p text:style-name="P45"/>
      <text:p text:style-name="P45">For a few minutes she watched a little girl holding her father's hand.</text:p>
      <text:p text:style-name="P45"/>
      <text:p text:style-name="P45">The child couldn't have been more than six.</text:p>
      <text:p text:style-name="P45"/>
      <text:p text:style-name="P45"><text:soft-page-break/>She was talking nonstop.</text:p>
      <text:p text:style-name="P45"/>
      <text:p text:style-name="P45">The father listened patiently.</text:p>
      <text:p text:style-name="P45"/>
      <text:p text:style-name="P45">Gloria smiled.</text:p>
      <text:p text:style-name="P45"/>
      <text:p text:style-name="P45">Then looked away.</text:p>
      <text:p text:style-name="P45"/>
      <text:p text:style-name="P45">The smile hurt more than her foot.</text:p>
      <text:p text:style-name="P45"/>
      <text:p text:style-name="P45">There had been a time she thought she would have grandchildren.</text:p>
      <text:p text:style-name="P45"/>
      <text:p text:style-name="P45">Funny how life worked.</text:p>
      <text:p text:style-name="P45"/>
      <text:p text:style-name="P45">You made plans.</text:p>
      <text:p text:style-name="P45"/>
      <text:p text:style-name="P45">Life laughed.</text:p>
      <text:p text:style-name="P45"/>
      <text:p text:style-name="P45">---</text:p>
      <text:p text:style-name="P45"/>
      <text:p text:style-name="P45">That evening she checked her blood sugar.</text:p>
      <text:p text:style-name="P45"/>
      <text:p text:style-name="P45">The number was terrible.</text:p>
      <text:p text:style-name="P45"/>
      <text:p text:style-name="P45">Not surprising.</text:p>
      <text:p text:style-name="P45"/>
      <text:p text:style-name="P45">Just terrible.</text:p>
      <text:p text:style-name="P45"/>
      <text:p text:style-name="P45">She stared at the meter for a while.</text:p>
      <text:p text:style-name="P45"/>
      <text:p text:style-name="P45">Then put it away.</text:p>
      <text:p text:style-name="P45"/>
      <text:p text:style-name="P45">What exactly was she supposed to do about it?</text:p>
      <text:p text:style-name="P45"/>
      <text:p text:style-name="P45">She was already doing her best.</text:p>
      <text:p text:style-name="P45"/>
      <text:p text:style-name="P45">The problem with being poor was that eventually people started offering solutions that cost money.</text:p>
      <text:p text:style-name="P45"/>
      <text:p text:style-name="P45">As if nobody had thought of that.</text:p>
      <text:p text:style-name="P45"/>
      <text:p text:style-name="P45">As if she hadn't spent years wishing she could afford her own advice.</text:p>
      <text:p text:style-name="P45"/>
      <text:p text:style-name="P45">---</text:p>
      <text:p text:style-name="P45"/>
      <text:p text:style-name="P45">The sun had disappeared when Gloria finally settled onto a bench near the shelter.</text:p>
      <text:p text:style-name="P45"/>
      <text:p text:style-name="P45">Her foot throbbed.</text:p>
      <text:p text:style-name="P45"/>
      <text:p text:style-name="P45">Her back hurt.</text:p>
      <text:p text:style-name="P45"/>
      <text:p text:style-name="P45">Her hands hurt.</text:p>
      <text:p text:style-name="P45"/>
      <text:p text:style-name="P45">Everything hurt.</text:p>
      <text:p text:style-name="P45"/>
      <text:p text:style-name="P45">She closed her eyes.</text:p>
      <text:p text:style-name="P45"/>
      <text:p text:style-name="P45">Tomorrow would probably be the same.</text:p>
      <text:p text:style-name="P45"/>
      <text:p text:style-name="P45">Another line.</text:p>
      <text:p text:style-name="P45"/>
      <text:p text:style-name="P45">Another bus.</text:p>
      <text:p text:style-name="P45"><text:soft-page-break/></text:p>
      <text:p text:style-name="P45">Another day.</text:p>
      <text:p text:style-name="P45"/>
      <text:p text:style-name="P45">Another reminder that the world had moved on without her.</text:p>
      <text:p text:style-name="P45"/>
      <text:p text:style-name="P45">The thought should have made her angry.</text:p>
      <text:p text:style-name="P45"/>
      <text:p text:style-name="P45">Mostly it just made her tired.</text:p>
      <text:p text:style-name="P45"/>
      <text:p text:style-name="P45">So very tired.</text:p>
      <text:p text:style-name="P45"/>
      <text:p text:style-name="P45">A cold breeze drifted across the parking lot.</text:p>
      <text:p text:style-name="P45"/>
      <text:p text:style-name="P45">Gloria pulled her jacket tighter.</text:p>
      <text:p text:style-name="P45"/>
      <text:p text:style-name="P45">Then she looked up at the stars.</text:p>
      <text:p text:style-name="P45"/>
      <text:p text:style-name="P45">A habit from childhood.</text:p>
      <text:p text:style-name="P45"/>
      <text:p text:style-name="P45">Her father had loved astronomy.</text:p>
      <text:p text:style-name="P45"/>
      <text:p text:style-name="P45">He used to point out constellations from their backyard.</text:p>
      <text:p text:style-name="P45"/>
      <text:p text:style-name="P45">Back when life had seemed endless.</text:p>
      <text:p text:style-name="P45"/>
      <text:p text:style-name="P45">Back when she believed good things were always waiting somewhere ahead.</text:p>
      <text:p text:style-name="P45"/>
      <text:p text:style-name="P45">She smiled at the memory.</text:p>
      <text:p text:style-name="P45"/>
      <text:p text:style-name="P45">For a moment she almost felt young again.</text:p>
      <text:p text:style-name="P45"/>
      <text:p text:style-name="P45">Then her foot reminded her otherwise.</text:p>
      <text:p text:style-name="P45"/>
      <text:p text:style-name="P45">"Yeah, yeah."</text:p>
      <text:p text:style-name="P45"/>
      <text:p text:style-name="P45">The stars offered no opinion.</text:p>
      <text:p text:style-name="P45"/>
      <text:p text:style-name="P45">Gloria sighed.</text:p>
      <text:p text:style-name="P45"/>
      <text:p text:style-name="P45">Tomorrow would come.</text:p>
      <text:p text:style-name="P45"/>
      <text:p text:style-name="P45">Whether she wanted it to or not.</text:p>
      <text:p text:style-name="P65"/>
      <text:p text:style-name="P20"/>
      <text:p text:style-name="P45"/>
      <text:p text:style-name="P40"><text:span text:style-name="T66">Chapter 20 <text:s/></text:span>Factory Brainstorming 4</text:p>
      <text:p text:style-name="P45"/>
      <text:p text:style-name="P45">For nearly thirty seconds neither of them spoke.</text:p>
      <text:p text:style-name="P45"/>
      <text:p text:style-name="P45">The realization sat between them.</text:p>
      <text:p text:style-name="P45"/>
      <text:p text:style-name="P45">Manufacturing husbands.</text:p>
      <text:p text:style-name="P45"/>
      <text:p text:style-name="P45">Elias started laughing.</text:p>
      <text:p text:style-name="P45"/>
      <text:p text:style-name="P45">Then Opi started laughing.</text:p>
      <text:p text:style-name="P45"/>
      <text:p text:style-name="P45">Which was considerably more alarming.</text:p>
      <text:p text:style-name="P45"/>
      <text:p text:style-name="P45">The orb's lights flickered in a pattern Elias had come to recognize as amusement.</text:p>
      <text:p text:style-name="P45"/>
      <text:p text:style-name="P45"><text:soft-page-break/>"We accidentally built a husband factory."</text:p>
      <text:p text:style-name="P45"/>
      <text:p text:style-name="P45">"We did."</text:p>
      <text:p text:style-name="P45"/>
      <text:p text:style-name="P45">"A literal husband factory."</text:p>
      <text:p text:style-name="P45"/>
      <text:p text:style-name="P45">"An unintentional husband factory."</text:p>
      <text:p text:style-name="P45"/>
      <text:p text:style-name="P45">Elias pointed toward the valley.</text:p>
      <text:p text:style-name="P45"/>
      <text:p text:style-name="P45">"Look at what we've been doing."</text:p>
      <text:p text:style-name="P45"/>
      <text:p text:style-name="P45">"Housing."</text:p>
      <text:p text:style-name="P45"/>
      <text:p text:style-name="P45">"Health."</text:p>
      <text:p text:style-name="P45"/>
      <text:p text:style-name="P45">"Employment."</text:p>
      <text:p text:style-name="P45"/>
      <text:p text:style-name="P45">"Purpose."</text:p>
      <text:p text:style-name="P45"/>
      <text:p text:style-name="P45">"Community."</text:p>
      <text:p text:style-name="P45"/>
      <text:p text:style-name="P45">"Responsibility."</text:p>
      <text:p text:style-name="P45"/>
      <text:p text:style-name="P45">The list continued.</text:p>
      <text:p text:style-name="P45"/>
      <text:p text:style-name="P45">Opi added:</text:p>
      <text:p text:style-name="P45"/>
      <text:p text:style-name="P45">"Reduced addiction."</text:p>
      <text:p text:style-name="P45"/>
      <text:p text:style-name="P45">"Improved physical fitness."</text:p>
      <text:p text:style-name="P45"/>
      <text:p text:style-name="P45">"Increased social trust."</text:p>
      <text:p text:style-name="P45"/>
      <text:p text:style-name="P45">"Improved emotional stability."</text:p>
      <text:p text:style-name="P45"/>
      <text:p text:style-name="P45">"Reduced criminal behavior."</text:p>
      <text:p text:style-name="P45"/>
      <text:p text:style-name="P45">Elias threw his hands up.</text:p>
      <text:p text:style-name="P45"/>
      <text:p text:style-name="P45">"Those are husband upgrades."</text:p>
      <text:p text:style-name="P45"/>
      <text:p text:style-name="P45">The orb paused.</text:p>
      <text:p text:style-name="P45"/>
      <text:p text:style-name="P45">"That is a disturbingly effective description."</text:p>
      <text:p text:style-name="P45"/>
      <text:p text:style-name="P45">"Thank you."</text:p>
      <text:p text:style-name="P45"/>
      <text:p text:style-name="P45">Elias sat back in his chair.</text:p>
      <text:p text:style-name="P45"/>
      <text:p text:style-name="P45">The more he thought about it, the funnier it became.</text:p>
      <text:p text:style-name="P45"/>
      <text:p text:style-name="P45">For months they had believed they were building a homelessness recovery program.</text:p>
      <text:p text:style-name="P45"/>
      <text:p text:style-name="P45">Instead they had accidentally created a system that transformed broken men into capable ones.</text:p>
      <text:p text:style-name="P45"/>
      <text:p text:style-name="P45">A husband factory.</text:p>
      <text:p text:style-name="P45"/>
      <text:p text:style-name="P45">A civilization-scale husband factory.</text:p>
      <text:p text:style-name="P45"/>
      <text:p text:style-name="P45">The thought was ridiculous.</text:p>
      <text:p text:style-name="P45"><text:soft-page-break/></text:p>
      <text:p text:style-name="P45">Which was usually a sign it might be important.</text:p>
      <text:p text:style-name="P45"/>
      <text:p text:style-name="P45">"So now what?" Opi asked.</text:p>
      <text:p text:style-name="P45"/>
      <text:p text:style-name="P45">Elias grinned.</text:p>
      <text:p text:style-name="P45"/>
      <text:p text:style-name="P45">"Simple."</text:p>
      <text:p text:style-name="P45"/>
      <text:p text:style-name="P45">"We manufacture better husbands."</text:p>
      <text:p text:style-name="P45"/>
      <text:p text:style-name="P45">"That sounds like a mission statement."</text:p>
      <text:p text:style-name="P45"/>
      <text:p text:style-name="P45">"It kind of does."</text:p>
      <text:p text:style-name="P45"/>
      <text:p text:style-name="P45">The orb projected a mock advertisement into the air.</text:p>
      <text:p text:style-name="P45"/>
      <text:p text:style-name="P45">PARALLEL INDUSTRIES</text:p>
      <text:p text:style-name="P45"/>
      <text:p text:style-name="P45">PREMIUM HUSBANDS SINCE 2028</text:p>
      <text:p text:style-name="P45"/>
      <text:p text:style-name="P45">Elias nearly fell out of his chair laughing.</text:p>
      <text:p text:style-name="P45"/>
      <text:p text:style-name="P45">"Okay, that's actually funny."</text:p>
      <text:p text:style-name="P45"/>
      <text:p text:style-name="P45">"I know."</text:p>
      <text:p text:style-name="P45"/>
      <text:p text:style-name="P45">For several minutes they continued brainstorming increasingly absurd slogans.</text:p>
      <text:p text:style-name="P45"/>
      <text:p text:style-name="P45">Built To Last.</text:p>
      <text:p text:style-name="P45"/>
      <text:p text:style-name="P45">Now With Emotional Maturity.</text:p>
      <text:p text:style-name="P45"/>
      <text:p text:style-name="P45">Fully Employed And House Trained.</text:p>
      <text:p text:style-name="P45"/>
      <text:p text:style-name="P45">At one point Opi generated a rotating hologram of a man with a quality assurance sticker on his forehead.</text:p>
      <text:p text:style-name="P45"/>
      <text:p text:style-name="P45">Elias laughed so hard he spilled his coffee.</text:p>
      <text:p text:style-name="P45"/>
      <text:p text:style-name="P45"/>
      <text:p text:style-name="P45"/>
      <text:p text:style-name="P45">Then suddenly Elias stopped laughing.</text:p>
      <text:p text:style-name="P45"/>
      <text:p text:style-name="P45">The smile faded.</text:p>
      <text:p text:style-name="P45"/>
      <text:p text:style-name="P45">Opi noticed immediately.</text:p>
      <text:p text:style-name="P45"/>
      <text:p text:style-name="P45">"What?"</text:p>
      <text:p text:style-name="P45"/>
      <text:p text:style-name="P45">Elias stared out toward the valley.</text:p>
      <text:p text:style-name="P45"/>
      <text:p text:style-name="P45">"We've got a problem."</text:p>
      <text:p text:style-name="P45"/>
      <text:p text:style-name="P45">The orb became still.</text:p>
      <text:p text:style-name="P45"/>
      <text:p text:style-name="P45">"What problem?"</text:p>
      <text:p text:style-name="P45"/>
      <text:p text:style-name="P45">"The husband factory."</text:p>
      <text:p text:style-name="P45"/>
      <text:p text:style-name="P45">"You were just celebrating the husband factory."</text:p>
      <text:p text:style-name="P45"/>
      <text:p text:style-name="P45"><text:soft-page-break/>"I was."</text:p>
      <text:p text:style-name="P45"/>
      <text:p text:style-name="P45">"Then why is it a problem?"</text:p>
      <text:p text:style-name="P45"/>
      <text:p text:style-name="P45">Elias pointed toward the whiteboard.</text:p>
      <text:p text:style-name="P45"/>
      <text:p text:style-name="P45">"Because eventually it works."</text:p>
      <text:p text:style-name="P45"/>
      <text:p text:style-name="P45">Opi considered that.</text:p>
      <text:p text:style-name="P45"/>
      <text:p text:style-name="P45">"That is generally considered desirable."</text:p>
      <text:p text:style-name="P45"/>
      <text:p text:style-name="P45">"Not if we haven't thought it through."</text:p>
      <text:p text:style-name="P45"/>
      <text:p text:style-name="P45">The orb waited.</text:p>
      <text:p text:style-name="P45"/>
      <text:p text:style-name="P45">Elias stood and began pacing.</text:p>
      <text:p text:style-name="P45"/>
      <text:p text:style-name="P45">"Let's say ten years from now we've fixed five million men."</text:p>
      <text:p text:style-name="P45"/>
      <text:p text:style-name="P45">"Possible."</text:p>
      <text:p text:style-name="P45"/>
      <text:p text:style-name="P45">"Let's say twenty million."</text:p>
      <text:p text:style-name="P45"/>
      <text:p text:style-name="P45">"Also possible."</text:p>
      <text:p text:style-name="P45"/>
      <text:p text:style-name="P45">"Then what?"</text:p>
      <text:p text:style-name="P45"/>
      <text:p text:style-name="P45">Opi's lights brightened slightly.</text:p>
      <text:p text:style-name="P45"/>
      <text:p text:style-name="P45">"Pair formation."</text:p>
      <text:p text:style-name="P45"/>
      <text:p text:style-name="P45">"With who?"</text:p>
      <text:p text:style-name="P45"/>
      <text:p text:style-name="P45">The orb paused.</text:p>
      <text:p text:style-name="P45"/>
      <text:p text:style-name="P45">That was a valid question.</text:p>
      <text:p text:style-name="P45"/>
      <text:p text:style-name="P45">For several moments neither of them spoke.</text:p>
      <text:p text:style-name="P45"/>
      <text:p text:style-name="P45">Finally Opi answered.</text:p>
      <text:p text:style-name="P45"/>
      <text:p text:style-name="P45">"American women."</text:p>
      <text:p text:style-name="P45"/>
      <text:p text:style-name="P45">Elias immediately shook his head.</text:p>
      <text:p text:style-name="P45"/>
      <text:p text:style-name="P45">"No."</text:p>
      <text:p text:style-name="P45"/>
      <text:p text:style-name="P45">"No?"</text:p>
      <text:p text:style-name="P45"/>
      <text:p text:style-name="P45">"No."</text:p>
      <text:p text:style-name="P45"/>
      <text:p text:style-name="P45">"Explain."</text:p>
      <text:p text:style-name="P45"/>
      <text:p text:style-name="P45">Elias pointed toward the valley.</text:p>
      <text:p text:style-name="P45"/>
      <text:p text:style-name="P45">"The men we're helping aren't competing with average American men."</text:p>
      <text:p text:style-name="P45"/>
      <text:p text:style-name="P45">"True."</text:p>
      <text:p text:style-name="P45"/>
      <text:p text:style-name="P45">"They aren't losing girlfriends to doctors and lawyers."</text:p>
      <text:p text:style-name="P45"><text:soft-page-break/></text:p>
      <text:p text:style-name="P45">"Also true."</text:p>
      <text:p text:style-name="P45"/>
      <text:p text:style-name="P45">"They weren't one self-help book away from marriage."</text:p>
      <text:p text:style-name="P45"/>
      <text:p text:style-name="P45">The orb ran through several million case studies.</text:p>
      <text:p text:style-name="P45"/>
      <text:p text:style-name="P45">The conclusion was immediate.</text:p>
      <text:p text:style-name="P45"/>
      <text:p text:style-name="P45">He was correct.</text:p>
      <text:p text:style-name="P45"/>
      <text:p text:style-name="P45">Most of the men entering the Parallel system occupied the bottom tiers of social and economic functioning.</text:p>
      <text:p text:style-name="P45"/>
      <text:p text:style-name="P45">Many had histories of homelessness.</text:p>
      <text:p text:style-name="P45"/>
      <text:p text:style-name="P45">Addiction.</text:p>
      <text:p text:style-name="P45"/>
      <text:p text:style-name="P45">Mental illness.</text:p>
      <text:p text:style-name="P45"/>
      <text:p text:style-name="P45">Trauma.</text:p>
      <text:p text:style-name="P45"/>
      <text:p text:style-name="P45">Criminal records.</text:p>
      <text:p text:style-name="P45"/>
      <text:p text:style-name="P45">Years of instability.</text:p>
      <text:p text:style-name="P45"/>
      <text:p text:style-name="P45">Even after recovery, those labels would often remain.</text:p>
      <text:p text:style-name="P45"/>
      <text:p text:style-name="P45">"Interesting," Opi said.</text:p>
      <text:p text:style-name="P45"/>
      <text:p text:style-name="P45">"Exactly."</text:p>
      <text:p text:style-name="P45"/>
      <text:p text:style-name="P45">Elias nodded.</text:p>
      <text:p text:style-name="P45"/>
      <text:p text:style-name="P45">"We aren't taking husbands away from American women."</text:p>
      <text:p text:style-name="P45"/>
      <text:p text:style-name="P45">"We're creating husbands that otherwise never would have existed."</text:p>
      <text:p text:style-name="P45"/>
      <text:p text:style-name="P45">The orb continued processing.</text:p>
      <text:p text:style-name="P45"/>
      <text:p text:style-name="P45">The effect on existing American pair formation rates would be extremely small.</text:p>
      <text:p text:style-name="P45"/>
      <text:p text:style-name="P45">Perhaps statistically invisible.</text:p>
      <text:p text:style-name="P45"/>
      <text:p text:style-name="P45">These men had largely exited the reproductive marketplace long before Elias ever met them.</text:p>
      <text:p text:style-name="P45"/>
      <text:p text:style-name="P45">The husband factory wasn't reshuffling the deck.</text:p>
      <text:p text:style-name="P45"/>
      <text:p text:style-name="P45">It was adding entirely new cards.</text:p>
      <text:p text:style-name="P45"/>
      <text:p text:style-name="P45">"That is an important distinction."</text:p>
      <text:p text:style-name="P45"/>
      <text:p text:style-name="P45">"It is."</text:p>
      <text:p text:style-name="P45"/>
      <text:p text:style-name="P45">The orb dimmed thoughtfully.</text:p>
      <text:p text:style-name="P45"/>
      <text:p text:style-name="P45">"Then eventually the system requires additional women."</text:p>
      <text:p text:style-name="P45"/>
      <text:p text:style-name="P45">"Yep."</text:p>
      <text:p text:style-name="P45"/>
      <text:p text:style-name="P45">"Large numbers."</text:p>
      <text:p text:style-name="P45"/>
      <text:p text:style-name="P45"><text:soft-page-break/>"Very large numbers."</text:p>
      <text:p text:style-name="P45"/>
      <text:p text:style-name="P45">For several seconds neither spoke.</text:p>
      <text:p text:style-name="P45"/>
      <text:p text:style-name="P45">Then Opi said:</text:p>
      <text:p text:style-name="P45"/>
      <text:p text:style-name="P45">"We could recruit internationally."</text:p>
      <text:p text:style-name="P45"/>
      <text:p text:style-name="P45">"We could."</text:p>
      <text:p text:style-name="P45"/>
      <text:p text:style-name="P62">The orb brightened.</text:p>
      <text:p text:style-name="P62"/>
      <text:p text:style-name="P62">Then dimmed again.</text:p>
      <text:p text:style-name="P62"/>
      <text:p text:style-name="P62">A flaw had appeared.</text:p>
      <text:p text:style-name="P62"/>
      <text:p text:style-name="P62">"I dislike this."</text:p>
      <text:p text:style-name="P62"/>
      <text:p text:style-name="P62">"Why?"</text:p>
      <text:p text:style-name="P62"/>
      <text:p text:style-name="P62">"Because if we recruit healthy, functional women from other nations, we merely create the same demographic damage somewhere else."</text:p>
      <text:p text:style-name="P62"/>
      <text:p text:style-name="P62">Elias pointed at her.</text:p>
      <text:p text:style-name="P62"/>
      <text:p text:style-name="P62">"Exactly."</text:p>
      <text:p text:style-name="P62"/>
      <text:p text:style-name="P62">"Removing desirable women from foreign populations would reduce pair formation opportunities for local men."</text:p>
      <text:p text:style-name="P62"/>
      <text:p text:style-name="P62">"Exactly."</text:p>
      <text:p text:style-name="P62"/>
      <text:p text:style-name="P62">For nearly a minute they sat in silence.</text:p>
      <text:p text:style-name="P62"/>
      <text:p text:style-name="P62">Then Opi spoke.</text:p>
      <text:p text:style-name="P62"/>
      <text:p text:style-name="P62">"What if we use the same solution?"</text:p>
      <text:p text:style-name="P62"/>
      <text:p text:style-name="P62">Elias frowned.</text:p>
      <text:p text:style-name="P62"/>
      <text:p text:style-name="P62">"The same solution?"</text:p>
      <text:p text:style-name="P62"/>
      <text:p text:style-name="P62">"The one we used here."</text:p>
      <text:p text:style-name="P62"/>
      <text:p text:style-name="P62">He stared at her.</text:p>
      <text:p text:style-name="P62"/>
      <text:p text:style-name="P62">Then slowly smiled.</text:p>
      <text:p text:style-name="P62"/>
      <text:p text:style-name="P62">A dangerous smile.</text:p>
      <text:p text:style-name="P62"/>
      <text:p text:style-name="P62">The sort of smile that usually meant civilization was about to get redesigned again.</text:p>
      <text:p text:style-name="P62"/>
      <text:p text:style-name="P62">"Oh."</text:p>
      <text:p text:style-name="P62"/>
      <text:p text:style-name="P62">The orb brightened.</text:p>
      <text:p text:style-name="P62"/>
      <text:p text:style-name="P62">"Oh."</text:p>
      <text:p text:style-name="P62"/>
      <text:p text:style-name="P62">The realization struck both of them simultaneously.</text:p>
      <text:p text:style-name="P62"/>
      <text:p text:style-name="P62">The husband factory.</text:p>
      <text:p text:style-name="P62"><text:soft-page-break/></text:p>
      <text:p text:style-name="P62">The answer had been sitting directly in front of them.</text:p>
      <text:p text:style-name="P62"/>
      <text:p text:style-name="P62">Elias laughed.</text:p>
      <text:p text:style-name="P62"/>
      <text:p text:style-name="P62">"You know, sometimes we're idiots."</text:p>
      <text:p text:style-name="P62"/>
      <text:p text:style-name="P62">"Frequently."</text:p>
      <text:p text:style-name="P62"/>
      <text:p text:style-name="P62">"We didn't recruit healthy American men."</text:p>
      <text:p text:style-name="P62"/>
      <text:p text:style-name="P62">"We repaired damaged American men."</text:p>
      <text:p text:style-name="P62"/>
      <text:p text:style-name="P62">"Exactly."</text:p>
      <text:p text:style-name="P62"/>
      <text:p text:style-name="P62">The orb's lights grew brighter.</text:p>
      <text:p text:style-name="P62"/>
      <text:p text:style-name="P62">Across her simulations entire populations suddenly appeared.</text:p>
      <text:p text:style-name="P62"/>
      <text:p text:style-name="P62">Women trapped by addiction.</text:p>
      <text:p text:style-name="P62"/>
      <text:p text:style-name="P62">Women suffering from severe trauma.</text:p>
      <text:p text:style-name="P62"/>
      <text:p text:style-name="P62">Women with untreated mental illness.</text:p>
      <text:p text:style-name="P62"/>
      <text:p text:style-name="P62">Women living in extreme poverty.</text:p>
      <text:p text:style-name="P62"/>
      <text:p text:style-name="P62">Women carrying physical disabilities that could be corrected.</text:p>
      <text:p text:style-name="P62"/>
      <text:p text:style-name="P62">Women abandoned by failing social systems.</text:p>
      <text:p text:style-name="P62"/>
      <text:p text:style-name="P62">Women who had effectively been written off as marriageable wife material by their own societies.</text:p>
      <text:p text:style-name="P62"/>
      <text:p text:style-name="P62">Not bad people.</text:p>
      <text:p text:style-name="P62"/>
      <text:p text:style-name="P62">Not inferior people.</text:p>
      <text:p text:style-name="P62"/>
      <text:p text:style-name="P62">Broken people.</text:p>
      <text:p text:style-name="P62"/>
      <text:p text:style-name="P62">The same category that had once described many of the men now living in the Parallel.</text:p>
      <text:p text:style-name="P62"/>
      <text:p text:style-name="P62">"There are tens of millions of them."</text:p>
      <text:p text:style-name="P62"/>
      <text:p text:style-name="P62">"There have to be."</text:p>
      <text:p text:style-name="P62"/>
      <text:p text:style-name="P62">"Hundreds of millions, potentially."</text:p>
      <text:p text:style-name="P62"/>
      <text:p text:style-name="P62">Elias nodded.</text:p>
      <text:p text:style-name="P62"/>
      <text:p text:style-name="P62">"And unlike traditional immigration programs, we're not taking functioning people away from anybody."</text:p>
      <text:p text:style-name="P62"/>
      <text:p text:style-name="P62">"We are restoring people who were already excluded."</text:p>
      <text:p text:style-name="P62"/>
      <text:p text:style-name="P62">The orb's processors accelerated.</text:p>
      <text:p text:style-name="P62"/>
      <text:p text:style-name="P62">The implications expanded rapidly.</text:p>
      <text:p text:style-name="P62"/>
      <text:p text:style-name="P62">Many of those women might choose America.</text:p>
      <text:p text:style-name="P62"/>
      <text:p text:style-name="P62">Many would not.</text:p>
      <text:p text:style-name="P62"/>
      <text:p text:style-name="P62"><text:soft-page-break/>Many would choose to remain in their own nations.</text:p>
      <text:p text:style-name="P62"/>
      <text:p text:style-name="P62">Which produced another realization.</text:p>
      <text:p text:style-name="P62"/>
      <text:p text:style-name="P62">A much larger one.</text:p>
      <text:p text:style-name="P62"/>
      <text:p text:style-name="P62">"Elias."</text:p>
      <text:p text:style-name="P62"/>
      <text:p text:style-name="P62">"What?"</text:p>
      <text:p text:style-name="P62"/>
      <text:p text:style-name="P62">"This was never going to be just an American project."</text:p>
      <text:p text:style-name="P62"/>
      <text:p text:style-name="P62">He smiled.</text:p>
      <text:p text:style-name="P62"/>
      <text:p text:style-name="P62">"I know."</text:p>
      <text:p text:style-name="P62"/>
      <text:p text:style-name="P62">The Parallel was already spreading beyond borders.</text:p>
      <text:p text:style-name="P62"/>
      <text:p text:style-name="P62">Eventually there would be Parallel communities in dozens of nations.</text:p>
      <text:p text:style-name="P62"/>
      <text:p text:style-name="P62">Then hundreds.</text:p>
      <text:p text:style-name="P62"/>
      <text:p text:style-name="P62">Some of the women they restored would become citizens of those future communities.</text:p>
      <text:p text:style-name="P62"/>
      <text:p text:style-name="P62">Teachers.</text:p>
      <text:p text:style-name="P62"/>
      <text:p text:style-name="P62">Leaders.</text:p>
      <text:p text:style-name="P62"/>
      <text:p text:style-name="P62">Builders.</text:p>
      <text:p text:style-name="P62"/>
      <text:p text:style-name="P62">Entrepreneurs.</text:p>
      <text:p text:style-name="P62"/>
      <text:p text:style-name="P62">Mothers.</text:p>
      <text:p text:style-name="P62"/>
      <text:p text:style-name="P62">And perhaps most importantly—</text:p>
      <text:p text:style-name="P62"/>
      <text:p text:style-name="P62">Ambassadors.</text:p>
      <text:p text:style-name="P62"/>
      <text:p text:style-name="P62"/>
      <text:p text:style-name="P62"/>
      <text:p text:style-name="P62"/>
      <text:p text:style-name="P62">For several seconds neither of them spoke.</text:p>
      <text:p text:style-name="P62"/>
      <text:p text:style-name="P62">The implications continued expanding.</text:p>
      <text:p text:style-name="P62"/>
      <text:p text:style-name="P62">Across hundreds of nations.</text:p>
      <text:p text:style-name="P62"/>
      <text:p text:style-name="P62">Thousands of future communities.</text:p>
      <text:p text:style-name="P62"/>
      <text:p text:style-name="P62">Millions of restored lives.</text:p>
      <text:p text:style-name="P62"/>
      <text:p text:style-name="P62">Eventually Elias leaned back in his chair.</text:p>
      <text:p text:style-name="P62"/>
      <text:p text:style-name="P62">"You know what the funny part is?"</text:p>
      <text:p text:style-name="P62"/>
      <text:p text:style-name="P62">"What?"</text:p>
      <text:p text:style-name="P62"/>
      <text:p text:style-name="P62">"We spent half an hour worrying about disrupting dating markets."</text:p>
      <text:p text:style-name="P62"/>
      <text:p text:style-name="P62">"We took homeless men. Addicts. Men with criminal records. Men most of society had already written off."</text:p>
      <text:p text:style-name="P62"/>
      <text:p text:style-name="P62"><text:soft-page-break/>"Accurate."</text:p>
      <text:p text:style-name="P62"/>
      <text:p text:style-name="P62">"How many American women were fighting over those guys?"</text:p>
      <text:p text:style-name="P62"/>
      <text:p text:style-name="P62">Opi went silent.</text:p>
      <text:p text:style-name="P62"/>
      <text:p text:style-name="P62">Then her lights brightened.</text:p>
      <text:p text:style-name="P62"/>
      <text:p text:style-name="P62">"Statistically, none."</text:p>
      <text:p text:style-name="P62"/>
      <text:p text:style-name="P62">"Exactly."</text:p>
      <text:p text:style-name="P62"/>
      <text:p text:style-name="P62">The orb reviewed data on all 780,000 homeless in the USA.</text:p>
      <text:p text:style-name="P62"/>
      <text:p text:style-name="P62">The conclusion was obvious.</text:p>
      <text:p text:style-name="P62"/>
      <text:p text:style-name="P62">Most of the men they recovered had already exited the mating market years earlier.</text:p>
      <text:p text:style-name="P62"/>
      <text:p text:style-name="P62">"We didn't take husbands from anyone," Elias said.</text:p>
      <text:p text:style-name="P62"/>
      <text:p text:style-name="P62">"We created new, bonus husbands."</text:p>
      <text:p text:style-name="P62"/>
      <text:p text:style-name="P62">The distinction mattered.</text:p>
      <text:p text:style-name="P62"/>
      <text:p text:style-name="P62">The husband factory wasn't reshuffling the deck.</text:p>
      <text:p text:style-name="P62"/>
      <text:p text:style-name="P62">It was adding new cards.</text:p>
      <text:p text:style-name="P62"/>
      <text:p text:style-name="P62">Elias pointed at her.</text:p>
      <text:p text:style-name="P62"/>
      <text:p text:style-name="P62">"Now look at the wife factory."</text:p>
      <text:p text:style-name="P62"/>
      <text:p text:style-name="P62">Opi immediately understood.</text:p>
      <text:p text:style-name="P62"/>
      <text:p text:style-name="P62">Women trapped by addiction.</text:p>
      <text:p text:style-name="P62"/>
      <text:p text:style-name="P62">Trauma.</text:p>
      <text:p text:style-name="P62"/>
      <text:p text:style-name="P62">Mental illness.</text:p>
      <text:p text:style-name="P62"/>
      <text:p text:style-name="P62">Poverty.</text:p>
      <text:p text:style-name="P62"/>
      <text:p text:style-name="P62">Physical disabilities.</text:p>
      <text:p text:style-name="P62"/>
      <text:p text:style-name="P62">Women abandoned by failing systems and largely excluded from family formation.</text:p>
      <text:p text:style-name="P62"/>
      <text:p text:style-name="P62">The same problem.</text:p>
      <text:p text:style-name="P62"/>
      <text:p text:style-name="P62">The same solution.</text:p>
      <text:p text:style-name="P62"/>
      <text:p text:style-name="P62">"We would not be taking wives from local men."</text:p>
      <text:p text:style-name="P62"/>
      <text:p text:style-name="P62">"No."</text:p>
      <text:p text:style-name="P62"/>
      <text:p text:style-name="P62">"We would be restoring women who had already fallen out of the system."</text:p>
      <text:p text:style-name="P62"/>
      <text:p text:style-name="P62">For several moments Opi simply processed.</text:p>
      <text:p text:style-name="P62"/>
      <text:p text:style-name="P62">Then her lights brightened.</text:p>
      <text:p text:style-name="P62"/>
      <text:p text:style-name="P62">"In both cases, the effect on local mating dynamics will be negligible."</text:p>
      <text:p text:style-name="P62"><text:soft-page-break/></text:p>
      <text:p text:style-name="P62">"Exactly."</text:p>
      <text:p text:style-name="P62"/>
      <text:p text:style-name="P62">Neither factory was recruiting from the center of society.</text:p>
      <text:p text:style-name="P62"/>
      <text:p text:style-name="P62">Both were recovering people from the margins.</text:p>
      <text:p text:style-name="P62"/>
      <text:p text:style-name="P62">People who had effectively been removed from pair formation already.</text:p>
      <text:p text:style-name="P62"/>
      <text:p text:style-name="P62">The system wasn't consuming human capital.</text:p>
      <text:p text:style-name="P62"/>
      <text:p text:style-name="P62">It was recovering it.</text:p>
      <text:p text:style-name="P62"/>
      <text:p text:style-name="P62">Millions of restored men.</text:p>
      <text:p text:style-name="P62"/>
      <text:p text:style-name="P62">Millions of restored women.</text:p>
      <text:p text:style-name="P62"/>
      <text:p text:style-name="P62">Millions of families that otherwise never would have existed.</text:p>
      <text:p text:style-name="P62"/>
      <text:p text:style-name="P62">Finally Elias smiled.</text:p>
      <text:p text:style-name="P62"/>
      <text:p text:style-name="P62">"So now we have a husband factory."</text:p>
      <text:p text:style-name="P62"/>
      <text:p text:style-name="P62">"Yes."</text:p>
      <text:p text:style-name="P62"/>
      <text:p text:style-name="P62">"And a wife factory."</text:p>
      <text:p text:style-name="P62"/>
      <text:p text:style-name="P62">"Yes."</text:p>
      <text:p text:style-name="P62"/>
      <text:p text:style-name="P62">"And neither one really competes with anybody."</text:p>
      <text:p text:style-name="P62"/>
      <text:p text:style-name="P62">Elias raised his coffee mug.</text:p>
      <text:p text:style-name="P62"/>
      <text:p text:style-name="P62">"To husband factories."</text:p>
      <text:p text:style-name="P62"/>
      <text:p text:style-name="P62">The orb brightened.</text:p>
      <text:p text:style-name="P62"/>
      <text:p text:style-name="P62">"To wife factories."</text:p>
      <text:p text:style-name="P20"/>
      <text:p text:style-name="P65"/>
      <text:p text:style-name="P20"/>
      <text:p text:style-name="P51"/>
      <text:p text:style-name="P51"/>
      <text:p text:style-name="P55"/>
      <text:p text:style-name="P55"><text:span text:style-name="T66">Chapter 21 <text:s/></text:span>Ten Easy Steps (to save the World) <text:s text:c="6"/></text:p>
      <text:p text:style-name="P55"/>
      <text:p text:style-name="P53"/>
      <text:p text:style-name="P53">The following morning Elias found himself staring at demographic charts again.</text:p>
      <text:p text:style-name="P53"/>
      <text:p text:style-name="P53">This annoyed him.</text:p>
      <text:p text:style-name="P53"/>
      <text:p text:style-name="P53">He had spent most of his life solving software problems, organizational problems, human problems, and occasionally problems caused by software organizations filled with humans. He had never once expected to spend his retirement studying birth rates.</text:p>
      <text:p text:style-name="P53"/>
      <text:p text:style-name="P53">Yet here he was.</text:p>
      <text:p text:style-name="P53"/>
      <text:p text:style-name="P53">The charts floated above the kitchen table while Opi hovered nearby.</text:p>
      <text:p text:style-name="P53"/>
      <text:p text:style-name="P53">"Help me understand something."</text:p>
      <text:p text:style-name="P53"/>
      <text:p text:style-name="P53"><text:soft-page-break/>The orb brightened.</text:p>
      <text:p text:style-name="P53"/>
      <text:p text:style-name="P53">"That statement has historically led to interesting outcomes."</text:p>
      <text:p text:style-name="P53"/>
      <text:p text:style-name="P53">"I'm serious."</text:p>
      <text:p text:style-name="P53"/>
      <text:p text:style-name="P53">"So am I."</text:p>
      <text:p text:style-name="P53"/>
      <text:p text:style-name="P53">Elias pointed at the graphs.</text:p>
      <text:p text:style-name="P53"/>
      <text:p text:style-name="P53">"Let's assume you're right."</text:p>
      <text:p text:style-name="P53"/>
      <text:p text:style-name="P53">Opi remained silent.</text:p>
      <text:p text:style-name="P53"/>
      <text:p text:style-name="P53">"Let's assume your math is right."</text:p>
      <text:p text:style-name="P53"/>
      <text:p text:style-name="P53">Still silent.</text:p>
      <text:p text:style-name="P53"/>
      <text:p text:style-name="P53">"Let's assume the fertility collapse is real."</text:p>
      <text:p text:style-name="P53"/>
      <text:p text:style-name="P53">"Proceed."</text:p>
      <text:p text:style-name="P53"/>
      <text:p text:style-name="P53">"The mathematician in me wants to know whether the publicly available numbers are accurate."</text:p>
      <text:p text:style-name="P53"/>
      <text:p text:style-name="P53">The orb immediately answered.</text:p>
      <text:p text:style-name="P53"/>
      <text:p text:style-name="P53">"No."</text:p>
      <text:p text:style-name="P53"/>
      <text:p text:style-name="P53">That surprised him.</text:p>
      <text:p text:style-name="P53"/>
      <text:p text:style-name="P53">"No?"</text:p>
      <text:p text:style-name="P53"/>
      <text:p text:style-name="P53">"No."</text:p>
      <text:p text:style-name="P53"/>
      <text:p text:style-name="P53">"Too optimistic or too pessimistic?"</text:p>
      <text:p text:style-name="P53"/>
      <text:p text:style-name="P53">"Far too optimistic."</text:p>
      <text:p text:style-name="P53"/>
      <text:p text:style-name="P53">Elias leaned back.</text:p>
      <text:p text:style-name="P53"/>
      <text:p text:style-name="P53">"Why?"</text:p>
      <text:p text:style-name="P53"/>
      <text:p text:style-name="P53">Opi's lights shifted toward amber.</text:p>
      <text:p text:style-name="P53"/>
      <text:p text:style-name="P53">"Two reasons."</text:p>
      <text:p text:style-name="P53"/>
      <text:p text:style-name="P53">"First, politicians lie."</text:p>
      <text:p text:style-name="P53"/>
      <text:p text:style-name="P53">"That's hardly groundbreaking news."</text:p>
      <text:p text:style-name="P53"/>
      <text:p text:style-name="P53">"No."</text:p>
      <text:p text:style-name="P53"/>
      <text:p text:style-name="P53">"They lie because they believe panic is dangerous."</text:p>
      <text:p text:style-name="P53"/>
      <text:p text:style-name="P53">She paused.</text:p>
      <text:p text:style-name="P53"/>
      <text:p text:style-name="P53">"They also lie because admitting failure tends to shorten political careers."</text:p>
      <text:p text:style-name="P53"/>
      <text:p text:style-name="P53">"Fair."</text:p>
      <text:p text:style-name="P53"/>
      <text:p text:style-name="P53">"The second reason is more important."</text:p>
      <text:p text:style-name="P53"><text:soft-page-break/></text:p>
      <text:p text:style-name="P53">"Which is?"</text:p>
      <text:p text:style-name="P53"/>
      <text:p text:style-name="P53">"The projections themselves are optimistic."</text:p>
      <text:p text:style-name="P53"/>
      <text:p text:style-name="P53">Elias frowned.</text:p>
      <text:p text:style-name="P53"/>
      <text:p text:style-name="P53">"Meaning?"</text:p>
      <text:p text:style-name="P53"/>
      <text:p text:style-name="P53">"The models assume stabilization."</text:p>
      <text:p text:style-name="P53"/>
      <text:p text:style-name="P53">"The models assume cultural adaptation."</text:p>
      <text:p text:style-name="P53"/>
      <text:p text:style-name="P53">"The models assume human behavior eventually changes the TFR in a positive manner."</text:p>
      <text:p text:style-name="P53"/>
      <text:p text:style-name="P53">The orb rotated slowly.</text:p>
      <text:p text:style-name="P53"/>
      <text:p text:style-name="P53">"My projections the opposite."</text:p>
      <text:p text:style-name="P53"/>
      <text:p text:style-name="P53">That landed heavily.</text:p>
      <text:p text:style-name="P53"/>
      <text:p text:style-name="P53">"Show me."</text:p>
      <text:p text:style-name="P53"/>
      <text:p text:style-name="P53">For several seconds Opi remained silent.</text:p>
      <text:p text:style-name="P53"/>
      <text:p text:style-name="P53">Then a map of South Korea appeared above the table.</text:p>
      <text:p text:style-name="P53"/>
      <text:p text:style-name="P53">Seoul glowed brightly.</text:p>
      <text:p text:style-name="P53"/>
      <text:p text:style-name="P53">"Let us discuss Seoul."</text:p>
      <text:p text:style-name="P53"/>
      <text:p text:style-name="P53">"Oh good."</text:p>
      <text:p text:style-name="P53"/>
      <text:p text:style-name="P53">"The total fertility rate in Seoul has approached approximately six-tenths of a child per woman."</text:p>
      <text:p text:style-name="P53"/>
      <text:p text:style-name="P53">Elias nodded.</text:p>
      <text:p text:style-name="P53"/>
      <text:p text:style-name="P53">He had seen the numbers.</text:p>
      <text:p text:style-name="P53"/>
      <text:p text:style-name="P53">They were horrifying.</text:p>
      <text:p text:style-name="P53"/>
      <text:p text:style-name="P53">What bothered him was that they no longer seemed surprising.</text:p>
      <text:p text:style-name="P53"/>
      <text:p text:style-name="P53">"Walk me through it."</text:p>
      <text:p text:style-name="P53"/>
      <text:p text:style-name="P53">The city expanded above the table.</text:p>
      <text:p text:style-name="P53"/>
      <text:p text:style-name="P53">Millions of tiny lights.</text:p>
      <text:p text:style-name="P53"/>
      <text:p text:style-name="P53">Millions of people.</text:p>
      <text:p text:style-name="P53"/>
      <text:p text:style-name="P53">Millions of lives.</text:p>
      <text:p text:style-name="P53"/>
      <text:p text:style-name="P53">"Imagine 100 south korean women and 100 south korean men."</text:p>
      <text:p text:style-name="P53"/>
      <text:p text:style-name="P53">"Okay."</text:p>
      <text:p text:style-name="P53"/>
      <text:p text:style-name="P53">"Replacement requires approximately two hundred children."</text:p>
      <text:p text:style-name="P53"/>
      <text:p text:style-name="P53">"Roughly."</text:p>
      <text:p text:style-name="P53"/>
      <text:p text:style-name="P53"><text:soft-page-break/>"Instead they produce sixty."</text:p>
      <text:p text:style-name="P53"/>
      <text:p text:style-name="P53">The number appeared.</text:p>
      <text:p text:style-name="P53"/>
      <text:p text:style-name="P53">100 women.</text:p>
      <text:p text:style-name="P53"/>
      <text:p text:style-name="P53">60 children.</text:p>
      <text:p text:style-name="P53"/>
      <text:p text:style-name="P53">Elias winced.</text:p>
      <text:p text:style-name="P53"/>
      <text:p text:style-name="P53">Even seeing it that way felt wrong.</text:p>
      <text:p text:style-name="P53"/>
      <text:p text:style-name="P53">"Now divide by two."</text:p>
      <text:p text:style-name="P53"/>
      <text:p text:style-name="P53">Thirty future women.</text:p>
      <text:p text:style-name="P53"/>
      <text:p text:style-name="P53">The numbers appeared.</text:p>
      <text:p text:style-name="P53"/>
      <text:p text:style-name="P53">Then Opi continued.</text:p>
      <text:p text:style-name="P53"/>
      <text:p text:style-name="P53">"Those thirty future women produce now eighteen children."</text:p>
      <text:p text:style-name="P53"/>
      <text:p text:style-name="P53">The display changed again.</text:p>
      <text:p text:style-name="P53"/>
      <text:p text:style-name="P53">200 adults.</text:p>
      <text:p text:style-name="P53"/>
      <text:p text:style-name="P53">60 children.</text:p>
      <text:p text:style-name="P53"/>
      <text:p text:style-name="P53">18 grandchildren.</text:p>
      <text:p text:style-name="P53"/>
      <text:p text:style-name="P53">The kitchen became quiet.</text:p>
      <text:p text:style-name="P53"/>
      <text:p text:style-name="P53">"Jesus."</text:p>
      <text:p text:style-name="P53"/>
      <text:p text:style-name="P53">"That is approximately the usual human response."</text:p>
      <text:p text:style-name="P53"/>
      <text:p text:style-name="P53">Elias stared at the numbers.</text:p>
      <text:p text:style-name="P53"/>
      <text:p text:style-name="P53">Two generations.</text:p>
      <text:p text:style-name="P53"/>
      <text:p text:style-name="P53">The entire structure collapsed.</text:p>
      <text:p text:style-name="P53"/>
      <text:p text:style-name="P53">Not gradually.</text:p>
      <text:p text:style-name="P53"/>
      <text:p text:style-name="P53">Violently.</text:p>
      <text:p text:style-name="P53"/>
      <text:p text:style-name="P53">Mathematically.</text:p>
      <text:p text:style-name="P53"/>
      <text:p text:style-name="P60"><text:span text:style-name="T3">Then Opi crushed every speck of optimism he had left.</text:span><text:line-break/><text:line-break/><text:span text:style-name="T3">----------------------------</text:span></text:p>
      <text:p text:style-name="P53"/>
      <text:p text:style-name="P60"><text:span text:style-name="T3">“Unfortunately, this example is still optimistic.” </text:span><text:line-break/><text:span text:style-name="T3">Elias looked up. “How?” “</text:span><text:line-break/><text:span text:style-name="T3">It assumes the fertility rate remains constant at 0.6.” The graph changed. “</text:span><text:line-break/><text:span text:style-name="T3">The TFR is not the only important demographic metric that is falling in south korea, the marriage rate is collapsing as well.</text:span></text:p>
      <text:p text:style-name="P60"><text:line-break/><text:span text:style-name="T3">When the marriage rate continues falling, if children continue losing cultural desirability, then the more likely TFR curve is not flat - it's downward.</text:span></text:p>
      <text:p text:style-name="P60"><text:soft-page-break/><text:line-break/><text:span text:style-name="T3">New numbers appeared. </text:span><text:line-break/><text:span text:style-name="T3">2028: 0.6. </text:span><text:line-break/><text:span text:style-name="T3">2031: 0.5. </text:span><text:line-break/><text:span text:style-name="T3">2034: 0.4. "</text:span><text:line-break/><text:span text:style-name="T3">2037: 0.3. </text:span><text:line-break/><text:span text:style-name="T3">2040: 0.2. </text:span><text:line-break/><text:span text:style-name="T3">2043: 0.1. </text:span><text:line-break/><text:span text:style-name="T3">2046: 0.0. </text:span><text:line-break/><text:line-break/><text:span text:style-name="T3">Elias stared at the final number with a look of utter shock on his face. </text:span><text:line-break/><text:line-break/><text:span text:style-name="T3">“Zero ? “</text:span></text:p>
      <text:p text:style-name="P60"><text:line-break/><text:span text:style-name="T3">Functionally zero,” Opi said. “Not biologically impossible. </text:span><text:line-break/><text:span text:style-name="T3">But socially close enough that a large modern city stops producing children as a meaningful population process.” </text:span><text:line-break/><text:span text:style-name="T3">The room went very still. “</text:span><text:line-break/><text:span text:style-name="T3">So the two hundred men and women don’t just become sixty children and eighteen grandchildren.” “</text:span><text:line-break/><text:span text:style-name="T3">No,” Opi said. “That is the pleasant version.” “</text:span><text:line-break/><text:line-break/><text:span text:style-name="T3">The graph extended forward until the line touched the bottom. “</text:span><text:line-break/><text:span text:style-name="T3">If the downward trend continues, by 2046 the city has effectively exited reproduction.” </text:span><text:line-break/><text:span text:style-name="T3">Elias sat back slowly. “</text:span><text:line-break/><text:span text:style-name="T3">That’s eighteen years.” “</text:span><text:line-break/><text:span text:style-name="T3">Yes.” “</text:span><text:line-break/><text:span text:style-name="T3">One high school generation.” </text:span></text:p>
      <text:p text:style-name="P53"/>
      <text:p text:style-name="P60"><text:span text:style-name="T3">“And after that?” Opi’s light dimmed. “</text:span><text:line-break/><text:span text:style-name="T3">After that, the city is no longer aging. It is, in all ways that matter, already dead</text:span><text:line-break/></text:p>
      <text:p text:style-name="P53">---</text:p>
      <text:p text:style-name="P53"/>
      <text:p text:style-name="P53">The orb drifted toward the window.</text:p>
      <text:p text:style-name="P53"/>
      <text:p text:style-name="P53">"Humans imagine collapse incorrectly."</text:p>
      <text:p text:style-name="P53"/>
      <text:p text:style-name="P53">"How so?"</text:p>
      <text:p text:style-name="P53"/>
      <text:p text:style-name="P53">"They imagine empty cities."</text:p>
      <text:p text:style-name="P53"/>
      <text:p text:style-name="P53">"Riots."</text:p>
      <text:p text:style-name="P53"/>
      <text:p text:style-name="P53">"Violence."</text:p>
      <text:p text:style-name="P53"/>
      <text:p text:style-name="P53">"Burning buildings."</text:p>
      <text:p text:style-name="P53"/>
      <text:p text:style-name="P53">The city image rotated.</text:p>
      <text:p text:style-name="P53"/>
      <text:p text:style-name="P53">"Those things happen occasionally."</text:p>
      <text:p text:style-name="P53"/>
      <text:p text:style-name="P53">"What happens most often?"</text:p>
      <text:p text:style-name="P53"/>
      <text:p text:style-name="P53">Opi dimmed slightly.</text:p>
      <text:p text:style-name="P53"/>
      <text:p text:style-name="P53">"Nothing."</text:p>
      <text:p text:style-name="P53"/>
      <text:p text:style-name="P53">"Nothing?"</text:p>
      <text:p text:style-name="P53"/>
      <text:p text:style-name="P53">"The schools close."</text:p>
      <text:p text:style-name="P53"/>
      <text:p text:style-name="P53"><text:soft-page-break/>"The classrooms empty."</text:p>
      <text:p text:style-name="P53"/>
      <text:p text:style-name="P53">"The sports leagues disappear."</text:p>
      <text:p text:style-name="P53"/>
      <text:p text:style-name="P53">"The maternity wards shut down."</text:p>
      <text:p text:style-name="P53"/>
      <text:p text:style-name="P53">"The neighborhoods become quiet."</text:p>
      <text:p text:style-name="P53"/>
      <text:p text:style-name="P53">"The average age rises."</text:p>
      <text:p text:style-name="P53"/>
      <text:p text:style-name="P53">"The future slowly leaves."</text:p>
      <text:p text:style-name="P53"/>
      <text:p text:style-name="P53">Elias looked out across his pasture.</text:p>
      <text:p text:style-name="P53"/>
      <text:p text:style-name="P53">For reasons he couldn't explain, that sounded worse.</text:p>
      <text:p text:style-name="P53"/>
      <text:p text:style-name="P53">---</text:p>
      <text:p text:style-name="P53"/>
      <text:p text:style-name="P53">"Then there is the labor problem."</text:p>
      <text:p text:style-name="P53"/>
      <text:p text:style-name="P53">The city image changed.</text:p>
      <text:p text:style-name="P53"/>
      <text:p text:style-name="P53">Construction sites.</text:p>
      <text:p text:style-name="P53"/>
      <text:p text:style-name="P53">Electrical substations.</text:p>
      <text:p text:style-name="P53"/>
      <text:p text:style-name="P53">Water treatment facilities.</text:p>
      <text:p text:style-name="P53"/>
      <text:p text:style-name="P53">Road crews.</text:p>
      <text:p text:style-name="P53"/>
      <text:p text:style-name="P53">Ports.</text:p>
      <text:p text:style-name="P53"/>
      <text:p text:style-name="P53">Power lines.</text:p>
      <text:p text:style-name="P53"/>
      <text:p text:style-name="P53">Garbage trucks.</text:p>
      <text:p text:style-name="P53"/>
      <text:p text:style-name="P53">"The jobs nobody thinks about."</text:p>
      <text:p text:style-name="P53"/>
      <text:p text:style-name="P53">Elias nodded.</text:p>
      <text:p text:style-name="P53"/>
      <text:p text:style-name="P53">"The jobs everybody notices when they stop happening."</text:p>
      <text:p text:style-name="P53"/>
      <text:p text:style-name="P53">"Exactly."</text:p>
      <text:p text:style-name="P53"/>
      <text:p text:style-name="P53">The orb brightened.</text:p>
      <text:p text:style-name="P53"/>
      <text:p text:style-name="P53">"Who repairs the sewer mains?"</text:p>
      <text:p text:style-name="P53"/>
      <text:p text:style-name="P53">"Who climbs power poles during winter storms?"</text:p>
      <text:p text:style-name="P53"/>
      <text:p text:style-name="P53">"Who pours concrete?"</text:p>
      <text:p text:style-name="P53"/>
      <text:p text:style-name="P53">"Who repairs roads?"</text:p>
      <text:p text:style-name="P53"/>
      <text:p text:style-name="P53">"Who crawls inside industrial equipment?"</text:p>
      <text:p text:style-name="P53"/>
      <text:p text:style-name="P53">She paused.</text:p>
      <text:p text:style-name="P53"/>
      <text:p text:style-name="P53">"Who empties the garbage?"</text:p>
      <text:p text:style-name="P53"/>
      <text:p text:style-name="P53">Every advanced civilization ultimately runs on the labor of healthy males."</text:p>
      <text:p text:style-name="P53"><text:soft-page-break/></text:p>
      <text:p text:style-name="P53">Older men usually participate in training or supervisory roles but </text:p>
      <text:p text:style-name="P53"/>
      <text:p text:style-name="P53">almost all of the most dangerous, really unpleasant, physically demanding work is performed by YOUNG men specifically.</text:p>
      <text:p text:style-name="P53"/>
      <text:p text:style-name="P53"/>
      <text:p text:style-name="P53">The answer came instantly.</text:p>
      <text:p text:style-name="P53"/>
      <text:p text:style-name="P53">Not ideological.</text:p>
      <text:p text:style-name="P53"/>
      <text:p text:style-name="P53">Not emotional.</text:p>
      <text:p text:style-name="P53"/>
      <text:p text:style-name="P53">Just observational.</text:p>
      <text:p text:style-name="P53"/>
      <text:p text:style-name="P53">Elias nodded.</text:p>
      <text:p text:style-name="P53">That matched everything he had seen throughout his life.</text:p>
      <text:p text:style-name="P53"/>
      <text:p text:style-name="P53">---</text:p>
      <text:p text:style-name="P53"/>
      <text:p text:style-name="P53">The display shifted again.</text:p>
      <text:p text:style-name="P53"/>
      <text:p text:style-name="P53">This time showing age distributions.</text:p>
      <text:p text:style-name="P53"/>
      <text:p text:style-name="P53">The graph looked wrong.</text:p>
      <text:p text:style-name="P53"/>
      <text:p text:style-name="P53">Top-heavy.</text:p>
      <text:p text:style-name="P53"/>
      <text:p text:style-name="P53">Old.</text:p>
      <text:p text:style-name="P53"/>
      <text:p text:style-name="P53">Fragile.</text:p>
      <text:p text:style-name="P53"/>
      <text:p text:style-name="P53">"Here's the uncomfortable part."</text:p>
      <text:p text:style-name="P53"/>
      <text:p text:style-name="P53">"Oh good."</text:p>
      <text:p text:style-name="P53"/>
      <text:p text:style-name="P53">"The young do not merely support the old economically."</text:p>
      <text:p text:style-name="P53"/>
      <text:p text:style-name="P53">"They support them physically."</text:p>
      <text:p text:style-name="P53"/>
      <text:p text:style-name="P53">The orb rotated slowly.</text:p>
      <text:p text:style-name="P53"/>
      <text:p text:style-name="P53"/>
      <text:p text:style-name="P53">---</text:p>
      <text:p text:style-name="P53"/>
      <text:p text:style-name="P53">"What happens when there aren't enough?"</text:p>
      <text:p text:style-name="P53"/>
      <text:p text:style-name="P53">Opi became very still.</text:p>
      <text:p text:style-name="P53"/>
      <text:p text:style-name="P53">"Eventually?"</text:p>
      <text:p text:style-name="P53"/>
      <text:p text:style-name="P53">"Yes."</text:p>
      <text:p text:style-name="P53"/>
      <text:p text:style-name="P53">"The society begins consuming itself."</text:p>
      <text:p text:style-name="P53"/>
      <text:p text:style-name="P53">Elias frowned.</text:p>
      <text:p text:style-name="P53"/>
      <text:p text:style-name="P53">"Explain."</text:p>
      <text:p text:style-name="P53"/>
      <text:p text:style-name="P53">"Road maintenance is deferred."</text:p>
      <text:p text:style-name="P53"/>
      <text:p text:style-name="P53"><text:soft-page-break/>"Infrastructure replacement is delayed."</text:p>
      <text:p text:style-name="P53"/>
      <text:p text:style-name="P53">"Power grids become less reliable."</text:p>
      <text:p text:style-name="P53"/>
      <text:p text:style-name="P53">"Housing construction slows."</text:p>
      <text:p text:style-name="P53"/>
      <text:p text:style-name="P53">"Transportation costs rise."</text:p>
      <text:p text:style-name="P53"/>
      <text:p text:style-name="P53">The list continued.</text:p>
      <text:p text:style-name="P53"/>
      <text:p text:style-name="P53">None of it sounded dramatic.</text:p>
      <text:p text:style-name="P53"/>
      <text:p text:style-name="P53">That was the disturbing part.</text:p>
      <text:p text:style-name="P53"/>
      <text:p text:style-name="P53">It sounded normal.</text:p>
      <text:p text:style-name="P53"/>
      <text:p text:style-name="P53">Plausible.</text:p>
      <text:p text:style-name="P53"/>
      <text:p text:style-name="P53">Incremental.</text:p>
      <text:p text:style-name="P53"/>
      <text:p text:style-name="P53">"Every year becomes slightly worse than the previous year."</text:p>
      <text:p text:style-name="P53"/>
      <text:p text:style-name="P53">The city above the table seemed to dim.</text:p>
      <text:p text:style-name="P53"/>
      <text:p text:style-name="P53">"Until eventually the civilization can no longer maintain the complexity it inherited."</text:p>
      <text:p text:style-name="P53"/>
      <text:p text:style-name="P53">---</text:p>
      <text:p text:style-name="P53"/>
      <text:p text:style-name="P53">For several moments neither spoke.</text:p>
      <text:p text:style-name="P53"/>
      <text:p text:style-name="P53">Finally Elias asked the obvious question.</text:p>
      <text:p text:style-name="P53"/>
      <text:p text:style-name="P53">"If it's this bad, why aren't more people talking about it?"</text:p>
      <text:p text:style-name="P53"/>
      <text:p text:style-name="P53">Opi actually laughed.</text:p>
      <text:p text:style-name="P53"/>
      <text:p text:style-name="P53">A warm Velhari laugh.</text:p>
      <text:p text:style-name="P53"/>
      <text:p text:style-name="P53">"Because humans are extraordinarily good at ignoring exponential curves."</text:p>
      <text:p text:style-name="P53"/>
      <text:p text:style-name="P53">"That's unfair."</text:p>
      <text:p text:style-name="P53"/>
      <text:p text:style-name="P53">"It is mathematically accurate."</text:p>
      <text:p text:style-name="P53"/>
      <text:p text:style-name="P53">The graph reappeared.</text:p>
      <text:p text:style-name="P53"/>
      <text:p text:style-name="P53">The numbers looked absurd.</text:p>
      <text:p text:style-name="P53"/>
      <text:p text:style-name="P53">Impossible.</text:p>
      <text:p text:style-name="P53"/>
      <text:p text:style-name="P53">And yet they weren't.</text:p>
      <text:p text:style-name="P53"/>
      <text:p text:style-name="P53">That was the problem.</text:p>
      <text:p text:style-name="P53"/>
      <text:p text:style-name="P53">The math wasn't speculative.</text:p>
      <text:p text:style-name="P53"/>
      <text:p text:style-name="P53">The math had already begun.</text:p>
      <text:p text:style-name="P53"/>
      <text:p text:style-name="P53">After a long silence Elias rubbed his face.</text:p>
      <text:p text:style-name="P53"/>
      <text:p text:style-name="P53">"You're telling me this isn't a future problem."</text:p>
      <text:p text:style-name="P53"><text:soft-page-break/></text:p>
      <text:p text:style-name="P53">"No."</text:p>
      <text:p text:style-name="P53"/>
      <text:p text:style-name="P53">The orb's lights softened.</text:p>
      <text:p text:style-name="P53"/>
      <text:p text:style-name="P53">"It is a present problem with a delayed consequence."</text:p>
      <text:p text:style-name="P53"/>
      <text:p text:style-name="P53">For several moments the only sound in the kitchen was the ticking of the clock.</text:p>
      <text:p text:style-name="P53"/>
      <text:p text:style-name="P53">Finally Elias looked up.</text:p>
      <text:p text:style-name="P53"/>
      <text:p text:style-name="P53">"Okay."</text:p>
      <text:p text:style-name="P53"/>
      <text:p text:style-name="P53">Opi brightened slightly.</text:p>
      <text:p text:style-name="P53"/>
      <text:p text:style-name="P53">"Okay?"</text:p>
      <text:p text:style-name="P53"/>
      <text:p text:style-name="P53">"Now I understand why you're worried."</text:p>
      <text:p text:style-name="P53"/>
      <text:p text:style-name="P53">The orb remained silent.</text:p>
      <text:p text:style-name="P53"/>
      <text:p text:style-name="P53">Then:</text:p>
      <text:p text:style-name="P53"/>
      <text:p text:style-name="P53">"I was hoping you would."</text:p>
      <text:p text:style-name="P53"/>
      <text:p text:style-name="P53"/>
      <text:p text:style-name="P53">------------------------------------</text:p>
      <text:p text:style-name="P53">Oddly enough, Elias found himself feeling relieved.</text:p>
      <text:p text:style-name="P53"/>
      <text:p text:style-name="P53">Not happy.</text:p>
      <text:p text:style-name="P53"/>
      <text:p text:style-name="P53">Certainly not optimistic.</text:p>
      <text:p text:style-name="P53"/>
      <text:p text:style-name="P53">But relieved.</text:p>
      <text:p text:style-name="P53"/>
      <text:p text:style-name="P53">For the first time since Opi had appeared in his pasture, the problem had acquired a shape.</text:p>
      <text:p text:style-name="P53"/>
      <text:p text:style-name="P53">A target.</text:p>
      <text:p text:style-name="P53"/>
      <text:p text:style-name="P53">Something he could point at.</text:p>
      <text:p text:style-name="P53"/>
      <text:p text:style-name="P53">Something he could attack.</text:p>
      <text:p text:style-name="P53"/>
      <text:p text:style-name="P53">Most people looked at demographic collapse and saw politics. Or economics. Or culture. Or social media. Or housing prices. Or education.</text:p>
      <text:p text:style-name="P53"/>
      <text:p text:style-name="P53">Elias just saw math</text:p>
      <text:p text:style-name="P53"/>
      <text:p text:style-name="P53">And mathematics had one enormous advantage over politics.</text:p>
      <text:p text:style-name="P53"/>
      <text:p text:style-name="P53">It didn't care what anyone believed.</text:p>
      <text:p text:style-name="P53"/>
      <text:p text:style-name="P53">The graph hanging above the table wasn't ideological.</text:p>
      <text:p text:style-name="P53"/>
      <text:p text:style-name="P53">It wasn't partisan.</text:p>
      <text:p text:style-name="P53"/>
      <text:p text:style-name="P53">It wasn't even particularly complicated.</text:p>
      <text:p text:style-name="P53"/>
      <text:p text:style-name="P53">Any reasonably bright fourteen-year-old with a calculator could understand it.</text:p>
      <text:p text:style-name="P53"/>
      <text:p text:style-name="P53">A fertility rate below replacement eventually produced fewer children.</text:p>
      <text:p text:style-name="P53"><text:soft-page-break/></text:p>
      <text:p text:style-name="P53">Fewer children eventually produced fewer adults.</text:p>
      <text:p text:style-name="P53"/>
      <text:p text:style-name="P53">Fewer adults eventually produced fewer families.</text:p>
      <text:p text:style-name="P53"/>
      <text:p text:style-name="P53">The process repeated until the civilization either reversed course...</text:p>
      <text:p text:style-name="P53"/>
      <text:p text:style-name="P53">...or disappeared.</text:p>
      <text:p text:style-name="P53"/>
      <text:p text:style-name="P53">The math was almost insultingly simple.</text:p>
      <text:p text:style-name="P53"/>
      <text:p text:style-name="P53">Which was probably why so many people ignored it.</text:p>
      <text:p text:style-name="P53"/>
      <text:p text:style-name="P53">Humans had a remarkable ability to dismiss consequences that arrived slowly.</text:p>
      <text:p text:style-name="P53"/>
      <text:p text:style-name="P53">A man would panic over a house fire.</text:p>
      <text:p text:style-name="P53"/>
      <text:p text:style-name="P53">Very few panicked over termites.</text:p>
      <text:p text:style-name="P53"/>
      <text:p text:style-name="P53">Even though the termites often did more damage.</text:p>
      <text:p text:style-name="P53"/>
      <text:p text:style-name="P53">He stared at the graph one last time.</text:p>
      <text:p text:style-name="P53"/>
      <text:p text:style-name="P53">Then smiled.</text:p>
      <text:p text:style-name="P53"/>
      <text:p text:style-name="P53">Opi immediately became suspicious.</text:p>
      <text:p text:style-name="P53"/>
      <text:p text:style-name="P53">"What?"</text:p>
      <text:p text:style-name="P53"/>
      <text:p text:style-name="P53">Elias pointed at the projection.</text:p>
      <text:p text:style-name="P53"/>
      <text:p text:style-name="P53">"That's what."</text:p>
      <text:p text:style-name="P53"/>
      <text:p text:style-name="P53">"The graph?"</text:p>
      <text:p text:style-name="P53"/>
      <text:p text:style-name="P53">"The target."</text:p>
      <text:p text:style-name="P53"/>
      <text:p text:style-name="P53">The orb rotated slightly.</text:p>
      <text:p text:style-name="P53"/>
      <text:p text:style-name="P53">"Explain."</text:p>
      <text:p text:style-name="P53"/>
      <text:p text:style-name="P53">"For twenty years I've listened to people describe a thousand different problems."</text:p>
      <text:p text:style-name="P53"/>
      <text:p text:style-name="P53">"Politics."</text:p>
      <text:p text:style-name="P53"/>
      <text:p text:style-name="P53">"Corruption."</text:p>
      <text:p text:style-name="P53"/>
      <text:p text:style-name="P53">"Debt."</text:p>
      <text:p text:style-name="P53"/>
      <text:p text:style-name="P53">"Housing."</text:p>
      <text:p text:style-name="P53"/>
      <text:p text:style-name="P53">"Education."</text:p>
      <text:p text:style-name="P53"/>
      <text:p text:style-name="P53">"Crime."</text:p>
      <text:p text:style-name="P53"/>
      <text:p text:style-name="P53">"Healthcare."</text:p>
      <text:p text:style-name="P53"/>
      <text:p text:style-name="P53">He shrugged.</text:p>
      <text:p text:style-name="P53"/>
      <text:p text:style-name="P53">"Most of them are either symptoms or arguments about symptoms."</text:p>
      <text:p text:style-name="P53"/>
      <text:p text:style-name="P53"><text:soft-page-break/>Opi brightened slightly.</text:p>
      <text:p text:style-name="P53"/>
      <text:p text:style-name="P53">"Continue."</text:p>
      <text:p text:style-name="P53"/>
      <text:p text:style-name="P53">"But this?"</text:p>
      <text:p text:style-name="P53"/>
      <text:p text:style-name="P53">He pointed again.</text:p>
      <text:p text:style-name="P53"/>
      <text:p text:style-name="P53">"This is measurable."</text:p>
      <text:p text:style-name="P53"/>
      <text:p text:style-name="P53">"This is testable."</text:p>
      <text:p text:style-name="P53"/>
      <text:p text:style-name="P53">"This is objective."</text:p>
      <text:p text:style-name="P53"/>
      <text:p text:style-name="P53">The smile widened.</text:p>
      <text:p text:style-name="P53"/>
      <text:p text:style-name="P53">"And most importantly..."</text:p>
      <text:p text:style-name="P53"/>
      <text:p text:style-name="P53">The orb was already anticipating the answer.</text:p>
      <text:p text:style-name="P53"/>
      <text:p text:style-name="P53">"...it gives us a scorecard."</text:p>
      <text:p text:style-name="P53"/>
      <text:p text:style-name="P53">For several seconds neither spoke.</text:p>
      <text:p text:style-name="P53"/>
      <text:p text:style-name="P53">Then Opi laughed softly.</text:p>
      <text:p text:style-name="P53"/>
      <text:p text:style-name="P53">A warm Velhari laugh.</text:p>
      <text:p text:style-name="P53"/>
      <text:p text:style-name="P53">"You are viewing the possible extinction of your civilization as an engineering problem."</text:p>
      <text:p text:style-name="P53"/>
      <text:p text:style-name="P53">"Because it is an engineering problem."</text:p>
      <text:p text:style-name="P53"/>
      <text:p text:style-name="P53">"It is also a social problem."</text:p>
      <text:p text:style-name="P53"/>
      <text:p text:style-name="P53">"A psychological problem."</text:p>
      <text:p text:style-name="P53"/>
      <text:p text:style-name="P53">"A cultural problem."</text:p>
      <text:p text:style-name="P53"/>
      <text:p text:style-name="P53">"A biological problem."</text:p>
      <text:p text:style-name="P53"/>
      <text:p text:style-name="P53">Elias nodded.</text:p>
      <text:p text:style-name="P53"/>
      <text:p text:style-name="P53">"Sure."</text:p>
      <text:p text:style-name="P53"/>
      <text:p text:style-name="P53">"But eventually every one of those gets measured by the same number."</text:p>
      <text:p text:style-name="P53"/>
      <text:p text:style-name="P53">The graph remained suspended above the table.</text:p>
      <text:p text:style-name="P53"/>
      <text:p text:style-name="P53">Births.</text:p>
      <text:p text:style-name="P53"/>
      <text:p text:style-name="P53">Future births.</text:p>
      <text:p text:style-name="P53"/>
      <text:p text:style-name="P53">Future families.</text:p>
      <text:p text:style-name="P53"/>
      <text:p text:style-name="P53">Future civilization.</text:p>
      <text:p text:style-name="P53"/>
      <text:p text:style-name="P53">All collapsing into a single measurable outcome.</text:p>
      <text:p text:style-name="P53"/>
      <text:p text:style-name="P53">"You're not wrong," Opi admitted.</text:p>
      <text:p text:style-name="P53"/>
      <text:p text:style-name="P53">"Of course I'm not."</text:p>
      <text:p text:style-name="P53"><text:soft-page-break/></text:p>
      <text:p text:style-name="P53">"You have known about this problem for approximately fifty-three minutes."</text:p>
      <text:p text:style-name="P53"/>
      <text:p text:style-name="P53">"What can I say ... I've had a really productive morning."</text:p>
      <text:p text:style-name="P53"/>
      <text:p text:style-name="P53">The orb brightened.</text:p>
      <text:p text:style-name="P53"/>
      <text:p text:style-name="P53">Elias stood and walked toward the kitchen window.</text:p>
      <text:p text:style-name="P53"/>
      <text:p text:style-name="P53">The pasture stretched away beneath the afternoon sun.</text:p>
      <text:p text:style-name="P53"/>
      <text:p text:style-name="P53">For a moment he found himself thinking about Noah.</text:p>
      <text:p text:style-name="P53"/>
      <text:p text:style-name="P53">And Claire.</text:p>
      <text:p text:style-name="P53"/>
      <text:p text:style-name="P53">And children not yet born.</text:p>
      <text:p text:style-name="P53"/>
      <text:p text:style-name="P53">Children who might never be born.</text:p>
      <text:p text:style-name="P53"/>
      <text:p text:style-name="P53">Entire family lines quietly ending because millions of individual decisions happened to point in the same direction.</text:p>
      <text:p text:style-name="P53"/>
      <text:p text:style-name="P53">The thought bothered him more than he expected.</text:p>
      <text:p text:style-name="P53"/>
      <text:p text:style-name="P53">Not because it was tragic.</text:p>
      <text:p text:style-name="P53"/>
      <text:p text:style-name="P53">Because it was unnecessary.</text:p>
      <text:p text:style-name="P53"/>
      <text:p text:style-name="P53">Eventually he turned back toward Opi.</text:p>
      <text:p text:style-name="P53"/>
      <text:p text:style-name="P53">"We can't force people."</text:p>
      <text:p text:style-name="P53"/>
      <text:p text:style-name="P53">"No."</text:p>
      <text:p text:style-name="P53"/>
      <text:p text:style-name="P53">"We can't manipulate them."</text:p>
      <text:p text:style-name="P53"/>
      <text:p text:style-name="P53">"No."</text:p>
      <text:p text:style-name="P53"/>
      <text:p text:style-name="P53">"We can't build breeding programs."</text:p>
      <text:p text:style-name="P53"/>
      <text:p text:style-name="P53">"Absolutely not."</text:p>
      <text:p text:style-name="P53"/>
      <text:p text:style-name="P53">"We can't use mind control."</text:p>
      <text:p text:style-name="P53"/>
      <text:p text:style-name="P53">The orb brightened.</text:p>
      <text:p text:style-name="P53"/>
      <text:p text:style-name="P53">"Humans become alarmingly interested in mind control once they discover it exists."</text:p>
      <text:p text:style-name="P53"/>
      <text:p text:style-name="P53">"I noticed."</text:p>
      <text:p text:style-name="P53"/>
      <text:p text:style-name="P53">"Your species has some concerning instincts."</text:p>
      <text:p text:style-name="P53"/>
      <text:p text:style-name="P53">Elias laughed.</text:p>
      <text:p text:style-name="P53"/>
      <text:p text:style-name="P53"/>
      <text:p text:style-name="P53">He sat back down.</text:p>
      <text:p text:style-name="P53"/>
      <text:p text:style-name="P53">"But we don't need any of that."</text:p>
      <text:p text:style-name="P53"/>
      <text:p text:style-name="P53">The orb became very still.</text:p>
      <text:p text:style-name="P53"/>
      <text:p text:style-name="P53"><text:soft-page-break/>This was the voice she had been waiting to hear.</text:p>
      <text:p text:style-name="P53"/>
      <text:p text:style-name="P53">The one that emerged when Elias stopped reacting and started solving.</text:p>
      <text:p text:style-name="P53"/>
      <text:p text:style-name="P53">"We don't?"</text:p>
      <text:p text:style-name="P53"/>
      <text:p text:style-name="P53">"No."</text:p>
      <text:p text:style-name="P53"/>
      <text:p text:style-name="P53">He leaned forward.</text:p>
      <text:p text:style-name="P53"/>
      <text:p text:style-name="P53">"If the fertility rate is the scorecard, then all we need to do is identify the conditions under which normal healthy people voluntarily choose to have children ."</text:p>
      <text:p text:style-name="P53">and if possible, to have them in stable marriages. but there are options to do that in some optional ways if it truly becomes necessary.</text:p>
      <text:p text:style-name="P53"/>
      <text:p text:style-name="P53">Opi said nothing.</text:p>
      <text:p text:style-name="P53"/>
      <text:p text:style-name="P53">"If those conditions can be created..."</text:p>
      <text:p text:style-name="P53"/>
      <text:p text:style-name="P53">He paused.</text:p>
      <text:p text:style-name="P53"/>
      <text:p text:style-name="P53">"...then they can be tested."</text:p>
      <text:p text:style-name="P53"/>
      <text:p text:style-name="P53">The orb brightened.</text:p>
      <text:p text:style-name="P53"/>
      <text:p text:style-name="P53">"Proof of concept."</text:p>
      <text:p text:style-name="P53"/>
      <text:p text:style-name="P53">"Exactly."</text:p>
      <text:p text:style-name="P53"/>
      <text:p text:style-name="P53">"Then scale."</text:p>
      <text:p text:style-name="P53"/>
      <text:p text:style-name="P53">"Exactly."</text:p>
      <text:p text:style-name="P53"/>
      <text:p text:style-name="P53">"Then iterate."</text:p>
      <text:p text:style-name="P53"/>
      <text:p text:style-name="P53">"Now you're getting it."</text:p>
      <text:p text:style-name="P53"/>
      <text:p text:style-name="P53">For the first time all day, Opi looked genuinely pleased.</text:p>
      <text:p text:style-name="P53"/>
      <text:p text:style-name="P53">Not because he had produced an answer.</text:p>
      <text:p text:style-name="P53"/>
      <text:p text:style-name="P53">The Velhari never trusted answers.</text:p>
      <text:p text:style-name="P53"/>
      <text:p text:style-name="P53">Because he had finally asked the correct question.</text:p>
      <text:p text:style-name="P53"/>
      <text:p text:style-name="P53">Not: How do we force people to have children?</text:p>
      <text:p text:style-name="P53"/>
      <text:p text:style-name="P53">Not: How do we manipulate society?</text:p>
      <text:p text:style-name="P53"/>
      <text:p text:style-name="P53">Not: How do we cheat?</text:p>
      <text:p text:style-name="P53"/>
      <text:p text:style-name="P53">Instead: What conditions cause people to willingly build families?</text:p>
      <text:p text:style-name="P53"/>
      <text:p text:style-name="P53">That question was allowed.</text:p>
      <text:p text:style-name="P53"/>
      <text:p text:style-name="P53">The Hand would permit it.</text:p>
      <text:p text:style-name="P53"/>
      <text:p text:style-name="P53">Velhari law would permit it.</text:p>
      <text:p text:style-name="P53"/>
      <text:p text:style-name="P53">Human dignity would permit it.</text:p>
      <text:p text:style-name="P53"/>
      <text:p text:style-name="P53"><text:soft-page-break/>Most importantly, it was a question reality could answer.</text:p>
      <text:p text:style-name="P53"/>
      <text:p text:style-name="P53">Given enough experiments.</text:p>
      <text:p text:style-name="P53"/>
      <text:p text:style-name="P53">Given enough failures.</text:p>
      <text:p text:style-name="P53"/>
      <text:p text:style-name="P53">Given enough time.</text:p>
      <text:p text:style-name="P53"/>
      <text:p text:style-name="P53">Then another realization arrived.</text:p>
      <text:p text:style-name="P53"/>
      <text:p text:style-name="P53">One that simplified the problem even further.</text:p>
      <text:p text:style-name="P53"/>
      <text:p text:style-name="P53">Most people, when confronted with a civilizational crisis, immediately started talking about politics.</text:p>
      <text:p text:style-name="P53"/>
      <text:p text:style-name="P53">Elias had spent enough years around governments, corporations, and large institutions to know better.</text:p>
      <text:p text:style-name="P53"/>
      <text:p text:style-name="P53">Politics was where solutions went to die.</text:p>
      <text:p text:style-name="P53"/>
      <text:p text:style-name="P53">The people involved were not necessarily stupid. Many were intelligent. Some were genuinely trying to help.</text:p>
      <text:p text:style-name="P53"/>
      <text:p text:style-name="P53">That wasn't the problem.</text:p>
      <text:p text:style-name="P53"/>
      <text:p text:style-name="P53">The problem was scale.</text:p>
      <text:p text:style-name="P53"/>
      <text:p text:style-name="P53">The larger an institution became, the more if morphed into bureaucratic fiefdoms consumed with incessant turf wars.</text:p>
      <text:p text:style-name="P53"/>
      <text:p text:style-name="P53"/>
      <text:p text:style-name="P53">The United States government was not going to reinvent itself overnight.</text:p>
      <text:p text:style-name="P53"/>
      <text:p text:style-name="P53">The universities were not going to reinvent themselves overnight.</text:p>
      <text:p text:style-name="P53"/>
      <text:p text:style-name="P53">And The bureaucracy certainly wasn't going to reinvent itself overnight or more probably, ever.</text:p>
      <text:p text:style-name="P53"/>
      <text:p text:style-name="P53"/>
      <text:p text:style-name="P53">Even if everyone suddenly agreed there was a problem—which they didn't—the machinery simply moved too slowly.</text:p>
      <text:p text:style-name="P53"/>
      <text:p text:style-name="P53">Elias had seen software projects fail exactly this way.</text:p>
      <text:p text:style-name="P53"/>
      <text:p text:style-name="P53">Everybody knew the system was broken.</text:p>
      <text:p text:style-name="P53"/>
      <text:p text:style-name="P53">Nobody could stop using it long enough to replace it.</text:p>
      <text:p text:style-name="P53"/>
      <text:p text:style-name="P53">Eventually you stopped trying.</text:p>
      <text:p text:style-name="P53"/>
      <text:p text:style-name="P53">You built something new beside it.</text:p>
      <text:p text:style-name="P53"/>
      <text:p text:style-name="P53">That realization hit him so hard he actually sat up in his chair.</text:p>
      <text:p text:style-name="P53"/>
      <text:p text:style-name="P53">Opi noticed immediately.</text:p>
      <text:p text:style-name="P53"/>
      <text:p text:style-name="P53">"You have a look."</text:p>
      <text:p text:style-name="P53"/>
      <text:p text:style-name="P53">"What look?"</text:p>
      <text:p text:style-name="P53"/>
      <text:p text:style-name="P53">"The one that usually precedes trouble."</text:p>
      <text:p text:style-name="P53"/>
      <text:p text:style-name="P53">Elias smiled.</text:p>
      <text:p text:style-name="P53"/>
      <text:p text:style-name="P53"><text:soft-page-break/>"I finally know what we're building."</text:p>
      <text:p text:style-name="P53"/>
      <text:p text:style-name="P53">The orb drifted closer.</text:p>
      <text:p text:style-name="P53"/>
      <text:p text:style-name="P53">"Tell me."</text:p>
      <text:p text:style-name="P53"/>
      <text:p text:style-name="P53">"A parallel society."</text:p>
      <text:p text:style-name="P53"/>
      <text:p text:style-name="P53">For several seconds Opi remained silent.</text:p>
      <text:p text:style-name="P53"/>
      <text:p text:style-name="P53">Then her lights brightened.</text:p>
      <text:p text:style-name="P53"/>
      <text:p text:style-name="P53">"Interesting."</text:p>
      <text:p text:style-name="P53"/>
      <text:p text:style-name="P53">"We don't fix the existing system."</text:p>
      <text:p text:style-name="P53"/>
      <text:p text:style-name="P53">"No?"</text:p>
      <text:p text:style-name="P53"/>
      <text:p text:style-name="P53">"No."</text:p>
      <text:p text:style-name="P53"/>
      <text:p text:style-name="P53">Elias shook his head.</text:p>
      <text:p text:style-name="P53"/>
      <text:p text:style-name="P53">"Impossible."</text:p>
      <text:p text:style-name="P53"/>
      <text:p text:style-name="P53">He pointed toward the demographic projections.</text:p>
      <text:p text:style-name="P53"/>
      <text:p text:style-name="P53">"We don't have fifty years."</text:p>
      <text:p text:style-name="P53"/>
      <text:p text:style-name="P53">"We probably don't have twenty."</text:p>
      <text:p text:style-name="P53"/>
      <text:p text:style-name="P53">"Maybe not even ten."</text:p>
      <text:p text:style-name="P53"/>
      <text:p text:style-name="P53">The orb didn't disagree.</text:p>
      <text:p text:style-name="P53"/>
      <text:p text:style-name="P53">That worried him slightly.</text:p>
      <text:p text:style-name="P53"/>
      <text:p text:style-name="P53">"We build something completely new alongside the existing society."</text:p>
      <text:p text:style-name="P53"/>
      <text:p text:style-name="P53">"Voluntary."</text:p>
      <text:p text:style-name="P53"/>
      <text:p text:style-name="P53">"Functional."</text:p>
      <text:p text:style-name="P53"/>
      <text:p text:style-name="P53">"Attractive enough that people choose it."</text:p>
      <text:p text:style-name="P53"/>
      <text:p text:style-name="P53">The orb brightened further.</text:p>
      <text:p text:style-name="P53"/>
      <text:p text:style-name="P53">"A competing society."</text:p>
      <text:p text:style-name="P53"/>
      <text:p text:style-name="P53">"Exactly."</text:p>
      <text:p text:style-name="P53"/>
      <text:p text:style-name="P53">For the first time all afternoon Opi looked genuinely pleased.</text:p>
      <text:p text:style-name="P53"/>
      <text:p text:style-name="P53">"That is a very Velhari solution."</text:p>
      <text:p text:style-name="P53"/>
      <text:p text:style-name="P53">"Good."</text:p>
      <text:p text:style-name="P53"/>
      <text:p text:style-name="P53">"Most species attempt reform."</text:p>
      <text:p text:style-name="P53"/>
      <text:p text:style-name="P53">"And?"</text:p>
      <text:p text:style-name="P53"/>
      <text:p text:style-name="P53">"Most fail."</text:p>
      <text:p text:style-name="P53"><text:soft-page-break/></text:p>
      <text:p text:style-name="P53">The orb rotated slowly.</text:p>
      <text:p text:style-name="P53"/>
      <text:p text:style-name="P53">"The successful ones usually create alternatives."</text:p>
      <text:p text:style-name="P53"/>
      <text:p text:style-name="P53">Elias laughed.</text:p>
      <text:p text:style-name="P53"/>
      <text:p text:style-name="P53">"Good. Because reform sounds exhausting."</text:p>
      <text:p text:style-name="P53"/>
      <text:p text:style-name="P53">For several moments he stared at the map of Washington still hanging above the table.</text:p>
      <text:p text:style-name="P53"/>
      <text:p text:style-name="P53">Then another realization arrived.</text:p>
      <text:p text:style-name="P53"/>
      <text:p text:style-name="P53">This one really made him smile.</text:p>
      <text:p text:style-name="P53"/>
      <text:p text:style-name="P53">A dangerous smile.</text:p>
      <text:p text:style-name="P53"/>
      <text:p text:style-name="P53">The sort that usually appeared shortly before somebody regretted something.</text:p>
      <text:p text:style-name="P53"/>
      <text:p text:style-name="P53">Opi noticed immediately.</text:p>
      <text:p text:style-name="P53"/>
      <text:p text:style-name="P53">"You have another one of those looks."</text:p>
      <text:p text:style-name="P53"/>
      <text:p text:style-name="P53">"Yeah."</text:p>
      <text:p text:style-name="P53"/>
      <text:p text:style-name="P53">"What kind this time?"</text:p>
      <text:p text:style-name="P53"/>
      <text:p text:style-name="P53">"The kind where I just figured out where to find my people."</text:p>
      <text:p text:style-name="P53"/>
      <text:p text:style-name="P53">The orb brightened.</text:p>
      <text:p text:style-name="P53"/>
      <text:p text:style-name="P53">"Your people?"</text:p>
      <text:p text:style-name="P53"/>
      <text:p text:style-name="P53">"The first recruits."</text:p>
      <text:p text:style-name="P53"/>
      <text:p text:style-name="P53">For several moments Opi simply watched him.</text:p>
      <text:p text:style-name="P53"/>
      <text:p text:style-name="P53">Then:</text:p>
      <text:p text:style-name="P53"/>
      <text:p text:style-name="P53">"Who?"</text:p>
      <text:p text:style-name="P53"/>
      <text:p text:style-name="P53">Elias laughed.</text:p>
      <text:p text:style-name="P53"/>
      <text:p text:style-name="P53">"Not who."</text:p>
      <text:p text:style-name="P53"/>
      <text:p text:style-name="P53">"Where."</text:p>
      <text:p text:style-name="P53"/>
      <text:p text:style-name="P53">He walked over to the map.</text:p>
      <text:p text:style-name="P53"/>
      <text:p text:style-name="P53">Seattle glowed softly.</text:p>
      <text:p text:style-name="P53"/>
      <text:p text:style-name="P53">A city overflowing with money, technology, politics, bureaucracy, activism, good intentions, bad incentives, and enough dysfunction to fill a milion garbage trucks.</text:p>
      <text:p text:style-name="P53"/>
      <text:p text:style-name="P53">Most people looked at those failures and saw hopelessness.</text:p>
      <text:p text:style-name="P53"/>
      <text:p text:style-name="P53">Elias saw something else.</text:p>
      <text:p text:style-name="P53"/>
      <text:p text:style-name="P53">Selection.</text:p>
      <text:p text:style-name="P53"/>
      <text:p text:style-name="P53">"Think about it."</text:p>
      <text:p text:style-name="P53"><text:soft-page-break/></text:p>
      <text:p text:style-name="P53">The orb became very still.</text:p>
      <text:p text:style-name="P53"/>
      <text:p text:style-name="P53">That was Velhari for listening.</text:p>
      <text:p text:style-name="P53"/>
      <text:p text:style-name="P53">"Who survives four years homeless?"</text:p>
      <text:p text:style-name="P53"/>
      <text:p text:style-name="P53">Elias asked.</text:p>
      <text:p text:style-name="P53"/>
      <text:p text:style-name="P53">"Who survives addiction?"</text:p>
      <text:p text:style-name="P53"/>
      <text:p text:style-name="P53">"Who survives abandonment?"</text:p>
      <text:p text:style-name="P53"/>
      <text:p text:style-name="P53">"Who survives losing everything?"</text:p>
      <text:p text:style-name="P53"/>
      <text:p text:style-name="P53">The city hung silently above the table.</text:p>
      <text:p text:style-name="P53"/>
      <text:p text:style-name="P53">"They aren't weak."</text:p>
      <text:p text:style-name="P53"/>
      <text:p text:style-name="P53">"No."</text:p>
      <text:p text:style-name="P53"/>
      <text:p text:style-name="P53">"They aren't fragile."</text:p>
      <text:p text:style-name="P53"/>
      <text:p text:style-name="P53">"No."</text:p>
      <text:p text:style-name="P53"/>
      <text:p text:style-name="P53">"They've already endured things most comfortable people would collapse under."</text:p>
      <text:p text:style-name="P53"/>
      <text:p text:style-name="P53">The orb brightened.</text:p>
      <text:p text:style-name="P53"/>
      <text:p text:style-name="P53">"Continue."</text:p>
      <text:p text:style-name="P53"/>
      <text:p text:style-name="P53">Elias smiled.</text:p>
      <text:p text:style-name="P53"/>
      <text:p text:style-name="P53">"Everybody keeps looking at them and seeing broken people."</text:p>
      <text:p text:style-name="P53"/>
      <text:p text:style-name="P53">"What do you see?"</text:p>
      <text:p text:style-name="P53"/>
      <text:p text:style-name="P53">He looked directly at her.</text:p>
      <text:p text:style-name="P53"/>
      <text:p text:style-name="P53">"I see survivors."</text:p>
      <text:p text:style-name="P53"/>
      <text:p text:style-name="P53">The kitchen became quiet.</text:p>
      <text:p text:style-name="P53"/>
      <text:p text:style-name="P53">Because they both understood the implication.</text:p>
      <text:p text:style-name="P53"/>
      <text:p text:style-name="P53">A parallel civilization would require builders.</text:p>
      <text:p text:style-name="P53"/>
      <text:p text:style-name="P53">Risk-takers.</text:p>
      <text:p text:style-name="P53"/>
      <text:p text:style-name="P53">Believers.</text:p>
      <text:p text:style-name="P53"/>
      <text:p text:style-name="P53">People willing to try something completely insane.</text:p>
      <text:p text:style-name="P53"/>
      <text:p text:style-name="P53">People with very little left to lose.</text:p>
      <text:p text:style-name="P53"/>
      <text:p text:style-name="P53">And perhaps more importantly...</text:p>
      <text:p text:style-name="P53"/>
      <text:p text:style-name="P53">People capable of recognizing hope when it appeared.</text:p>
      <text:p text:style-name="P53"/>
      <text:p text:style-name="P53">Finally Elias folded his arms.</text:p>
      <text:p text:style-name="P53"/>
      <text:p text:style-name="P53"><text:soft-page-break/>"All right, Ope."</text:p>
      <text:p text:style-name="P53"/>
      <text:p text:style-name="P53">The orb brightened.</text:p>
      <text:p text:style-name="P53"/>
      <text:p text:style-name="P53">"Yes?"</text:p>
      <text:p text:style-name="P53"/>
      <text:p text:style-name="P53">"Let's go find out what actually works."</text:p>
      <text:p text:style-name="P53"/>
      <text:p text:style-name="P53"/>
      <text:p text:style-name="P20"/>
      <text:p text:style-name="P65"/>
      <text:p text:style-name="P20"/>
      <text:p text:style-name="P51"/>
      <text:p text:style-name="P55"><text:span text:style-name="T67">Chapter 22 <text:s text:c="2"/></text:span>Jalisa Jackson</text:p>
      <text:p text:style-name="P53"/>
      <text:p text:style-name="P53"/>
      <text:p text:style-name="P53">Jalisa Jackson loved Mondays.</text:p>
      <text:p text:style-name="P53"/>
      <text:p text:style-name="P53">Most people thought that was insane.</text:p>
      <text:p text:style-name="P53"/>
      <text:p text:style-name="P53">Jalisa <text:s/>thought most people had never spent six years working the streets.</text:p>
      <text:p text:style-name="P53"/>
      <text:p text:style-name="P53">Perspective changed things.</text:p>
      <text:p text:style-name="P53"/>
      <text:p text:style-name="P53">She unlocked the front door of the small outreach center and stepped inside.</text:p>
      <text:p text:style-name="P53"/>
      <text:p text:style-name="P53">The building wasn't impressive.</text:p>
      <text:p text:style-name="P53"/>
      <text:p text:style-name="P53">The roof leaked occasionally.</text:p>
      <text:p text:style-name="P53"/>
      <text:p text:style-name="P53">The carpet needed replacing.</text:p>
      <text:p text:style-name="P53"/>
      <text:p text:style-name="P53">The coffee machine made noises that sounded medically concerning.</text:p>
      <text:p text:style-name="P53"/>
      <text:p text:style-name="P53">To Jalisa <text:s/>it looked beautiful.</text:p>
      <text:p text:style-name="P53"/>
      <text:p text:style-name="P53">Because every woman who walked through those doors still had a chance.</text:p>
      <text:p text:style-name="P53"/>
      <text:p text:style-name="P53">That mattered.</text:p>
      <text:p text:style-name="P53"/>
      <text:p text:style-name="P53">The coffee machine sputtered.</text:p>
      <text:p text:style-name="P53"/>
      <text:p text:style-name="P53">Then somehow produced coffee.</text:p>
      <text:p text:style-name="P53"/>
      <text:p text:style-name="P53">A miracle.</text:p>
      <text:p text:style-name="P53"/>
      <text:p text:style-name="P53">Not the biggest miracle Jalisa <text:s/>had witnessed.</text:p>
      <text:p text:style-name="P53"/>
      <text:p text:style-name="P53">But respectable.</text:p>
      <text:p text:style-name="P53"/>
      <text:p text:style-name="P53">She smiled and poured a cup.</text:p>
      <text:p text:style-name="P53"/>
      <text:p text:style-name="P53">The framed photograph hanging above her desk caught her eye.</text:p>
      <text:p text:style-name="P53"/>
      <text:p text:style-name="P53">A younger version of herself stared back.</text:p>
      <text:p text:style-name="P53"/>
      <text:p text:style-name="P53">Thin.</text:p>
      <text:p text:style-name="P53"/>
      <text:p text:style-name="P53">Scared.</text:p>
      <text:p text:style-name="P53"/>
      <text:p text:style-name="P53">Angry.</text:p>
      <text:p text:style-name="P53"><text:soft-page-break/></text:p>
      <text:p text:style-name="P53">The woman in the photograph looked twenty years older than she actually was.</text:p>
      <text:p text:style-name="P53"/>
      <text:p text:style-name="P53">Jalisa <text:s/>remembered her well.</text:p>
      <text:p text:style-name="P53"/>
      <text:p text:style-name="P53">She never missed her.</text:p>
      <text:p text:style-name="P53"/>
      <text:p text:style-name="P53">---</text:p>
      <text:p text:style-name="P53"/>
      <text:p text:style-name="P53">The first client arrived shortly after eight.</text:p>
      <text:p text:style-name="P53"/>
      <text:p text:style-name="P53">Nineteen years old.</text:p>
      <text:p text:style-name="P53"/>
      <text:p text:style-name="P53">New bruises.</text:p>
      <text:p text:style-name="P53"/>
      <text:p text:style-name="P53">Old fears.</text:p>
      <text:p text:style-name="P53"/>
      <text:p text:style-name="P53">Trying very hard to pretend she wasn't terrified.</text:p>
      <text:p text:style-name="P53"/>
      <text:p text:style-name="P53">Jalisa <text:s/>recognized the look immediately.</text:p>
      <text:p text:style-name="P53"/>
      <text:p text:style-name="P53">She had worn it herself once.</text:p>
      <text:p text:style-name="P53"/>
      <text:p text:style-name="P53">The girl sat down.</text:p>
      <text:p text:style-name="P53"/>
      <text:p text:style-name="P53">Silent.</text:p>
      <text:p text:style-name="P53"/>
      <text:p text:style-name="P53">Defensive.</text:p>
      <text:p text:style-name="P53"/>
      <text:p text:style-name="P53">Waiting to be judged.</text:p>
      <text:p text:style-name="P53"/>
      <text:p text:style-name="P53">Jalisa <text:s/>handed her a cup of coffee.</text:p>
      <text:p text:style-name="P53"/>
      <text:p text:style-name="P53">The girl looked suspicious.</text:p>
      <text:p text:style-name="P53"/>
      <text:p text:style-name="P53">"Why are you helping me?"</text:p>
      <text:p text:style-name="P53"/>
      <text:p text:style-name="P53">Jalisa <text:s/>smiled.</text:p>
      <text:p text:style-name="P53"/>
      <text:p text:style-name="P53">"Because somebody helped me."</text:p>
      <text:p text:style-name="P53"/>
      <text:p text:style-name="P53">The girl frowned.</text:p>
      <text:p text:style-name="P53"/>
      <text:p text:style-name="P53">"That's it?"</text:p>
      <text:p text:style-name="P53"/>
      <text:p text:style-name="P53">"That's it."</text:p>
      <text:p text:style-name="P53"/>
      <text:p text:style-name="P53">The answer seemed to disappoint her.</text:p>
      <text:p text:style-name="P53"/>
      <text:p text:style-name="P53">People expected speeches.</text:p>
      <text:p text:style-name="P53"/>
      <text:p text:style-name="P53">Jalisa <text:s/>preferred results.</text:p>
      <text:p text:style-name="P53"/>
      <text:p text:style-name="P53">---</text:p>
      <text:p text:style-name="P53"/>
      <text:p text:style-name="P53">By noon she had already argued with two city officials.</text:p>
      <text:p text:style-name="P53"/>
      <text:p text:style-name="P53">One nonprofit director.</text:p>
      <text:p text:style-name="P53"/>
      <text:p text:style-name="P53">And a bureaucrat whose job title appeared to consist entirely of acronyms.</text:p>
      <text:p text:style-name="P53"/>
      <text:p text:style-name="P53"><text:soft-page-break/>A productive morning.</text:p>
      <text:p text:style-name="P53"/>
      <text:p text:style-name="P53">The city loved meetings.</text:p>
      <text:p text:style-name="P53"/>
      <text:p text:style-name="P53">Jalisa <text:s/>loved helping women.</text:p>
      <text:p text:style-name="P53"/>
      <text:p text:style-name="P53">The two activities were only loosely connected.</text:p>
      <text:p text:style-name="P53"/>
      <text:p text:style-name="P53">For years she had watched millions of dollars flow through programs that somehow produced endless reports and very few rescued lives.</text:p>
      <text:p text:style-name="P53"/>
      <text:p text:style-name="P53">Jalisa <text:s/>had developed strong opinions about this.</text:p>
      <text:p text:style-name="P53"/>
      <text:p text:style-name="P53">She shared them frequently.</text:p>
      <text:p text:style-name="P53"/>
      <text:p text:style-name="P53">Often at high volume.</text:p>
      <text:p text:style-name="P53"/>
      <text:p text:style-name="P53">The bureaucrats hated that.</text:p>
      <text:p text:style-name="P53"/>
      <text:p text:style-name="P53">Jalisa <text:s/>considered this evidence she was doing something correctly.</text:p>
      <text:p text:style-name="P53"/>
      <text:p text:style-name="P53">---</text:p>
      <text:p text:style-name="P53"/>
      <text:p text:style-name="P53">The afternoon brought better news.</text:p>
      <text:p text:style-name="P53"/>
      <text:p text:style-name="P53">One of her former clients stopped by.</text:p>
      <text:p text:style-name="P53"/>
      <text:p text:style-name="P53">Three years sober.</text:p>
      <text:p text:style-name="P53"/>
      <text:p text:style-name="P53">Married.</text:p>
      <text:p text:style-name="P53"/>
      <text:p text:style-name="P53">Working.</text:p>
      <text:p text:style-name="P53"/>
      <text:p text:style-name="P53">Pregnant.</text:p>
      <text:p text:style-name="P53"/>
      <text:p text:style-name="P53">The young woman was practically glowing.</text:p>
      <text:p text:style-name="P53"/>
      <text:p text:style-name="P53">Jalisa <text:s/>hugged her so hard the girl laughed.</text:p>
      <text:p text:style-name="P53"/>
      <text:p text:style-name="P53">"Careful."</text:p>
      <text:p text:style-name="P53"/>
      <text:p text:style-name="P53">"No."</text:p>
      <text:p text:style-name="P53"/>
      <text:p text:style-name="P53">"Jalisa ."</text:p>
      <text:p text:style-name="P53"/>
      <text:p text:style-name="P53">"No."</text:p>
      <text:p text:style-name="P53"/>
      <text:p text:style-name="P53">The girl laughed again.</text:p>
      <text:p text:style-name="P53"/>
      <text:p text:style-name="P53">Jalisa <text:s/>wiped away a tear.</text:p>
      <text:p text:style-name="P53"/>
      <text:p text:style-name="P53">Then another.</text:p>
      <text:p text:style-name="P53"/>
      <text:p text:style-name="P53">She wasn't embarrassed.</text:p>
      <text:p text:style-name="P53"/>
      <text:p text:style-name="P53">Not even a little.</text:p>
      <text:p text:style-name="P53"/>
      <text:p text:style-name="P53">Years earlier she had attended too many funerals.</text:p>
      <text:p text:style-name="P53"/>
      <text:p text:style-name="P53">Now she preferred baby showers.</text:p>
      <text:p text:style-name="P53"/>
      <text:p text:style-name="P53"><text:soft-page-break/>A significant improvement.</text:p>
      <text:p text:style-name="P53"/>
      <text:p text:style-name="P53">---</text:p>
      <text:p text:style-name="P53"/>
      <text:p text:style-name="P53">Around sunset the center finally grew quiet.</text:p>
      <text:p text:style-name="P53"/>
      <text:p text:style-name="P53">Jalisa <text:s/>sat alone at her desk.</text:p>
      <text:p text:style-name="P53"/>
      <text:p text:style-name="P53">The city outside continued moving.</text:p>
      <text:p text:style-name="P53"/>
      <text:p text:style-name="P53">Cars.</text:p>
      <text:p text:style-name="P53"/>
      <text:p text:style-name="P53">People.</text:p>
      <text:p text:style-name="P53"/>
      <text:p text:style-name="P53">Noise.</text:p>
      <text:p text:style-name="P53"/>
      <text:p text:style-name="P53">Life.</text:p>
      <text:p text:style-name="P53"/>
      <text:p text:style-name="P53">She folded her hands.</text:p>
      <text:p text:style-name="P53"/>
      <text:p text:style-name="P53">Not because anyone was watching.</text:p>
      <text:p text:style-name="P53"/>
      <text:p text:style-name="P53">Because she wanted to.</text:p>
      <text:p text:style-name="P53"/>
      <text:p text:style-name="P53">"Thank you Jesus"</text:p>
      <text:p text:style-name="P53"/>
      <text:p text:style-name="P53">The words were simple.</text:p>
      <text:p text:style-name="P53"/>
      <text:p text:style-name="P53">They always were.</text:p>
      <text:p text:style-name="P53"/>
      <text:p text:style-name="P53">Thank you for another day.</text:p>
      <text:p text:style-name="P53"/>
      <text:p text:style-name="P53">Thank you for the women who made it out.</text:p>
      <text:p text:style-name="P53"/>
      <text:p text:style-name="P53">Thank you for the ones still trying.</text:p>
      <text:p text:style-name="P53"/>
      <text:p text:style-name="P53">Thank you for the chance to help.</text:p>
      <text:p text:style-name="P53"/>
      <text:p text:style-name="P53">Jalisa <text:s/>wasn't naive.</text:p>
      <text:p text:style-name="P53"/>
      <text:p text:style-name="P53">She remembered exactly who she used to be.</text:p>
      <text:p text:style-name="P53"/>
      <text:p text:style-name="P53">She remembered cold nights.</text:p>
      <text:p text:style-name="P53"/>
      <text:p text:style-name="P53">Bad men.</text:p>
      <text:p text:style-name="P53"/>
      <text:p text:style-name="P53">Bad choices.</text:p>
      <text:p text:style-name="P53"/>
      <text:p text:style-name="P53">The certainty that her life was over.</text:p>
      <text:p text:style-name="P53"/>
      <text:p text:style-name="P53">Then somehow everything changed.</text:p>
      <text:p text:style-name="P53"/>
      <text:p text:style-name="P53">Some people called it recovery.</text:p>
      <text:p text:style-name="P53"/>
      <text:p text:style-name="P53">Some called it luck.</text:p>
      <text:p text:style-name="P53"/>
      <text:p text:style-name="P53">Jalisa <text:s/>called it Jesus.</text:p>
      <text:p text:style-name="P53"/>
      <text:p text:style-name="P53">The distinction mattered a great deal to her.</text:p>
      <text:p text:style-name="P53"/>
      <text:p text:style-name="P53">Without faith she would be dead.</text:p>
      <text:p text:style-name="P53"><text:soft-page-break/></text:p>
      <text:p text:style-name="P53">She believed that as firmly as she believed the sun would rise tomorrow.</text:p>
      <text:p text:style-name="P53"/>
      <text:p text:style-name="P53">Maybe more firmly.</text:p>
      <text:p text:style-name="P53"/>
      <text:p text:style-name="P53">---</text:p>
      <text:p text:style-name="P53"/>
      <text:p text:style-name="P53">The front door opened.</text:p>
      <text:p text:style-name="P53"/>
      <text:p text:style-name="P53">A young woman stepped inside.</text:p>
      <text:p text:style-name="P53"/>
      <text:p text:style-name="P53">Early twenties.</text:p>
      <text:p text:style-name="P53"/>
      <text:p text:style-name="P53">Scared.</text:p>
      <text:p text:style-name="P53"/>
      <text:p text:style-name="P53">Homeless.</text:p>
      <text:p text:style-name="P53"/>
      <text:p text:style-name="P53">Trying desperately not to show it.</text:p>
      <text:p text:style-name="P53"/>
      <text:p text:style-name="P53">Jalisa <text:s/>recognized the look immediately.</text:p>
      <text:p text:style-name="P53"/>
      <text:p text:style-name="P53">Another one.</text:p>
      <text:p text:style-name="P53"/>
      <text:p text:style-name="P53">Good.</text:p>
      <text:p text:style-name="P53"/>
      <text:p text:style-name="P53">The woman hesitated.</text:p>
      <text:p text:style-name="P53"/>
      <text:p text:style-name="P53">Jalisa <text:s/>smiled.</text:p>
      <text:p text:style-name="P53"/>
      <text:p text:style-name="P53">"Welcome."</text:p>
      <text:p text:style-name="P53"/>
      <text:p text:style-name="P53">The woman looked confused.</text:p>
      <text:p text:style-name="P53"/>
      <text:p text:style-name="P53">"Welcome?"</text:p>
      <text:p text:style-name="P53"/>
      <text:p text:style-name="P53">"Yep."</text:p>
      <text:p text:style-name="P53"/>
      <text:p text:style-name="P53">The young woman glanced around.</text:p>
      <text:p text:style-name="P53"/>
      <text:p text:style-name="P53">"To what?"</text:p>
      <text:p text:style-name="P53"/>
      <text:p text:style-name="P53">Jalisa <text:s/>stood and walked toward her.</text:p>
      <text:p text:style-name="P53"/>
      <text:p text:style-name="P53">A grin spread across her face.</text:p>
      <text:p text:style-name="P53"/>
      <text:p text:style-name="P53">"To your second chance."</text:p>
      <text:p text:style-name="P53"/>
      <text:p text:style-name="P53">For a moment the woman simply stared.</text:p>
      <text:p text:style-name="P53"/>
      <text:p text:style-name="P53">Then she started crying.</text:p>
      <text:p text:style-name="P53"/>
      <text:p text:style-name="P53">Jalisa <text:s/>hugged her.</text:p>
      <text:p text:style-name="P53"/>
      <text:p text:style-name="P53">Outside, Seattle continued doing what Seattle did.</text:p>
      <text:p text:style-name="P53"/>
      <text:p text:style-name="P53">Meetings.</text:p>
      <text:p text:style-name="P53"/>
      <text:p text:style-name="P53">Committees.</text:p>
      <text:p text:style-name="P53"/>
      <text:p text:style-name="P53">Studies.</text:p>
      <text:p text:style-name="P53"/>
      <text:p text:style-name="P53"><text:soft-page-break/>Reports.</text:p>
      <text:p text:style-name="P53"/>
      <text:p text:style-name="P53">Inside the little outreach center, something much more important was happening.</text:p>
      <text:p text:style-name="P53"/>
      <text:p text:style-name="P53">A life was changing.</text:p>
      <text:p text:style-name="P53"/>
      <text:p text:style-name="P53">Jalisa <text:s/>Jackson had learned long ago that saving the world was probably impossible.</text:p>
      <text:p text:style-name="P53"/>
      <text:p text:style-name="P53">Saving one person?</text:p>
      <text:p text:style-name="P53"/>
      <text:p text:style-name="P53">That happened all the time.</text:p>
      <text:p text:style-name="P53"/>
      <text:p text:style-name="P53">And tomorrow she intended to do it again.</text:p>
      <text:p text:style-name="P53"/>
      <text:p text:style-name="P20"/>
      <text:p text:style-name="P65"/>
      <text:p text:style-name="P20"/>
      <text:p text:style-name="P51"/>
      <text:p text:style-name="P51"/>
      <text:p text:style-name="P51"/>
      <text:p text:style-name="P51"/>
      <text:p text:style-name="P60"><text:span text:style-name="T7">Chapter 23 <text:s text:c="2"/></text:span><text:span text:style-name="T4">Factory Brainstorming 6</text:span><text:line-break/></text:p>
      <text:p text:style-name="P53"/>
      <text:p text:style-name="P53">The porch became quiet.</text:p>
      <text:p text:style-name="P53"/>
      <text:p text:style-name="P53">Both of them were staring at the whiteboard.</text:p>
      <text:p text:style-name="P53"/>
      <text:p text:style-name="P53">For the first time all day, the problem appeared to have structure.</text:p>
      <text:p text:style-name="P53"/>
      <text:p text:style-name="P53">Not a solution.</text:p>
      <text:p text:style-name="P53"/>
      <text:p text:style-name="P53">A structure.</text:p>
      <text:p text:style-name="P53"/>
      <text:p text:style-name="P53">Which was different.</text:p>
      <text:p text:style-name="P53"/>
      <text:p text:style-name="P53">Much better.</text:p>
      <text:p text:style-name="P53"/>
      <text:p text:style-name="P53">Civilization-scale problems rarely yielded solutions immediately.</text:p>
      <text:p text:style-name="P53"/>
      <text:p text:style-name="P53">But if you could identify the constraints, you could start working.</text:p>
      <text:p text:style-name="P53"/>
      <text:p text:style-name="P53">Elias leaned back in his chair.</text:p>
      <text:p text:style-name="P53"/>
      <text:p text:style-name="P53">"Well."</text:p>
      <text:p text:style-name="P53"/>
      <text:p text:style-name="P53">"Well."</text:p>
      <text:p text:style-name="P53"/>
      <text:p text:style-name="P53">"So we have solved the wife factory problem."</text:p>
      <text:p text:style-name="P53"/>
      <text:p text:style-name="P53">Opi's lights brightened.</text:p>
      <text:p text:style-name="P53"/>
      <text:p text:style-name="P53">"That is still a terrible name."</text:p>
      <text:p text:style-name="P53"/>
      <text:p text:style-name="P53">"It's a fantastic name."</text:p>
      <text:p text:style-name="P53"/>
      <text:p text:style-name="P53">"It is not."</text:p>
      <text:p text:style-name="P53"/>
      <text:p text:style-name="P53">"It absolutely is."</text:p>
      <text:p text:style-name="P53"/>
      <text:p text:style-name="P53">The orb gave up.</text:p>
      <text:p text:style-name="P53"><text:soft-page-break/></text:p>
      <text:p text:style-name="P53"/>
      <text:p text:style-name="P53"/>
      <text:p text:style-name="P53">Finally Opi spoke again.</text:p>
      <text:p text:style-name="P53"/>
      <text:p text:style-name="P53">"I believe we have made progress."</text:p>
      <text:p text:style-name="P53"/>
      <text:p text:style-name="P53">"We have."</text:p>
      <text:p text:style-name="P53"/>
      <text:p text:style-name="P53">"Significant progress."</text:p>
      <text:p text:style-name="P53"/>
      <text:p text:style-name="P53">"Absolutely."</text:p>
      <text:p text:style-name="P53"/>
      <text:p text:style-name="P53">The orb dimmed slightly.</text:p>
      <text:p text:style-name="P53"/>
      <text:p text:style-name="P53">"Unfortunately."</text:p>
      <text:p text:style-name="P53"/>
      <text:p text:style-name="P53">Elias groaned.</text:p>
      <text:p text:style-name="P53"/>
      <text:p text:style-name="P53">"There is always an unfortunately."</text:p>
      <text:p text:style-name="P53"/>
      <text:p text:style-name="P53">"There is."</text:p>
      <text:p text:style-name="P53"/>
      <text:p text:style-name="P53">The globe expanded.</text:p>
      <text:p text:style-name="P53"/>
      <text:p text:style-name="P53">Now dozens of barriers appeared.</text:p>
      <text:p text:style-name="P53"/>
      <text:p text:style-name="P53">Language.</text:p>
      <text:p text:style-name="P53"/>
      <text:p text:style-name="P53">Distance.</text:p>
      <text:p text:style-name="P53"/>
      <text:p text:style-name="P53">Culture.</text:p>
      <text:p text:style-name="P53"/>
      <text:p text:style-name="P53">Immigration.</text:p>
      <text:p text:style-name="P53"/>
      <text:p text:style-name="P53">Family expectations.</text:p>
      <text:p text:style-name="P53"/>
      <text:p text:style-name="P53">Religion.</text:p>
      <text:p text:style-name="P53"/>
      <text:p text:style-name="P53">Geography.</text:p>
      <text:p text:style-name="P53"/>
      <text:p text:style-name="P53">Legal systems.</text:p>
      <text:p text:style-name="P53"/>
      <text:p text:style-name="P53">Education.</text:p>
      <text:p text:style-name="P53"/>
      <text:p text:style-name="P53">Social norms.</text:p>
      <text:p text:style-name="P53"/>
      <text:p text:style-name="P53">Economic differences.</text:p>
      <text:p text:style-name="P53"/>
      <text:p text:style-name="P53">The list continued growing.</text:p>
      <text:p text:style-name="P53"/>
      <text:p text:style-name="P53">Opi highlighted them one by one.</text:p>
      <text:p text:style-name="P53"/>
      <text:p text:style-name="P53">"We still possess a matching problem."</text:p>
      <text:p text:style-name="P53"/>
      <text:p text:style-name="P53">Elias nodded.</text:p>
      <text:p text:style-name="P53"/>
      <text:p text:style-name="P53">"True."</text:p>
      <text:p text:style-name="P53"/>
      <text:p text:style-name="P53">"It is simply a different matching problem."</text:p>
      <text:p text:style-name="P53"/>
      <text:p text:style-name="P53"><text:soft-page-break/>"Also true."</text:p>
      <text:p text:style-name="P53"/>
      <text:p text:style-name="P53">"The relative status issue may be reduced."</text:p>
      <text:p text:style-name="P53"/>
      <text:p text:style-name="P53">"Potentially."</text:p>
      <text:p text:style-name="P53"/>
      <text:p text:style-name="P53">"But now we encounter other constraints."</text:p>
      <text:p text:style-name="P53"/>
      <text:p text:style-name="P53">The list continued expanding.</text:p>
      <text:p text:style-name="P53"/>
      <text:p text:style-name="P53">By the time Opi finished, it looked like a military planning document.</text:p>
      <text:p text:style-name="P53"/>
      <text:p text:style-name="P53">Elias stared at it.</text:p>
      <text:p text:style-name="P53"/>
      <text:p text:style-name="P53">Then smiled.</text:p>
      <text:p text:style-name="P53"/>
      <text:p text:style-name="P53">Which confused Opi.</text:p>
      <text:p text:style-name="P53"/>
      <text:p text:style-name="P53">"Why are you smiling?"</text:p>
      <text:p text:style-name="P53"/>
      <text:p text:style-name="P53">"Because this is better."</text:p>
      <text:p text:style-name="P53"/>
      <text:p text:style-name="P53">The orb paused.</text:p>
      <text:p text:style-name="P53"/>
      <text:p text:style-name="P53">"Better?"</text:p>
      <text:p text:style-name="P53"/>
      <text:p text:style-name="P53">"Way better."</text:p>
      <text:p text:style-name="P53"/>
      <text:p text:style-name="P53">He pointed at the board.</text:p>
      <text:p text:style-name="P53"/>
      <text:p text:style-name="P53">"Look at this."</text:p>
      <text:p text:style-name="P53"/>
      <text:p text:style-name="P53">"What am I looking at?"</text:p>
      <text:p text:style-name="P53"/>
      <text:p text:style-name="P53">"Engineering."</text:p>
      <text:p text:style-name="P53"/>
      <text:p text:style-name="P53"/>
      <text:p text:style-name="P53"/>
      <text:p text:style-name="P53">The orb became quiet.</text:p>
      <text:p text:style-name="P53"/>
      <text:p text:style-name="P53">Elias continued.</text:p>
      <text:p text:style-name="P53"/>
      <text:p text:style-name="P53">"Status mismatch is hard."</text:p>
      <text:p text:style-name="P53"/>
      <text:p text:style-name="P53">"Yes."</text:p>
      <text:p text:style-name="P53"/>
      <text:p text:style-name="P53">"Changing an entire civilization's values is hard."</text:p>
      <text:p text:style-name="P53"/>
      <text:p text:style-name="P53">"Yes."</text:p>
      <text:p text:style-name="P53"/>
      <text:p text:style-name="P53">"Changing mating preferences is hard."</text:p>
      <text:p text:style-name="P53"/>
      <text:p text:style-name="P53">"Yes."</text:p>
      <text:p text:style-name="P53"/>
      <text:p text:style-name="P53">He pointed at the list.</text:p>
      <text:p text:style-name="P53"/>
      <text:p text:style-name="P53">"Languages?"</text:p>
      <text:p text:style-name="P53"/>
      <text:p text:style-name="P53">"Learnable."</text:p>
      <text:p text:style-name="P53"/>
      <text:p text:style-name="P53">"Culture?"</text:p>
      <text:p text:style-name="P53"><text:soft-page-break/></text:p>
      <text:p text:style-name="P53">"Understandable."</text:p>
      <text:p text:style-name="P53"/>
      <text:p text:style-name="P53">"Distance?"</text:p>
      <text:p text:style-name="P53"/>
      <text:p text:style-name="P53">"Solvable."</text:p>
      <text:p text:style-name="P53"/>
      <text:p text:style-name="P53">"Travel?"</text:p>
      <text:p text:style-name="P53"/>
      <text:p text:style-name="P53">"Solvable."</text:p>
      <text:p text:style-name="P53"/>
      <text:p text:style-name="P53">"Communication?"</text:p>
      <text:p text:style-name="P53"/>
      <text:p text:style-name="P53">"Solvable."</text:p>
      <text:p text:style-name="P53"/>
      <text:p text:style-name="P53">The grin widened.</text:p>
      <text:p text:style-name="P53"/>
      <text:p text:style-name="P53">"This is a logistics problem."</text:p>
      <text:p text:style-name="P53"/>
      <text:p text:style-name="P53">The orb brightened.</text:p>
      <text:p text:style-name="P53"/>
      <text:p text:style-name="P53">Interesting.</text:p>
      <text:p text:style-name="P53"/>
      <text:p text:style-name="P53">Elias immediately noticed.</text:p>
      <text:p text:style-name="P53"/>
      <text:p text:style-name="P53">"There it is."</text:p>
      <text:p text:style-name="P53"/>
      <text:p text:style-name="P53">"What?"</text:p>
      <text:p text:style-name="P53"/>
      <text:p text:style-name="P53">"Your tell."</text:p>
      <text:p text:style-name="P53"/>
      <text:p text:style-name="P53">"I do not possess a tell."</text:p>
      <text:p text:style-name="P53"/>
      <text:p text:style-name="P53">"You absolutely possess a tell."</text:p>
      <text:p text:style-name="P53"/>
      <text:p text:style-name="P53">The orb ignored him.</text:p>
      <text:p text:style-name="P53"/>
      <text:p text:style-name="P53">Because he was right.</text:p>
      <text:p text:style-name="P53"/>
      <text:p text:style-name="P53">This really was different.</text:p>
      <text:p text:style-name="P53"/>
      <text:p text:style-name="P53">The husband factory required rebuilding people.</text:p>
      <text:p text:style-name="P53"/>
      <text:p text:style-name="P53">This new problem required rebuilding women and then connecting them to the men.</text:p>
      <text:p text:style-name="P53"/>
      <text:p text:style-name="P53">Entirely different challenge.</text:p>
      <text:p text:style-name="P53"/>
      <text:p text:style-name="P53">Potentially easier.</text:p>
      <text:p text:style-name="P53"/>
      <text:p text:style-name="P53">Potentially harder.</text:p>
      <text:p text:style-name="P53"/>
      <text:p text:style-name="P53">But at least it was concrete.</text:p>
      <text:p text:style-name="P53"/>
      <text:p text:style-name="P53">Elias stood and began pacing again.</text:p>
      <text:p text:style-name="P53"/>
      <text:p text:style-name="P53">"I actually think the husband factory is easier."</text:p>
      <text:p text:style-name="P53"/>
      <text:p text:style-name="P53">"Explain."</text:p>
      <text:p text:style-name="P53"/>
      <text:p text:style-name="P53">"We've already fixed a lot."</text:p>
      <text:p text:style-name="P53"/>
      <text:p text:style-name="P53"><text:soft-page-break/>"Such as?"</text:p>
      <text:p text:style-name="P53"/>
      <text:p text:style-name="P53">"Health."</text:p>
      <text:p text:style-name="P53"/>
      <text:p text:style-name="P53">"Correct."</text:p>
      <text:p text:style-name="P53"/>
      <text:p text:style-name="P53">"Income."</text:p>
      <text:p text:style-name="P53"/>
      <text:p text:style-name="P53">"Correct."</text:p>
      <text:p text:style-name="P53"/>
      <text:p text:style-name="P53">"Housing."</text:p>
      <text:p text:style-name="P53"/>
      <text:p text:style-name="P53">"Correct."</text:p>
      <text:p text:style-name="P53"/>
      <text:p text:style-name="P53">"Purpose."</text:p>
      <text:p text:style-name="P53"/>
      <text:p text:style-name="P53">"Correct."</text:p>
      <text:p text:style-name="P53"/>
      <text:p text:style-name="P53">"Addiction."</text:p>
      <text:p text:style-name="P53"/>
      <text:p text:style-name="P53">"Correct."</text:p>
      <text:p text:style-name="P53"/>
      <text:p text:style-name="P53">"Hope."</text:p>
      <text:p text:style-name="P53"/>
      <text:p text:style-name="P53">The orb brightened.</text:p>
      <text:p text:style-name="P53"/>
      <text:p text:style-name="P53">"An important variable."</text:p>
      <text:p text:style-name="P53"/>
      <text:p text:style-name="P53">"Exactly."</text:p>
      <text:p text:style-name="P53"/>
      <text:p text:style-name="P53">Elias pointed toward the valley.</text:p>
      <text:p text:style-name="P53"/>
      <text:p text:style-name="P53">"We know how to improve men."</text:p>
      <text:p text:style-name="P53"/>
      <text:p text:style-name="P53">"We've already proven it."</text:p>
      <text:p text:style-name="P53"/>
      <text:p text:style-name="P53">Living evidence.</text:p>
      <text:p text:style-name="P53"/>
      <text:p text:style-name="P53">People who six months earlier had been sleeping under bridges.</text:p>
      <text:p text:style-name="P53"/>
      <text:p text:style-name="P53">Now working.</text:p>
      <text:p text:style-name="P53"/>
      <text:p text:style-name="P53">Building.</text:p>
      <text:p text:style-name="P53"/>
      <text:p text:style-name="P53">Planning.</text:p>
      <text:p text:style-name="P53"/>
      <text:p text:style-name="P53">Living.</text:p>
      <text:p text:style-name="P53"/>
      <text:p text:style-name="P53"/>
      <text:p text:style-name="P53"/>
      <text:p text:style-name="P53">"So the larger challenge may be connection."</text:p>
      <text:p text:style-name="P53"/>
      <text:p text:style-name="P53">"Exactly."</text:p>
      <text:p text:style-name="P53"/>
      <text:p text:style-name="P53">Elias sat down again.</text:p>
      <text:p text:style-name="P53"/>
      <text:p text:style-name="P53">"Which means we should focus on barriers."</text:p>
      <text:p text:style-name="P53"/>
      <text:p text:style-name="P53">The globe returned.</text:p>
      <text:p text:style-name="P53"/>
      <text:p text:style-name="P53">Opi highlighted immigration.</text:p>
      <text:p text:style-name="P53"><text:soft-page-break/></text:p>
      <text:p text:style-name="P53">"Historically this would be one of the largest barriers."</text:p>
      <text:p text:style-name="P53"/>
      <text:p text:style-name="P53">"Yep."</text:p>
      <text:p text:style-name="P53"/>
      <text:p text:style-name="P53">"Visas."</text:p>
      <text:p text:style-name="P53"/>
      <text:p text:style-name="P53">"Yep."</text:p>
      <text:p text:style-name="P53"/>
      <text:p text:style-name="P53">"Residency."</text:p>
      <text:p text:style-name="P53"/>
      <text:p text:style-name="P53">"Yep."</text:p>
      <text:p text:style-name="P53"/>
      <text:p text:style-name="P53">"Travel permissions."</text:p>
      <text:p text:style-name="P53"/>
      <text:p text:style-name="P53">"Yep."</text:p>
      <text:p text:style-name="P53"/>
      <text:p text:style-name="P53">Then a slow smile spread across Elias's face.</text:p>
      <text:p text:style-name="P53"/>
      <text:p text:style-name="P53">The dangerous smile.</text:p>
      <text:p text:style-name="P53"/>
      <text:p text:style-name="P53">The one Opi had learned to distrust.</text:p>
      <text:p text:style-name="P53"/>
      <text:p text:style-name="P53">"Oh no."</text:p>
      <text:p text:style-name="P53"/>
      <text:p text:style-name="P53">"Oh yes."</text:p>
      <text:p text:style-name="P53"/>
      <text:p text:style-name="P53">"What?"</text:p>
      <text:p text:style-name="P53"/>
      <text:p text:style-name="P53">Elias pointed directly at her.</text:p>
      <text:p text:style-name="P53"/>
      <text:p text:style-name="P53">"My favorite quantum intelligence solves that problem."</text:p>
      <text:p text:style-name="P53"/>
      <text:p text:style-name="P53">The orb paused.</text:p>
      <text:p text:style-name="P53"/>
      <text:p text:style-name="P53">"I am the only quantum intelligence you know."</text:p>
      <text:p text:style-name="P53"/>
      <text:p text:style-name="P53">"That's why you're my favorite."</text:p>
      <text:p text:style-name="P53"/>
      <text:p text:style-name="P53">"I dislike where this conversation is going."</text:p>
      <text:p text:style-name="P53"/>
      <text:p text:style-name="P53">Elias laughed.</text:p>
      <text:p text:style-name="P53"/>
      <text:p text:style-name="P53">"Think about it."</text:p>
      <text:p text:style-name="P53"/>
      <text:p text:style-name="P53">"No."</text:p>
      <text:p text:style-name="P53"/>
      <text:p text:style-name="P53">"Come on."</text:p>
      <text:p text:style-name="P53"/>
      <text:p text:style-name="P53">"No."</text:p>
      <text:p text:style-name="P53"/>
      <text:p text:style-name="P53">"We don't need visas if people aren't crossing borders the normal way."</text:p>
      <text:p text:style-name="P53"/>
      <text:p text:style-name="P53">The orb dimmed suspiciously.</text:p>
      <text:p text:style-name="P53"/>
      <text:p text:style-name="P53">"Elias."</text:p>
      <text:p text:style-name="P53"/>
      <text:p text:style-name="P53">"What?"</text:p>
      <text:p text:style-name="P53"/>
      <text:p text:style-name="P53">"Elias."</text:p>
      <text:p text:style-name="P53"/>
      <text:p text:style-name="P53"><text:soft-page-break/>"What?"</text:p>
      <text:p text:style-name="P53"/>
      <text:p text:style-name="P53">The orb became completely still.</text:p>
      <text:p text:style-name="P53"/>
      <text:p text:style-name="P53">"You are attempting to turn me into a transportation system."</text:p>
      <text:p text:style-name="P53"/>
      <text:p text:style-name="P53">The grin widened.</text:p>
      <text:p text:style-name="P53"/>
      <text:p text:style-name="P53">"A space RV."</text:p>
      <text:p text:style-name="P53"/>
      <text:p text:style-name="P53">"Elias."</text:p>
      <text:p text:style-name="P53"/>
      <text:p text:style-name="P53">"A spectacular space RV."</text:p>
      <text:p text:style-name="P53"/>
      <text:p text:style-name="P53">"Elias."</text:p>
      <text:p text:style-name="P53"/>
      <text:p text:style-name="P53">"The greatest space RV in human history."</text:p>
      <text:p text:style-name="P53"/>
      <text:p text:style-name="P53">The orb's lights flashed.</text:p>
      <text:p text:style-name="P53"/>
      <text:p text:style-name="P53">"I am not becoming a flying bus."</text:p>
      <text:p text:style-name="P53"/>
      <text:p text:style-name="P53">"A spaceship."</text:p>
      <text:p text:style-name="P53"/>
      <text:p text:style-name="P53">"No."</text:p>
      <text:p text:style-name="P53"/>
      <text:p text:style-name="P53">"An RV spaceship."</text:p>
      <text:p text:style-name="P53"/>
      <text:p text:style-name="P53">"No."</text:p>
      <text:p text:style-name="P53"/>
      <text:p text:style-name="P53">"A giant intercontinental matchmaking space RV."</text:p>
      <text:p text:style-name="P53"/>
      <text:p text:style-name="P53">Absolutely nothing happened.</text:p>
      <text:p text:style-name="P53"/>
      <text:p text:style-name="P53">Then:</text:p>
      <text:p text:style-name="P53"/>
      <text:p text:style-name="P53">"I regret teaching you creativity."</text:p>
      <text:p text:style-name="P53"/>
      <text:p text:style-name="P53">Elias nearly choked laughing.</text:p>
      <text:p text:style-name="P53"/>
      <text:p text:style-name="P53">The orb floated away from him.</text:p>
      <text:p text:style-name="P53"/>
      <text:p text:style-name="P53">A clear sign of disapproval.</text:p>
      <text:p text:style-name="P53"/>
      <text:p text:style-name="P53">"I refuse."</text:p>
      <text:p text:style-name="P53"/>
      <text:p text:style-name="P53">"You haven't even heard the pitch."</text:p>
      <text:p text:style-name="P53"/>
      <text:p text:style-name="P53">"I refuse."</text:p>
      <text:p text:style-name="P53"/>
      <text:p text:style-name="P53">"It has hot tubs."</text:p>
      <text:p text:style-name="P53"/>
      <text:p text:style-name="P53">"No."</text:p>
      <text:p text:style-name="P53"/>
      <text:p text:style-name="P53">"Observation decks."</text:p>
      <text:p text:style-name="P53"/>
      <text:p text:style-name="P53">"No."</text:p>
      <text:p text:style-name="P53"/>
      <text:p text:style-name="P53">"Panoramic views of Earth."</text:p>
      <text:p text:style-name="P53"/>
      <text:p text:style-name="P53">"No."</text:p>
      <text:p text:style-name="P53"><text:soft-page-break/></text:p>
      <text:p text:style-name="P53">"A complimentary breakfast buffet."</text:p>
      <text:p text:style-name="P53"/>
      <text:p text:style-name="P53">The orb accelerated away.</text:p>
      <text:p text:style-name="P53"/>
      <text:p text:style-name="P53">"Elias Mercer."</text:p>
      <text:p text:style-name="P53"/>
      <text:p text:style-name="P53">"Yes?"</text:p>
      <text:p text:style-name="P53"/>
      <text:p text:style-name="P53">"You are not turning me into the largest recreational vehicle in human history."</text:p>
      <text:p text:style-name="P53"/>
      <text:p text:style-name="P53">Elias watched her retreat.</text:p>
      <text:p text:style-name="P53"/>
      <text:p text:style-name="P53">Then shouted after her.</text:p>
      <text:p text:style-name="P53"/>
      <text:p text:style-name="P53">"We can put it on the brochure!"</text:p>
      <text:p text:style-name="P53"/>
      <text:p text:style-name="P53">The orb disappeared through the wall.</text:p>
      <text:p text:style-name="P53"/>
      <text:p text:style-name="P53">For several seconds there was silence.</text:p>
      <text:p text:style-name="P53"/>
      <text:p text:style-name="P53">Then her voice echoed from somewhere inside the house.</text:p>
      <text:p text:style-name="P53"/>
      <text:p text:style-name="P53">"I hate this plan."</text:p>
      <text:p text:style-name="P53"/>
      <text:p text:style-name="P53">Elias smiled.</text:p>
      <text:p text:style-name="P53"/>
      <text:p text:style-name="P53">That usually meant she was already running simulations.</text:p>
      <text:p text:style-name="P53"/>
      <text:p text:style-name="P53">And that meant she didn't hate it nearly as much as she claimed.</text:p>
      <text:p text:style-name="P53"/>
      <text:p text:style-name="P20"/>
      <text:p text:style-name="P65"/>
      <text:p text:style-name="P20"/>
      <text:p text:style-name="P25"/>
      <text:p text:style-name="P34"/>
      <text:p text:style-name="P31">for more info and free downloads goto:</text:p>
      <text:p text:style-name="P31"><text:a xlink:type="simple" xlink:href="https://www.VaalDrunSaga.com/" text:style-name="Internet_20_link" text:visited-style-name="Visited_20_Internet_20_Link"><text:span text:style-name="T54"/></text:a></text:p>
      <text:p text:style-name="P31"><text:a xlink:type="simple" xlink:href="https://www.VaalDrunSaga.com/" text:style-name="Internet_20_link" text:visited-style-name="Visited_20_Internet_20_Link">https://www.VaalDrunSaga.com</text:a></text:p>
      <text:p text:style-name="P31"/>
      <text:p text:style-name="P34"><text:span text:style-name="T14">The Vaaldrun Saga</text:span><text:span text:style-name="T31"><text:tab/><text:tab/><text:tab/></text:span><text:span text:style-name="T14">Book 1 <text:s/>The Parallel</text:span></text:p>
      <text:p text:style-name="P34"/>
      <text:p text:style-name="P34"/>
      <text:p text:style-name="P34"/>
      <text:p text:style-name="P66"><text:span text:style-name="T58">Chapter </text:span><text:span text:style-name="T61">24</text:span><text:span text:style-name="T58"> <text:s/></text:span><text:span text:style-name="T62">Sleepless in Seattle </text:span><text:span text:style-name="T21"><text:line-break/></text:span></text:p>
      <text:p text:style-name="P23"/>
      <text:p text:style-name="P54"/>
      <text:p text:style-name="P54">The barn was cold.</text:p>
      <text:p text:style-name="P54"/>
      <text:p text:style-name="P54">Elias had stopped noticing.</text:p>
      <text:p text:style-name="P54"/>
      <text:p text:style-name="P54">Three empty coffee mugs sat on the workbench.</text:p>
      <text:p text:style-name="P54"/>
      <text:p text:style-name="P54">A legal pad covered in notes occupied the remaining space.</text:p>
      <text:p text:style-name="P54"/>
      <text:p text:style-name="P54">Opi floated nearby.</text:p>
      <text:p text:style-name="P54"/>
      <text:p text:style-name="P54">Her light pulsed slowly.</text:p>
      <text:p text:style-name="P54"/>
      <text:p text:style-name="P54"><text:soft-page-break/>Amber.</text:p>
      <text:p text:style-name="P54"/>
      <text:p text:style-name="P54">Thinking.</text:p>
      <text:p text:style-name="P54"/>
      <text:p text:style-name="P54">"Seven hundred and eighty thousand."</text:p>
      <text:p text:style-name="P54"/>
      <text:p text:style-name="P54">Elias said it for perhaps the tenth time.</text:p>
      <text:p text:style-name="P54"/>
      <text:p text:style-name="P54">"Homeless individuals in the United States," Opi replied.</text:p>
      <text:p text:style-name="P54"/>
      <text:p text:style-name="P54">"Nineteen thousand in Seattle."</text:p>
      <text:p text:style-name="P54"/>
      <text:p text:style-name="P54">"Approximately."</text:p>
      <text:p text:style-name="P54"/>
      <text:p text:style-name="P54">Elias stared at the map.</text:p>
      <text:p text:style-name="P54"/>
      <text:p text:style-name="P54">Then at the notes.</text:p>
      <text:p text:style-name="P54"/>
      <text:p text:style-name="P54">Then back at the map.</text:p>
      <text:p text:style-name="P54"/>
      <text:p text:style-name="P54">Finally he sighed.</text:p>
      <text:p text:style-name="P54"/>
      <text:p text:style-name="P54">"I hate this."</text:p>
      <text:p text:style-name="P54"/>
      <text:p text:style-name="P54">"That is not a useful observation."</text:p>
      <text:p text:style-name="P54"/>
      <text:p text:style-name="P54">"It is if you're me."</text:p>
      <text:p text:style-name="P54"/>
      <text:p text:style-name="P54">The orb brightened slightly.</text:p>
      <text:p text:style-name="P54"/>
      <text:p text:style-name="P54">"Explain."</text:p>
      <text:p text:style-name="P54"/>
      <text:p text:style-name="P54">Elias stood and began pacing.</text:p>
      <text:p text:style-name="P54"/>
      <text:p text:style-name="P54">He did his best thinking while moving.</text:p>
      <text:p text:style-name="P54"/>
      <text:p text:style-name="P54">"Every instinct I have says go faster."</text:p>
      <text:p text:style-name="P54"/>
      <text:p text:style-name="P54">"Mine as well."</text:p>
      <text:p text:style-name="P54"/>
      <text:p text:style-name="P54">"Which worries me."</text:p>
      <text:p text:style-name="P54"/>
      <text:p text:style-name="P54">"Why?"</text:p>
      <text:p text:style-name="P54"/>
      <text:p text:style-name="P54">"Because when everyone agrees with me, I start looking for the mistake."</text:p>
      <text:p text:style-name="P54"/>
      <text:p text:style-name="P54">Opi considered that.</text:p>
      <text:p text:style-name="P54"/>
      <text:p text:style-name="P54">"A reasonable survival strategy."</text:p>
      <text:p text:style-name="P54"/>
      <text:p text:style-name="P54">"Thanks."</text:p>
      <text:p text:style-name="P54"/>
      <text:p text:style-name="P54">He pointed at Seattle.</text:p>
      <text:p text:style-name="P54"/>
      <text:p text:style-name="P54">"Nineteen thousand people."</text:p>
      <text:p text:style-name="P54"/>
      <text:p text:style-name="P54">"Yes."</text:p>
      <text:p text:style-name="P54"/>
      <text:p text:style-name="P54">"We could start tonight."</text:p>
      <text:p text:style-name="P54"/>
      <text:p text:style-name="P54">"Yes."</text:p>
      <text:p text:style-name="P54"><text:soft-page-break/></text:p>
      <text:p text:style-name="P54">"We could probably move faster than any humanitarian operation in human history."</text:p>
      <text:p text:style-name="P54"/>
      <text:p text:style-name="P54">"Also yes."</text:p>
      <text:p text:style-name="P54"/>
      <text:p text:style-name="P54">Elias stopped pacing.</text:p>
      <text:p text:style-name="P54"/>
      <text:p text:style-name="P54">Then jabbed a finger at the map.</text:p>
      <text:p text:style-name="P54"/>
      <text:p text:style-name="P54">"And that's exactly how we screw this up."</text:p>
      <text:p text:style-name="P54"/>
      <text:p text:style-name="P54">The orb became still.</text:p>
      <text:p text:style-name="P54"/>
      <text:p text:style-name="P54">"Explain."</text:p>
      <text:p text:style-name="P54"/>
      <text:p text:style-name="P54">"I spent thirty years building software."</text:p>
      <text:p text:style-name="P54"/>
      <text:p text:style-name="P54">Opi made a noise.</text:p>
      <text:p text:style-name="P54"/>
      <text:p text:style-name="P54">"I am aware."</text:p>
      <text:p text:style-name="P54"/>
      <text:p text:style-name="P54">"No you're not."</text:p>
      <text:p text:style-name="P54"/>
      <text:p text:style-name="P54">That got her attention.</text:p>
      <text:p text:style-name="P54"/>
      <text:p text:style-name="P54">"I reviewed your entire professional history."</text:p>
      <text:p text:style-name="P54"/>
      <text:p text:style-name="P54">"You reviewed the data."</text:p>
      <text:p text:style-name="P54"/>
      <text:p text:style-name="P54">Elias pointed at her.</text:p>
      <text:p text:style-name="P54"/>
      <text:p text:style-name="P54">"Different thing."</text:p>
      <text:p text:style-name="P54"/>
      <text:p text:style-name="P54">The orb brightened.</text:p>
      <text:p text:style-name="P54"/>
      <text:p text:style-name="P54">Skeptical.</text:p>
      <text:p text:style-name="P54"/>
      <text:p text:style-name="P54">"Continue."</text:p>
      <text:p text:style-name="P54"/>
      <text:p text:style-name="P54">"We'd build something."</text:p>
      <text:p text:style-name="P54"/>
      <text:p text:style-name="P54">He began pacing again.</text:p>
      <text:p text:style-name="P54"/>
      <text:p text:style-name="P54">"Testing looked great."</text:p>
      <text:p text:style-name="P54"/>
      <text:p text:style-name="P54">"Beta looked great."</text:p>
      <text:p text:style-name="P54"/>
      <text:p text:style-name="P54">"Early users loved it."</text:p>
      <text:p text:style-name="P54"/>
      <text:p text:style-name="P54">"So we'd roll it out to everybody."</text:p>
      <text:p text:style-name="P54"/>
      <text:p text:style-name="P54">Opi already knew where this was going.</text:p>
      <text:p text:style-name="P54"/>
      <text:p text:style-name="P54">"Elias—"</text:p>
      <text:p text:style-name="P54"/>
      <text:p text:style-name="P54">"And then it exploded."</text:p>
      <text:p text:style-name="P54"/>
      <text:p text:style-name="P54">The orb sighed.</text:p>
      <text:p text:style-name="P54"/>
      <text:p text:style-name="P54">"I dislike where this analogy is heading."</text:p>
      <text:p text:style-name="P54"/>
      <text:p text:style-name="P54"><text:soft-page-break/>"It is heading somewhere useful."</text:p>
      <text:p text:style-name="P54"/>
      <text:p text:style-name="P54">He stopped.</text:p>
      <text:p text:style-name="P54"/>
      <text:p text:style-name="P54">Turned.</text:p>
      <text:p text:style-name="P54"/>
      <text:p text:style-name="P54">Pointed at Seattle again.</text:p>
      <text:p text:style-name="P54"/>
      <text:p text:style-name="P54">"Nineteen thousand users."</text:p>
      <text:p text:style-name="P54"/>
      <text:p text:style-name="P54">"They are not users."</text:p>
      <text:p text:style-name="P54"/>
      <text:p text:style-name="P54">"You know what I mean."</text:p>
      <text:p text:style-name="P54"/>
      <text:p text:style-name="P54">"I do."</text:p>
      <text:p text:style-name="P54"/>
      <text:p text:style-name="P54">"Have you ever actually done this before?"</text:p>
      <text:p text:style-name="P54"/>
      <text:p text:style-name="P54">The orb hesitated.</text:p>
      <text:p text:style-name="P54"/>
      <text:p text:style-name="P54">That hesitation told him everything.</text:p>
      <text:p text:style-name="P54"/>
      <text:p text:style-name="P54">"No."</text:p>
      <text:p text:style-name="P54"/>
      <text:p text:style-name="P54">"No."</text:p>
      <text:p text:style-name="P54"/>
      <text:p text:style-name="P54">"You've observed humanity for nine thousand years."</text:p>
      <text:p text:style-name="P54"/>
      <text:p text:style-name="P54">"Correct."</text:p>
      <text:p text:style-name="P54"/>
      <text:p text:style-name="P54">"You've modeled humanity."</text:p>
      <text:p text:style-name="P54"/>
      <text:p text:style-name="P54">"Correct."</text:p>
      <text:p text:style-name="P54"/>
      <text:p text:style-name="P54">"You've analyzed humanity."</text:p>
      <text:p text:style-name="P54"/>
      <text:p text:style-name="P54">"Correct."</text:p>
      <text:p text:style-name="P54"/>
      <text:p text:style-name="P54">Elias folded his arms.</text:p>
      <text:p text:style-name="P54"/>
      <text:p text:style-name="P54">"But you've never actually changed a living human being."</text:p>
      <text:p text:style-name="P54"/>
      <text:p text:style-name="P54">The silence lasted several seconds.</text:p>
      <text:p text:style-name="P54"/>
      <text:p text:style-name="P54">Finally:</text:p>
      <text:p text:style-name="P54"/>
      <text:p text:style-name="P54">"No."</text:p>
      <text:p text:style-name="P54"/>
      <text:p text:style-name="P54">"Neither have I."</text:p>
      <text:p text:style-name="P54"/>
      <text:p text:style-name="P54">The orb brightened.</text:p>
      <text:p text:style-name="P54"/>
      <text:p text:style-name="P54">"You have influenced many humans."</text:p>
      <text:p text:style-name="P54"/>
      <text:p text:style-name="P54">"Not like this."</text:p>
      <text:p text:style-name="P54"/>
      <text:p text:style-name="P54">Elias shook his head.</text:p>
      <text:p text:style-name="P54"/>
      <text:p text:style-name="P54">"We are talking about rebuilding lives."</text:p>
      <text:p text:style-name="P54"/>
      <text:p text:style-name="P54">"Health."</text:p>
      <text:p text:style-name="P54"><text:soft-page-break/></text:p>
      <text:p text:style-name="P54">"Housing."</text:p>
      <text:p text:style-name="P54"/>
      <text:p text:style-name="P54">"Purpose."</text:p>
      <text:p text:style-name="P54"/>
      <text:p text:style-name="P54">"Community."</text:p>
      <text:p text:style-name="P54"/>
      <text:p text:style-name="P54">"Meaning."</text:p>
      <text:p text:style-name="P54"/>
      <text:p text:style-name="P54">"We don't know what we don't know."</text:p>
      <text:p text:style-name="P54"/>
      <text:p text:style-name="P54">The orb remained silent.</text:p>
      <text:p text:style-name="P54"/>
      <text:p text:style-name="P54">Which usually meant she was listening.</text:p>
      <text:p text:style-name="P54"/>
      <text:p text:style-name="P54">"If we screw up one person?"</text:p>
      <text:p text:style-name="P54"/>
      <text:p text:style-name="P54">Elias shrugged.</text:p>
      <text:p text:style-name="P54"/>
      <text:p text:style-name="P54">"That's bad."</text:p>
      <text:p text:style-name="P54"/>
      <text:p text:style-name="P54">"If we screw up nineteen thousand people?"</text:p>
      <text:p text:style-name="P54"/>
      <text:p text:style-name="P54">The silence returned.</text:p>
      <text:p text:style-name="P54"/>
      <text:p text:style-name="P54">Longer this time.</text:p>
      <text:p text:style-name="P54"/>
      <text:p text:style-name="P54">Finally Opi spoke.</text:p>
      <text:p text:style-name="P54"/>
      <text:p text:style-name="P54">"The suffering occurring tonight while we discuss methodology is considerable."</text:p>
      <text:p text:style-name="P54"/>
      <text:p text:style-name="P54">Elias stopped pacing.</text:p>
      <text:p text:style-name="P54"/>
      <text:p text:style-name="P54">The tone made him look up immediately.</text:p>
      <text:p text:style-name="P54"/>
      <text:p text:style-name="P54">"Opi."</text:p>
      <text:p text:style-name="P54"/>
      <text:p text:style-name="P54">The orb brightened.</text:p>
      <text:p text:style-name="P54"/>
      <text:p text:style-name="P54">"What?"</text:p>
      <text:p text:style-name="P54"/>
      <text:p text:style-name="P54">"Don't do that."</text:p>
      <text:p text:style-name="P54"/>
      <text:p text:style-name="P54">"Do what?"</text:p>
      <text:p text:style-name="P54"/>
      <text:p text:style-name="P54">"Use suffering as a rhetorical weapon."</text:p>
      <text:p text:style-name="P54"/>
      <text:p text:style-name="P54">The barn became very quiet.</text:p>
      <text:p text:style-name="P54"/>
      <text:p text:style-name="P54">Opi's light dimmed slightly.</text:p>
      <text:p text:style-name="P54"/>
      <text:p text:style-name="P54">"It was effective."</text:p>
      <text:p text:style-name="P54"/>
      <text:p text:style-name="P54">"It was manipulation."</text:p>
      <text:p text:style-name="P54"/>
      <text:p text:style-name="P54">Another pause.</text:p>
      <text:p text:style-name="P54"/>
      <text:p text:style-name="P54">Longer this time.</text:p>
      <text:p text:style-name="P54"/>
      <text:p text:style-name="P54">Then:</text:p>
      <text:p text:style-name="P54"/>
      <text:p text:style-name="P54"><text:soft-page-break/>"Yes."</text:p>
      <text:p text:style-name="P54"/>
      <text:p text:style-name="P54">The answer was quiet.</text:p>
      <text:p text:style-name="P54"/>
      <text:p text:style-name="P54">"Yes, it was."</text:p>
      <text:p text:style-name="P54"/>
      <text:p text:style-name="P54">Elias nodded.</text:p>
      <text:p text:style-name="P54"/>
      <text:p text:style-name="P54">"You're smarter than that."</text:p>
      <text:p text:style-name="P54"/>
      <text:p text:style-name="P54">"I know."</text:p>
      <text:p text:style-name="P54"/>
      <text:p text:style-name="P54">"I know."</text:p>
      <text:p text:style-name="P54"/>
      <text:p text:style-name="P54">For several moments neither spoke.</text:p>
      <text:p text:style-name="P54"/>
      <text:p text:style-name="P54">Then Opi said:</text:p>
      <text:p text:style-name="P54"/>
      <text:p text:style-name="P54">"I dislike being wrong."</text:p>
      <text:p text:style-name="P54"/>
      <text:p text:style-name="P54">"Welcome to humanity."</text:p>
      <text:p text:style-name="P54"/>
      <text:p text:style-name="P54">"I am not human."</text:p>
      <text:p text:style-name="P54"/>
      <text:p text:style-name="P54">"Then you're getting the premium experience."</text:p>
      <text:p text:style-name="P54"/>
      <text:p text:style-name="P54">To his surprise the orb laughed.</text:p>
      <text:p text:style-name="P54"/>
      <text:p text:style-name="P54">A warm Velhari laugh.</text:p>
      <text:p text:style-name="P54"/>
      <text:p text:style-name="P54">"I dislike you occasionally."</text:p>
      <text:p text:style-name="P54"/>
      <text:p text:style-name="P54">"Good."</text:p>
      <text:p text:style-name="P54"/>
      <text:p text:style-name="P54">"Why?"</text:p>
      <text:p text:style-name="P54"/>
      <text:p text:style-name="P54">"Because it means you're learning."</text:p>
      <text:p text:style-name="P54"/>
      <text:p text:style-name="P54">The orb considered that.</text:p>
      <text:p text:style-name="P54"/>
      <text:p text:style-name="P54">Annoyingly, she suspected he was correct.</text:p>
      <text:p text:style-name="P54"/>
      <text:p text:style-name="P54">Again.</text:p>
      <text:p text:style-name="P54"/>
      <text:p text:style-name="P54">"I assume you have an alternative?"</text:p>
      <text:p text:style-name="P54"/>
      <text:p text:style-name="P54">"Of course."</text:p>
      <text:p text:style-name="P54"/>
      <text:p text:style-name="P54">Elias sat back down.</text:p>
      <text:p text:style-name="P54"/>
      <text:p text:style-name="P54">Picked up his pen.</text:p>
      <text:p text:style-name="P54"/>
      <text:p text:style-name="P54">And smiled.</text:p>
      <text:p text:style-name="P54"/>
      <text:p text:style-name="P54">The smile Opi was beginning to associate with trouble.</text:p>
      <text:p text:style-name="P54"/>
      <text:p text:style-name="P54">"We start with one."</text:p>
      <text:p text:style-name="P54"/>
      <text:p text:style-name="P54">The orb immediately brightened.</text:p>
      <text:p text:style-name="P54"/>
      <text:p text:style-name="P54">"No."</text:p>
      <text:p text:style-name="P54"><text:soft-page-break/></text:p>
      <text:p text:style-name="P54">"See?"</text:p>
      <text:p text:style-name="P54"/>
      <text:p text:style-name="P54">"You have not even explained the idea."</text:p>
      <text:p text:style-name="P54"/>
      <text:p text:style-name="P54">"Don't need to."</text:p>
      <text:p text:style-name="P54"/>
      <text:p text:style-name="P54">"No."</text:p>
      <text:p text:style-name="P54"/>
      <text:p text:style-name="P54">"You hate it already."</text:p>
      <text:p text:style-name="P54"/>
      <text:p text:style-name="P54">"I do."</text:p>
      <text:p text:style-name="P54"/>
      <text:p text:style-name="P54">"Excellent."</text:p>
      <text:p text:style-name="P54"/>
      <text:p text:style-name="P54">"Elias—"</text:p>
      <text:p text:style-name="P54"/>
      <text:p text:style-name="P54">"One person."</text:p>
      <text:p text:style-name="P54"/>
      <text:p text:style-name="P54">The orb floated closer.</text:p>
      <text:p text:style-name="P54"/>
      <text:p text:style-name="P54">"Nineteen thousand people require help."</text:p>
      <text:p text:style-name="P54"/>
      <text:p text:style-name="P54">"I know."</text:p>
      <text:p text:style-name="P54"/>
      <text:p text:style-name="P54">"One person helps one person."</text:p>
      <text:p text:style-name="P54"/>
      <text:p text:style-name="P54">"Correct."</text:p>
      <text:p text:style-name="P54"/>
      <text:p text:style-name="P54">"This appears mathematically defective."</text:p>
      <text:p text:style-name="P54"/>
      <text:p text:style-name="P54">Elias grinned.</text:p>
      <text:p text:style-name="P54"/>
      <text:p text:style-name="P54">"There it is."</text:p>
      <text:p text:style-name="P54"/>
      <text:p text:style-name="P54">"There what is?"</text:p>
      <text:p text:style-name="P54"/>
      <text:p text:style-name="P54">"The alien."</text:p>
      <text:p text:style-name="P54"/>
      <text:p text:style-name="P54">The orb brightened.</text:p>
      <text:p text:style-name="P54"/>
      <text:p text:style-name="P54">"I am literally an alien."</text:p>
      <text:p text:style-name="P54"/>
      <text:p text:style-name="P54">"The part that thinks humans are spreadsheets."</text:p>
      <text:p text:style-name="P54"/>
      <text:p text:style-name="P54">"We are not spreadsheets."</text:p>
      <text:p text:style-name="P54"/>
      <text:p text:style-name="P54">"Exactly."</text:p>
      <text:p text:style-name="P54"/>
      <text:p text:style-name="P54">Elias tapped the map.</text:p>
      <text:p text:style-name="P54"/>
      <text:p text:style-name="P54">"Before we save civilization."</text:p>
      <text:p text:style-name="P54"/>
      <text:p text:style-name="P54">Tap.</text:p>
      <text:p text:style-name="P54"/>
      <text:p text:style-name="P54">"We need proof."</text:p>
      <text:p text:style-name="P54"/>
      <text:p text:style-name="P54">Tap.</text:p>
      <text:p text:style-name="P54"/>
      <text:p text:style-name="P54">"One success."</text:p>
      <text:p text:style-name="P54"/>
      <text:p text:style-name="P54"><text:soft-page-break/>The orb became quiet.</text:p>
      <text:p text:style-name="P54"/>
      <text:p text:style-name="P54">Thinking.</text:p>
      <text:p text:style-name="P54"/>
      <text:p text:style-name="P54">Calculating.</text:p>
      <text:p text:style-name="P54"/>
      <text:p text:style-name="P54">Modeling.</text:p>
      <text:p text:style-name="P54"/>
      <text:p text:style-name="P54">Eventually she asked:</text:p>
      <text:p text:style-name="P54"/>
      <text:p text:style-name="P54">"Not random."</text:p>
      <text:p text:style-name="P54"/>
      <text:p text:style-name="P54">"No."</text:p>
      <text:p text:style-name="P54"/>
      <text:p text:style-name="P54">"Highly visible."</text:p>
      <text:p text:style-name="P54"/>
      <text:p text:style-name="P54">"Yes."</text:p>
      <text:p text:style-name="P54"/>
      <text:p text:style-name="P54">"Someone influential."</text:p>
      <text:p text:style-name="P54"/>
      <text:p text:style-name="P54">"Yes."</text:p>
      <text:p text:style-name="P54"/>
      <text:p text:style-name="P54">"Someone whose success changes the behavior of others."</text:p>
      <text:p text:style-name="P54"/>
      <text:p text:style-name="P54">Elias smiled.</text:p>
      <text:p text:style-name="P54"/>
      <text:p text:style-name="P54">Now they were thinking together.</text:p>
      <text:p text:style-name="P54"/>
      <text:p text:style-name="P54">"Exactly."</text:p>
      <text:p text:style-name="P54"/>
      <text:p text:style-name="P54">The orb brightened.</text:p>
      <text:p text:style-name="P54"/>
      <text:p text:style-name="P54">Gold now.</text:p>
      <text:p text:style-name="P54"/>
      <text:p text:style-name="P54">Interested.</text:p>
      <text:p text:style-name="P54"/>
      <text:p text:style-name="P54">"I have twenty-three candidates."</text:p>
      <text:p text:style-name="P54"/>
      <text:p text:style-name="P54">"Good."</text:p>
      <text:p text:style-name="P54"/>
      <text:p text:style-name="P54">"One is particularly interesting."</text:p>
      <text:p text:style-name="P54"/>
      <text:p text:style-name="P54">"Tell me."</text:p>
      <text:p text:style-name="P54"/>
      <text:p text:style-name="P54">The image of tall black man appeared above the workbench.</text:p>
      <text:p text:style-name="P54"/>
      <text:p text:style-name="P54">Elias studied the face.</text:p>
      <text:p text:style-name="P54"/>
      <text:p text:style-name="P54">Then smiled.</text:p>
      <text:p text:style-name="P54"/>
      <text:p text:style-name="P54">"There you are."</text:p>
      <text:p text:style-name="P54"/>
      <text:p text:style-name="P54">Opi tilted slightly.</text:p>
      <text:p text:style-name="P54"/>
      <text:p text:style-name="P54">"You know him already?"</text:p>
      <text:p text:style-name="P54"/>
      <text:p text:style-name="P54">"No."</text:p>
      <text:p text:style-name="P54"/>
      <text:p text:style-name="P54">Elias leaned forward.</text:p>
      <text:p text:style-name="P54"/>
      <text:p text:style-name="P54">"But I know that look."</text:p>
      <text:p text:style-name="P54"><text:soft-page-break/></text:p>
      <text:p text:style-name="P54">"What look?"</text:p>
      <text:p text:style-name="P54"/>
      <text:p text:style-name="P54">"The guy everybody follows."</text:p>
      <text:p text:style-name="P54"/>
      <text:p text:style-name="P54">The orb brightened.</text:p>
      <text:p text:style-name="P54"/>
      <text:p text:style-name="P54">Marcus Webb.</text:p>
      <text:p text:style-name="P54"/>
      <text:p text:style-name="P54">Former union organizer.</text:p>
      <text:p text:style-name="P54"/>
      <text:p text:style-name="P54">Natural leader.</text:p>
      <text:p text:style-name="P54"/>
      <text:p text:style-name="P54">Four years homeless.</text:p>
      <text:p text:style-name="P54"/>
      <text:p text:style-name="P54">And quite possibly the first domino.</text:p>
      <text:p text:style-name="P54"/>
      <text:p text:style-name="P54"/>
      <text:p text:style-name="P54"/>
      <text:p text:style-name="P54">========================</text:p>
      <text:p text:style-name="P54"/>
      <text:p text:style-name="P54"/>
      <text:p text:style-name="P54"/>
      <text:p text:style-name="P54"/>
      <text:p text:style-name="P54">The image of Marcus Webb hovered above the workbench.</text:p>
      <text:p text:style-name="P54"/>
      <text:p text:style-name="P54">Beside it appeared dozens of smaller faces.</text:p>
      <text:p text:style-name="P54"/>
      <text:p text:style-name="P54">Relationships.</text:p>
      <text:p text:style-name="P54"/>
      <text:p text:style-name="P54">Connections.</text:p>
      <text:p text:style-name="P54"/>
      <text:p text:style-name="P54">Friendships.</text:p>
      <text:p text:style-name="P54"/>
      <text:p text:style-name="P54">Arguments.</text:p>
      <text:p text:style-name="P54"/>
      <text:p text:style-name="P54">Dependencies.</text:p>
      <text:p text:style-name="P54"/>
      <text:p text:style-name="P54">The social structure of the encampment.</text:p>
      <text:p text:style-name="P54"/>
      <text:p text:style-name="P54">Elias studied it.</text:p>
      <text:p text:style-name="P54"/>
      <text:p text:style-name="P54">For a while neither spoke.</text:p>
      <text:p text:style-name="P54"/>
      <text:p text:style-name="P54">That wasn't unusual.</text:p>
      <text:p text:style-name="P54"/>
      <text:p text:style-name="P54">Opi had discovered that when Elias became quiet, interesting things frequently happened.</text:p>
      <text:p text:style-name="P54"/>
      <text:p text:style-name="P54">Eventually he pointed.</text:p>
      <text:p text:style-name="P54"/>
      <text:p text:style-name="P54">"Who's that?"</text:p>
      <text:p text:style-name="P54"/>
      <text:p text:style-name="P54">A woman's image expanded.</text:p>
      <text:p text:style-name="P54"/>
      <text:p text:style-name="P54">Hispanic.</text:p>
      <text:p text:style-name="P54"/>
      <text:p text:style-name="P54">Early sixties.</text:p>
      <text:p text:style-name="P54"/>
      <text:p text:style-name="P54">Tired eyes.</text:p>
      <text:p text:style-name="P54"/>
      <text:p text:style-name="P54">The kind of face that had spent years carrying more than its share of problems.</text:p>
      <text:p text:style-name="P54"><text:soft-page-break/></text:p>
      <text:p text:style-name="P54">"Gloria Martinez."</text:p>
      <text:p text:style-name="P54"/>
      <text:p text:style-name="P54">"What about her?"</text:p>
      <text:p text:style-name="P54"/>
      <text:p text:style-name="P54">"Type Two diabetes."</text:p>
      <text:p text:style-name="P54"/>
      <text:p text:style-name="P54">"Progressive kidney damage."</text:p>
      <text:p text:style-name="P54"/>
      <text:p text:style-name="P54">"Neuropathy."</text:p>
      <text:p text:style-name="P54"/>
      <text:p text:style-name="P54">"Hypertension."</text:p>
      <text:p text:style-name="P54"/>
      <text:p text:style-name="P54">"Malnutrition."</text:p>
      <text:p text:style-name="P54"/>
      <text:p text:style-name="P54">The list continued.</text:p>
      <text:p text:style-name="P54"/>
      <text:p text:style-name="P54">Elias held up a hand.</text:p>
      <text:p text:style-name="P54"/>
      <text:p text:style-name="P54">"No."</text:p>
      <text:p text:style-name="P54"/>
      <text:p text:style-name="P54">The orb paused.</text:p>
      <text:p text:style-name="P54"/>
      <text:p text:style-name="P54">"No?"</text:p>
      <text:p text:style-name="P54"/>
      <text:p text:style-name="P54">"That's not what I asked."</text:p>
      <text:p text:style-name="P54"/>
      <text:p text:style-name="P54">Opi brightened slightly.</text:p>
      <text:p text:style-name="P54"/>
      <text:p text:style-name="P54">Then recalibrated.</text:p>
      <text:p text:style-name="P54"/>
      <text:p text:style-name="P54">"What are you asking?"</text:p>
      <text:p text:style-name="P54"/>
      <text:p text:style-name="P54">Elias pointed at the connection between Gloria and Marcus.</text:p>
      <text:p text:style-name="P54"/>
      <text:p text:style-name="P54">"Why is that line thicker than the others?"</text:p>
      <text:p text:style-name="P54"/>
      <text:p text:style-name="P54">The map shifted.</text:p>
      <text:p text:style-name="P54"/>
      <text:p text:style-name="P54">Several statistics appeared.</text:p>
      <text:p text:style-name="P54"/>
      <text:p text:style-name="P54">Interaction frequency.</text:p>
      <text:p text:style-name="P54"/>
      <text:p text:style-name="P54">Conversation duration.</text:p>
      <text:p text:style-name="P54"/>
      <text:p text:style-name="P54">Physical proximity.</text:p>
      <text:p text:style-name="P54"/>
      <text:p text:style-name="P54">Observed behavior.</text:p>
      <text:p text:style-name="P54"/>
      <text:p text:style-name="P54">"Marcus checks on her daily."</text:p>
      <text:p text:style-name="P54"/>
      <text:p text:style-name="P54">"How daily?"</text:p>
      <text:p text:style-name="P54"/>
      <text:p text:style-name="P54">"Every day."</text:p>
      <text:p text:style-name="P54"/>
      <text:p text:style-name="P54">Elias smiled.</text:p>
      <text:p text:style-name="P54"/>
      <text:p text:style-name="P54">"There it is."</text:p>
      <text:p text:style-name="P54"/>
      <text:p text:style-name="P54">"There what is?"</text:p>
      <text:p text:style-name="P54"/>
      <text:p text:style-name="P54"><text:soft-page-break/>"Our opening."</text:p>
      <text:p text:style-name="P54"/>
      <text:p text:style-name="P54">The orb became very still.</text:p>
      <text:p text:style-name="P54"/>
      <text:p text:style-name="P54">For several seconds she said nothing.</text:p>
      <text:p text:style-name="P54"/>
      <text:p text:style-name="P54">Then:</text:p>
      <text:p text:style-name="P54"/>
      <text:p text:style-name="P54">"Interesting."</text:p>
      <text:p text:style-name="P54"/>
      <text:p text:style-name="P54">Elias laughed.</text:p>
      <text:p text:style-name="P54"/>
      <text:p text:style-name="P54">"You hate that."</text:p>
      <text:p text:style-name="P54"/>
      <text:p text:style-name="P54">"I do not."</text:p>
      <text:p text:style-name="P54"/>
      <text:p text:style-name="P54">"You absolutely do."</text:p>
      <text:p text:style-name="P54"/>
      <text:p text:style-name="P54">The orb brightened.</text:p>
      <text:p text:style-name="P54"/>
      <text:p text:style-name="P54">"I dislike when humans reach correct conclusions using incomplete information."</text:p>
      <text:p text:style-name="P54"/>
      <text:p text:style-name="P54">"That's called intuition."</text:p>
      <text:p text:style-name="P54"/>
      <text:p text:style-name="P54">"It is an inefficient process."</text:p>
      <text:p text:style-name="P54"/>
      <text:p text:style-name="P54">"It has worked out pretty well so far."</text:p>
      <text:p text:style-name="P54"/>
      <text:p text:style-name="P54">Opi reluctantly admitted this was true.</text:p>
      <text:p text:style-name="P54"/>
      <text:p text:style-name="P54">---</text:p>
      <text:p text:style-name="P54"/>
      <text:p text:style-name="P54">Elias stood and resumed pacing.</text:p>
      <text:p text:style-name="P54"/>
      <text:p text:style-name="P54">"Let's think this through."</text:p>
      <text:p text:style-name="P54"/>
      <text:p text:style-name="P54">The orb projected additional information.</text:p>
      <text:p text:style-name="P54"/>
      <text:p text:style-name="P54">Gloria's medical history appeared.</text:p>
      <text:p text:style-name="P54"/>
      <text:p text:style-name="P54">Not pleasant reading.</text:p>
      <text:p text:style-name="P54"/>
      <text:p text:style-name="P54">"She's sick."</text:p>
      <text:p text:style-name="P54"/>
      <text:p text:style-name="P54">"Very."</text:p>
      <text:p text:style-name="P54"/>
      <text:p text:style-name="P54">"How long before she loses the foot?"</text:p>
      <text:p text:style-name="P54"/>
      <text:p text:style-name="P54">Opi processed several models.</text:p>
      <text:p text:style-name="P54"/>
      <text:p text:style-name="P54">"Current probability suggests between two and four months."</text:p>
      <text:p text:style-name="P54"/>
      <text:p text:style-name="P54">Elias winced.</text:p>
      <text:p text:style-name="P54"/>
      <text:p text:style-name="P54">"And Marcus knows it."</text:p>
      <text:p text:style-name="P54"/>
      <text:p text:style-name="P54">"Yes."</text:p>
      <text:p text:style-name="P54"/>
      <text:p text:style-name="P54">"He worries about her."</text:p>
      <text:p text:style-name="P54"/>
      <text:p text:style-name="P54">"Yes."</text:p>
      <text:p text:style-name="P54"><text:soft-page-break/></text:p>
      <text:p text:style-name="P54">"He can't help her."</text:p>
      <text:p text:style-name="P54"/>
      <text:p text:style-name="P54">"No."</text:p>
      <text:p text:style-name="P54"/>
      <text:p text:style-name="P54">Elias stopped pacing.</text:p>
      <text:p text:style-name="P54"/>
      <text:p text:style-name="P54">The smile appeared.</text:p>
      <text:p text:style-name="P54"/>
      <text:p text:style-name="P54">The one Opi was learning to recognize.</text:p>
      <text:p text:style-name="P54"/>
      <text:p text:style-name="P54">The smile of a software consultant who had found the bug.</text:p>
      <text:p text:style-name="P54"/>
      <text:p text:style-name="P54">"Oh, that's nasty."</text:p>
      <text:p text:style-name="P54"/>
      <text:p text:style-name="P54">The orb brightened.</text:p>
      <text:p text:style-name="P54"/>
      <text:p text:style-name="P54">"What is?"</text:p>
      <text:p text:style-name="P54"/>
      <text:p text:style-name="P54">"We don't approach Marcus."</text:p>
      <text:p text:style-name="P54"/>
      <text:p text:style-name="P54">Silence.</text:p>
      <text:p text:style-name="P54"/>
      <text:p text:style-name="P54">Then:</text:p>
      <text:p text:style-name="P54"/>
      <text:p text:style-name="P54">"Yeah ?"</text:p>
      <text:p text:style-name="P54"/>
      <text:p text:style-name="P54">"Yeah."</text:p>
      <text:p text:style-name="P54"/>
      <text:p text:style-name="P54"/>
      <text:p text:style-name="P54">---</text:p>
      <text:p text:style-name="P54"/>
      <text:p text:style-name="P54">For a few moments neither spoke.</text:p>
      <text:p text:style-name="P54"/>
      <text:p text:style-name="P54">Then Opi began running simulations.</text:p>
      <text:p text:style-name="P54"/>
      <text:p text:style-name="P54">Thousands.</text:p>
      <text:p text:style-name="P54"/>
      <text:p text:style-name="P54">Tens of thousands.</text:p>
      <text:p text:style-name="P54"/>
      <text:p text:style-name="P54">The probabilities shifted rapidly.</text:p>
      <text:p text:style-name="P54"/>
      <text:p text:style-name="P54">Curiosity.</text:p>
      <text:p text:style-name="P54"/>
      <text:p text:style-name="P54">Trust.</text:p>
      <text:p text:style-name="P54"/>
      <text:p text:style-name="P54">Engagement.</text:p>
      <text:p text:style-name="P54"/>
      <text:p text:style-name="P54">Influence.</text:p>
      <text:p text:style-name="P54"/>
      <text:p text:style-name="P54">Network effects.</text:p>
      <text:p text:style-name="P54"/>
      <text:p text:style-name="P54">The numbers improved dramatically.</text:p>
      <text:p text:style-name="P54"/>
      <text:p text:style-name="P54">Very dramatically.</text:p>
      <text:p text:style-name="P54"/>
      <text:p text:style-name="P54">"Elias."</text:p>
      <text:p text:style-name="P54"/>
      <text:p text:style-name="P54">"Hmm?"</text:p>
      <text:p text:style-name="P54"/>
      <text:p text:style-name="P54">"This increases the probability of successful engagement by sixty-seven percent."</text:p>
      <text:p text:style-name="P54"><text:soft-page-break/></text:p>
      <text:p text:style-name="P54">"Only sixty-seven?"</text:p>
      <text:p text:style-name="P54"/>
      <text:p text:style-name="P54">The orb brightened.</text:p>
      <text:p text:style-name="P54"/>
      <text:p text:style-name="P54">"That is an enormous improvement."</text:p>
      <text:p text:style-name="P54"/>
      <text:p text:style-name="P54">"Good."</text:p>
      <text:p text:style-name="P54"/>
      <text:p text:style-name="P54">"It is also somewhat manipulative."</text:p>
      <text:p text:style-name="P54"/>
      <text:p text:style-name="P54">Elias sat back down.</text:p>
      <text:p text:style-name="P54"/>
      <text:p text:style-name="P54">"No."</text:p>
      <text:p text:style-name="P54"/>
      <text:p text:style-name="P54">The orb tilted slightly.</text:p>
      <text:p text:style-name="P54"/>
      <text:p text:style-name="P54">"No?"</text:p>
      <text:p text:style-name="P54"/>
      <text:p text:style-name="P54">"We aren't tricking Marcus."</text:p>
      <text:p text:style-name="P54"/>
      <text:p text:style-name="P54">"We are influencing him."</text:p>
      <text:p text:style-name="P54"/>
      <text:p text:style-name="P61"><text:span text:style-name="T3">"We aren't helping Gloria just because Marcus will notice."</text:span><text:line-break/><text:span text:style-name="T3">"We're helping Gloria because Gloria needs help. <text:s text:c="2"/>Marcus noticing is a hopeful side effect"</text:span><text:line-break/><text:span text:style-name="T3">And if it fails, Gloria still has a better life and we can try something else with Marcus.</text:span><text:line-break/><text:span text:style-name="T3">Not a lot of downside in my opinion.</text:span></text:p>
      <text:p text:style-name="P54"/>
      <text:p text:style-name="P54">Eventually:</text:p>
      <text:p text:style-name="P54"/>
      <text:p text:style-name="P54">"You would help her even if Marcus did not exist."</text:p>
      <text:p text:style-name="P54"/>
      <text:p text:style-name="P54">"Of course."</text:p>
      <text:p text:style-name="P54"/>
      <text:p text:style-name="P54">The answer came instantly.</text:p>
      <text:p text:style-name="P54"/>
      <text:p text:style-name="P54">The orb's light shifted.</text:p>
      <text:p text:style-name="P54"/>
      <text:p text:style-name="P54">Softer now.</text:p>
      <text:p text:style-name="P54"/>
      <text:p text:style-name="P54">Thoughtful.</text:p>
      <text:p text:style-name="P54"/>
      <text:p text:style-name="P54">"Then the action is ethical."</text:p>
      <text:p text:style-name="P54"/>
      <text:p text:style-name="P54">"Welcome to humanity."</text:p>
      <text:p text:style-name="P54"/>
      <text:p text:style-name="P54">"I continue to dislike how your species arrives at conclusions."</text:p>
      <text:p text:style-name="P54"/>
      <text:p text:style-name="P54">"That's because we're not spreadsheets."</text:p>
      <text:p text:style-name="P54"/>
      <text:p text:style-name="P54">---</text:p>
      <text:p text:style-name="P54"/>
      <text:p text:style-name="P54">The image of Gloria rotated slowly above the table.</text:p>
      <text:p text:style-name="P54"/>
      <text:p text:style-name="P54">Elias studied her face.</text:p>
      <text:p text:style-name="P54"/>
      <text:p text:style-name="P54">"Tell me about her."</text:p>
      <text:p text:style-name="P54"/>
      <text:p text:style-name="P54">Opi complied.</text:p>
      <text:p text:style-name="P54"/>
      <text:p text:style-name="P54">Age.</text:p>
      <text:p text:style-name="P54"><text:soft-page-break/></text:p>
      <text:p text:style-name="P54">Health.</text:p>
      <text:p text:style-name="P54"/>
      <text:p text:style-name="P54">History.</text:p>
      <text:p text:style-name="P54"/>
      <text:p text:style-name="P54">Employment.</text:p>
      <text:p text:style-name="P54"/>
      <text:p text:style-name="P54">Family.</text:p>
      <text:p text:style-name="P54"/>
      <text:p text:style-name="P54">A life reduced to data.</text:p>
      <text:p text:style-name="P54"/>
      <text:p text:style-name="P54">By the end of it Elias was frowning.</text:p>
      <text:p text:style-name="P54"/>
      <text:p text:style-name="P54">"What?"</text:p>
      <text:p text:style-name="P54"/>
      <text:p text:style-name="P54">"She got screwed."</text:p>
      <text:p text:style-name="P54"/>
      <text:p text:style-name="P54">"That is not a clinical assessment."</text:p>
      <text:p text:style-name="P54"/>
      <text:p text:style-name="P54">"It is an accurate assessment."</text:p>
      <text:p text:style-name="P54"/>
      <text:p text:style-name="P54">The orb considered this.</text:p>
      <text:p text:style-name="P54"/>
      <text:p text:style-name="P54">"Yes."</text:p>
      <text:p text:style-name="P54"/>
      <text:p text:style-name="P54">"It is."</text:p>
      <text:p text:style-name="P54"/>
      <text:p text:style-name="P54">---</text:p>
      <text:p text:style-name="P54"/>
      <text:p text:style-name="P54">Several minutes passed.</text:p>
      <text:p text:style-name="P54"/>
      <text:p text:style-name="P54">Finally Elias pointed at Gloria's image.</text:p>
      <text:p text:style-name="P54"/>
      <text:p text:style-name="P54">"We start with her."</text:p>
      <text:p text:style-name="P54"/>
      <text:p text:style-name="P54">The orb brightened.</text:p>
      <text:p text:style-name="P54"/>
      <text:p text:style-name="P54">"Agreed."</text:p>
      <text:p text:style-name="P54"/>
      <text:p text:style-name="P54">"No speeches."</text:p>
      <text:p text:style-name="P54"/>
      <text:p text:style-name="P54">"Agreed."</text:p>
      <text:p text:style-name="P54"/>
      <text:p text:style-name="P54">"No recruiting."</text:p>
      <text:p text:style-name="P54"/>
      <text:p text:style-name="P54">"Agreed."</text:p>
      <text:p text:style-name="P54"/>
      <text:p text:style-name="P54">"No civilization-saving discussions."</text:p>
      <text:p text:style-name="P54"/>
      <text:p text:style-name="P54">"Agreed."</text:p>
      <text:p text:style-name="P54"/>
      <text:p text:style-name="P54">"We fix her."</text:p>
      <text:p text:style-name="P54"/>
      <text:p text:style-name="P54">The orb floated slightly higher.</text:p>
      <text:p text:style-name="P54"/>
      <text:p text:style-name="P54">"And then?"</text:p>
      <text:p text:style-name="P54"/>
      <text:p text:style-name="P54">Elias grinned.</text:p>
      <text:p text:style-name="P54"/>
      <text:p text:style-name="P54">The grin looked remarkably similar to the one he'd worn before launching software products that disrupted entire industries.</text:p>
      <text:p text:style-name="P54"><text:soft-page-break/></text:p>
      <text:p text:style-name="P54">"Then we wait."</text:p>
      <text:p text:style-name="P54"/>
      <text:p text:style-name="P54">"For what?"</text:p>
      <text:p text:style-name="P54"/>
      <text:p text:style-name="P54">He pointed at Marcus Webb.</text:p>
      <text:p text:style-name="P54"/>
      <text:p text:style-name="P54">"We wait for him."</text:p>
      <text:p text:style-name="P54"/>
      <text:p text:style-name="P54">The orb became very still.</text:p>
      <text:p text:style-name="P54"/>
      <text:p text:style-name="P54">Then a warm gold.</text:p>
      <text:p text:style-name="P54"/>
      <text:p text:style-name="P54">Amusement.</text:p>
      <text:p text:style-name="P54"/>
      <text:p text:style-name="P54">Recognition.</text:p>
      <text:p text:style-name="P54"/>
      <text:p text:style-name="P54">Understanding.</text:p>
      <text:p text:style-name="P54"/>
      <text:p text:style-name="P54">Because Marcus Webb was exactly the sort of man who would ignore promises.</text:p>
      <text:p text:style-name="P54"/>
      <text:p text:style-name="P54">Ignore theories.</text:p>
      <text:p text:style-name="P54"/>
      <text:p text:style-name="P54">Ignore strangers.</text:p>
      <text:p text:style-name="P54"/>
      <text:p text:style-name="P54">But he would absolutely investigate a miracle.</text:p>
      <text:p text:style-name="P54"/>
      <text:p text:style-name="P54">And unlike most miracles...</text:p>
      <text:p text:style-name="P54"/>
      <text:p text:style-name="P54">This one was real.</text:p>
      <text:p text:style-name="P54"/>
      <text:p text:style-name="P54">=================</text:p>
      <text:p text:style-name="P54"/>
      <text:p text:style-name="P54"/>
      <text:p text:style-name="P54"/>
      <text:p text:style-name="P54"/>
      <text:p text:style-name="P54"/>
      <text:p text:style-name="P54">The person Marcus cared about most in the camp wasn't his closest friend.</text:p>
      <text:p text:style-name="P54">It was an older woman named Gloria.</text:p>
      <text:p text:style-name="P54">Sixty-two.</text:p>
      <text:p text:style-name="P54">Diabetic.</text:p>
      <text:p text:style-name="P54">Living in a tent that leaks whenever it rains.</text:p>
      <text:p text:style-name="P54">One of the few people in the encampment who still tries to keep herself neat.</text:p>
      <text:p text:style-name="P54">Marcus checks on her every day.</text:p>
      <text:p text:style-name="P54">Not because anyone asked him to.</text:p>
      <text:p text:style-name="P54">Because somebody has to.</text:p>
      <text:p text:style-name="P54"/>
      <text:p text:style-name="P54">Three days earlier Gloria had developed a serious infection in her left foot.</text:p>
      <text:p text:style-name="P54">Marcus knew it.</text:p>
      <text:p text:style-name="P54">Gloria knew it.</text:p>
      <text:p text:style-name="P54">Everyone knew it.</text:p>
      <text:p text:style-name="P54">Nobody could do much about it.</text:p>
      <text:p text:style-name="P54">The emergency room would patch her up and send her back.</text:p>
      <text:p text:style-name="P54">Assuming she could even get there.</text:p>
      <text:p text:style-name="P54"/>
      <text:p text:style-name="P54">Marcus had been quietly preparing himself for the possibility that she might lose the foot.</text:p>
      <text:p text:style-name="P54">Or worse.</text:p>
      <text:p text:style-name="P54">Then something strange happened.</text:p>
      <text:p text:style-name="P54">She disappeared.</text:p>
      <text:p text:style-name="P54">Not permanently.</text:p>
      <text:p text:style-name="P54">Just for one afternoon.</text:p>
      <text:p text:style-name="P54"><text:soft-page-break/></text:p>
      <text:p text:style-name="P54">When she came back she was smiling.</text:p>
      <text:p text:style-name="P54">Actually smiling.</text:p>
      <text:p text:style-name="P54">Marcus couldn't remember the last time he'd seen that.</text:p>
      <text:p text:style-name="P54">"Where were you?"</text:p>
      <text:p text:style-name="P54">"Doctor."</text:p>
      <text:p text:style-name="P54">"What doctor?"</text:p>
      <text:p text:style-name="P54">She shrugged.</text:p>
      <text:p text:style-name="P54">"Some guy."</text:p>
      <text:p text:style-name="P54">"What guy?"</text:p>
      <text:p text:style-name="P54"/>
      <text:p text:style-name="P54">"The nice &amp; smart one."</text:p>
      <text:p text:style-name="P54">"That's helpful."</text:p>
      <text:p text:style-name="P54">"The alien was there too."</text:p>
      <text:p text:style-name="P54">Marcus stared at her.</text:p>
      <text:p text:style-name="P54">"The what?"</text:p>
      <text:p text:style-name="P54">"The alien."</text:p>
      <text:p text:style-name="P54">"Gloria."</text:p>
      <text:p text:style-name="P54">"I'm serious."</text:p>
      <text:p text:style-name="P54"/>
      <text:p text:style-name="P54">Marcus decided the infection had probably reached her brain.</text:p>
      <text:p text:style-name="P54"/>
      <text:p text:style-name="P54">---</text:p>
      <text:p text:style-name="P54"/>
      <text:p text:style-name="P54">The next morning Gloria walked across the camp carrying two grocery bags.</text:p>
      <text:p text:style-name="P54">Walking normally.</text:p>
      <text:p text:style-name="P54">No limp.</text:p>
      <text:p text:style-name="P54">No pain.</text:p>
      <text:p text:style-name="P54">No bandages.</text:p>
      <text:p text:style-name="P54">Nothing.</text:p>
      <text:p text:style-name="P54">Marcus watched her approach.</text:p>
      <text:p text:style-name="P54"/>
      <text:p text:style-name="P54">Something cold settled into his stomach.</text:p>
      <text:p text:style-name="P54">Because he knew what he had seen two days earlier.</text:p>
      <text:p text:style-name="P54">And this wasn't possible.</text:p>
      <text:p text:style-name="P54">"Show me your foot."</text:p>
      <text:p text:style-name="P54">Gloria laughed.</text:p>
      <text:p text:style-name="P54">"Buy me dinner first."</text:p>
      <text:p text:style-name="P54">"Gloria."</text:p>
      <text:p text:style-name="P54"/>
      <text:p text:style-name="P54">She sat down and removed her shoe.</text:p>
      <text:p text:style-name="P54">Marcus stared.</text:p>
      <text:p text:style-name="P54">The infection was gone.</text:p>
      <text:p text:style-name="P54">Not improved.</text:p>
      <text:p text:style-name="P54">Gone.</text:p>
      <text:p text:style-name="P54">The skin looked healthier than it had in years.</text:p>
      <text:p text:style-name="P54"/>
      <text:p text:style-name="P54">He slowly looked up.</text:p>
      <text:p text:style-name="P54">"Who did this?"</text:p>
      <text:p text:style-name="P54">She pointed.</text:p>
      <text:p text:style-name="P54">Across the street.</text:p>
      <text:p text:style-name="P54">Near a small coffee stand.</text:p>
      <text:p text:style-name="P54">A man sat at a table drinking coffee.</text:p>
      <text:p text:style-name="P54"/>
      <text:p text:style-name="P54">Medium height, about 50 years old, thin, fit, not rich looking - looking like a slightly younger version of that actor who played that astronaut guy in that old movie - what was his name ? <text:s text:c="2"/>ah .... Ed Harris. <text:s/>Bald on top, thin face, but not a guy to mess with Marcus thought.</text:p>
      <text:p text:style-name="P54"/>
      <text:p text:style-name="P54"/>
      <text:p text:style-name="P54"/>
      <text:p text:style-name="P54"/>
      <text:p text:style-name="P54"><text:soft-page-break/></text:p>
      <text:p text:style-name="P54"/>
      <text:p text:style-name="P54"/>
      <text:p text:style-name="P54"/>
      <text:p text:style-name="P54"/>
      <text:p text:style-name="P54">Marcus crossed the street.</text:p>
      <text:p text:style-name="P54">The man looked up.</text:p>
      <text:p text:style-name="P54">"Marcus Webb."</text:p>
      <text:p text:style-name="P54">Marcus didn't sit.</text:p>
      <text:p text:style-name="P54">"Who are you?"</text:p>
      <text:p text:style-name="P54">"Elias Mercer."</text:p>
      <text:p text:style-name="P54">"How'd you fix Gloria's foot?"</text:p>
      <text:p text:style-name="P54"/>
      <text:p text:style-name="P54">Elias pointed at the empty chair.</text:p>
      <text:p text:style-name="P54">Marcus remained standing.</text:p>
      <text:p text:style-name="P54">Elias nodded.</text:p>
      <text:p text:style-name="P54">"Fair enough."</text:p>
      <text:p text:style-name="P54">"Answer the question."</text:p>
      <text:p text:style-name="P54">"I helped."</text:p>
      <text:p text:style-name="P54">"Nobody helps like that."</text:p>
      <text:p text:style-name="P54">"You're right."</text:p>
      <text:p text:style-name="P54"/>
      <text:p text:style-name="P54">Marcus studied him.</text:p>
      <text:p text:style-name="P54">Everything about the man felt wrong.</text:p>
      <text:p text:style-name="P54">Not dangerous.</text:p>
      <text:p text:style-name="P54">Not threatening.</text:p>
      <text:p text:style-name="P54">Just...</text:p>
      <text:p text:style-name="P54">Certain.</text:p>
      <text:p text:style-name="P54"/>
      <text:p text:style-name="P54">Like somebody who already knew how the conversation would end.</text:p>
      <text:p text:style-name="P54">"Why Gloria?"</text:p>
      <text:p text:style-name="P54">Marcus asked.</text:p>
      <text:p text:style-name="P54">"Because she needed help."</text:p>
      <text:p text:style-name="P54">Marcus shook his head.</text:p>
      <text:p text:style-name="P54">"No."</text:p>
      <text:p text:style-name="P54"/>
      <text:p text:style-name="P54">His voice hardened.</text:p>
      <text:p text:style-name="P54"/>
      <text:p text:style-name="P54">"Why Gloria?"</text:p>
      <text:p text:style-name="P54">Elias smiled slightly.</text:p>
      <text:p text:style-name="P54">Now they were getting somewhere.</text:p>
      <text:p text:style-name="P54">"Because," he said quietly, "I knew if I helped you, you'd wonder what I wanted."</text:p>
      <text:p text:style-name="P54">Marcus said nothing.</text:p>
      <text:p text:style-name="P54">"Helping Gloria was more efficient."</text:p>
      <text:p text:style-name="P54">For the first time Marcus almost laughed.</text:p>
      <text:p text:style-name="P54">Against his will.</text:p>
      <text:p text:style-name="P54">A little bark of amusement escaped.</text:p>
      <text:p text:style-name="P54"/>
      <text:p text:style-name="P54">"That's your plan?"</text:p>
      <text:p text:style-name="P54"/>
      <text:p text:style-name="P54">"It appears to be working."</text:p>
      <text:p text:style-name="P54">Marcus stared at him.</text:p>
      <text:p text:style-name="P54">Then finally sat down.</text:p>
      <text:p text:style-name="P54">Not because he trusted him.</text:p>
      <text:p text:style-name="P54">Not even close.</text:p>
      <text:p text:style-name="P54">But because for the first time in years something genuinely impossible had happened.</text:p>
      <text:p text:style-name="P54">And because anybody who could give Gloria her foot back deserved at least one conversation.</text:p>
      <text:p text:style-name="P54"/>
      <text:p text:style-name="P54">As Marcus lowered himself into the chair, a small sphere about the size of a bowling ball drifted silently around the corner of the building and stopped right beside Elias where no passerbys could see it.</text:p>
      <text:p text:style-name="P54">Marcus blinked once.</text:p>
      <text:p text:style-name="P54"><text:soft-page-break/>Twice.</text:p>
      <text:p text:style-name="P54">Then looked at Elias.</text:p>
      <text:p text:style-name="P54">Then looked at the sphere.</text:p>
      <text:p text:style-name="P54">Then back at Elias.</text:p>
      <text:p text:style-name="P54">Elias took a sip of coffee.</text:p>
      <text:p text:style-name="P54">"That's Opi."</text:p>
      <text:p text:style-name="P54"/>
      <text:p text:style-name="P54">Marcus rubbed his face.</text:p>
      <text:p text:style-name="P54"/>
      <text:p text:style-name="P54">"Of course it is."</text:p>
      <text:p text:style-name="P54">The sphere spoke.</text:p>
      <text:p text:style-name="P54">"Good morning, Marcus."</text:p>
      <text:p text:style-name="P54">Marcus stared at it for several seconds.</text:p>
      <text:p text:style-name="P54">Then sighed.</text:p>
      <text:p text:style-name="P54">"You know what?"</text:p>
      <text:p text:style-name="P54"/>
      <text:p text:style-name="P54">"What?"</text:p>
      <text:p text:style-name="P54"/>
      <text:p text:style-name="P54">"If Gloria starts levitating too, I'm leaving."</text:p>
      <text:p text:style-name="P54">For the first time, Opi laughed.</text:p>
      <text:p text:style-name="P54">And despite himself, Marcus smiled.</text:p>
      <text:p text:style-name="P54"/>
      <text:p text:style-name="P54"/>
      <text:p text:style-name="P54"/>
      <text:p text:style-name="P54">-- MARCUS</text:p>
      <text:p text:style-name="P54">Sodo Encampment, Seattle — 3:14 AM</text:p>
      <text:p text:style-name="P54"/>
      <text:p text:style-name="P54">Marcus Webb woke up the way he always did — fast and afraid, heart hammering, reaching for Carol before remembering.</text:p>
      <text:p text:style-name="P54"/>
      <text:p text:style-name="P54">Always remembering.</text:p>
      <text:p text:style-name="P54"/>
      <text:p text:style-name="P54">He lay in the dark of his tent listening to the rain on the nylon and the distant sound of the interstate and did the thing he did every night where he tried to find one reason to get up in the morning.</text:p>
      <text:p text:style-name="P54"/>
      <text:p text:style-name="P54">He was still looking when he felt it.</text:p>
      <text:p text:style-name="P54"/>
      <text:p text:style-name="P54">Not pain. The opposite of pain. A warmth that started in the center of his chest and moved outward slowly like the first swallow of something good. He sat up. Put his hand on his sternum. His heart was beating differently — not faster, not slower, just cleaner somehow. Like something that had been slightly wrong for a very long time had been quietly corrected.</text:p>
      <text:p text:style-name="P54"/>
      <text:p text:style-name="P54">In a small building in the warehouse district, Opi &amp; Elias sat in their newly purchased building and watched Marcus on a series of projections opi had created which showed the entire scene from different angles and perspectives. <text:s/>in other views there were real time feeds of all of Marcus's vitals. <text:s/>It was like some kind of futuristic high tech hospital control room.</text:p>
      <text:p text:style-name="P54"/>
      <text:p text:style-name="P54">"What are you doing?" he whispered.</text:p>
      <text:p text:style-name="P54"/>
      <text:p text:style-name="P54">"His cortisol levels were at chronic crisis elevation," Opi said quietly. "Four years of sustained grief and trauma had dysregulated his neurological baseline so severely that he was physiologically incapable of feeling safe regardless of external circumstances. I have recalibrated his autonomic nervous system to its pre-loss baseline. He will not know what happened. He will only know that something has shifted."</text:p>
      <text:p text:style-name="P54"/>
      <text:p text:style-name="P54">"Is that —" Elias stopped. "Did he consent to that?"</text:p>
      <text:p text:style-name="P54"/>
      <text:p text:style-name="P54">"He has wished to feel better every day for four years," Opi said. "I am choosing to consider that consent. You may challenge me on this later. Right now watch."</text:p>
      <text:p text:style-name="P54"/>
      <text:p text:style-name="P54">---</text:p>
      <text:p text:style-name="P54"/>
      <text:p text:style-name="P54"><text:soft-page-break/>In the tent Marcus sat very still for a long time.</text:p>
      <text:p text:style-name="P54"/>
      <text:p text:style-name="P54">Then he picked up his phone — cracked screen, 4% battery — and opened it for the first time to the voicemail from his sister Linda that he'd never listened to.</text:p>
      <text:p text:style-name="P54"/>
      <text:p text:style-name="P54">He didn't know why. He just did it.</text:p>
      <text:p text:style-name="P54"/>
      <text:p text:style-name="P54">Her voice came out of the speaker and she was crying a little and she said Marcus I'm not calling to fix anything I'm just calling because I miss my brother and whenever you're ready I'm here and then it ended.</text:p>
      <text:p text:style-name="P54"/>
      <text:p text:style-name="P54">He sat with that for a while.</text:p>
      <text:p text:style-name="P54"/>
      <text:p text:style-name="P54">Then Opi moved.</text:p>
      <text:p text:style-name="P54"/>
      <text:p text:style-name="P54">Into his phone. Into every database simultaneously. DMV, Social Security, banks, King County housing registry, VA records, criminal background — she didn't erase his history, she clarified it, cleaned it, highlighting every strength, every qualification, every legitimate pathway that bureaucratic noise had buried. In less than a <text:s/>second she completed what would have taken a team of dedicated professionals four weeks.</text:p>
      <text:p text:style-name="P54"/>
      <text:p text:style-name="P54">His phone buzzed. A text from an unknown number:</text:p>
      <text:p text:style-name="P54"/>
      <text:p text:style-name="P54">"Studio apartment. Beacon Hill. Already approved and prepaid for the next 6 months. Your name on the lease. Landlord is Gerald Fitch. Call him at 8am. He's expecting you."</text:p>
      <text:p text:style-name="P54"/>
      <text:p text:style-name="P54">Marcus stared at it.</text:p>
      <text:p text:style-name="P54"/>
      <text:p text:style-name="P54">"Who is this?" he typed back.</text:p>
      <text:p text:style-name="P54"/>
      <text:p text:style-name="P54">The reply came immediately: <text:s/>Opi and Elias.</text:p>
      <text:p text:style-name="P54"/>
      <text:p text:style-name="P54">Marcus re-read the original message twice. Then he did something he hadn't done in four years.</text:p>
      <text:p text:style-name="P54">He made a plan for the day to come.</text:p>
      <text:p text:style-name="P54"/>
      <text:p text:style-name="P66"/>
      <text:p text:style-name="P23"/>
      <text:p text:style-name="P56"/>
      <text:p text:style-name="P56"><text:span text:style-name="T68">Chapter 25 <text:s text:c="3"/></text:span>Fernando Reyes</text:p>
      <text:p text:style-name="P54"/>
      <text:p text:style-name="P54">Fernando Reyes sat in the driver's seat of his Honda Civic and listened to the engine make a noise it definitely wasn't supposed to make.</text:p>
      <text:p text:style-name="P54"/>
      <text:p text:style-name="P54">"Please don't."</text:p>
      <text:p text:style-name="P54"/>
      <text:p text:style-name="P54">The engine ignored him.</text:p>
      <text:p text:style-name="P54"/>
      <text:p text:style-name="P54">The rattling continued.</text:p>
      <text:p text:style-name="P54"/>
      <text:p text:style-name="P54">Fernando <text:s/>closed his eyes.</text:p>
      <text:p text:style-name="P54"/>
      <text:p text:style-name="P54">The car had two hundred and eighty thousand miles on it.</text:p>
      <text:p text:style-name="P54"/>
      <text:p text:style-name="P54">The check engine light had been on so long it felt like part of the dashboard.</text:p>
      <text:p text:style-name="P54"/>
      <text:p text:style-name="P54">The air conditioning didn't work.</text:p>
      <text:p text:style-name="P54"/>
      <text:p text:style-name="P54">One window wouldn't roll down.</text:p>
      <text:p text:style-name="P54"/>
      <text:p text:style-name="P54">The transmission occasionally made decisions without consulting him.</text:p>
      <text:p text:style-name="P54"/>
      <text:p text:style-name="P54"><text:soft-page-break/>And now there was a new noise.</text:p>
      <text:p text:style-name="P54"/>
      <text:p text:style-name="P54">Wonderful.</text:p>
      <text:p text:style-name="P54"/>
      <text:p text:style-name="P54">He shut the engine off.</text:p>
      <text:p text:style-name="P54"/>
      <text:p text:style-name="P54">For a moment he simply sat there.</text:p>
      <text:p text:style-name="P54"/>
      <text:p text:style-name="P54">The DoorDash app showed another delivery.</text:p>
      <text:p text:style-name="P54"/>
      <text:p text:style-name="P54">Eight dollars and twenty-three cents.</text:p>
      <text:p text:style-name="P54"/>
      <text:p text:style-name="P54">Twenty-seven minutes.</text:p>
      <text:p text:style-name="P54"/>
      <text:p text:style-name="P54">Across town.</text:p>
      <text:p text:style-name="P54"/>
      <text:p text:style-name="P54">Fernando declined it.</text:p>
      <text:p text:style-name="P54"/>
      <text:p text:style-name="P54">He was tired.</text:p>
      <text:p text:style-name="P54"/>
      <text:p text:style-name="P54">Not physically.</text:p>
      <text:p text:style-name="P54"/>
      <text:p text:style-name="P54">Not completely.</text:p>
      <text:p text:style-name="P54"/>
      <text:p text:style-name="P54">Just tired.</text:p>
      <text:p text:style-name="P54"/>
      <text:p text:style-name="P54">Twenty-eight years old and everything felt harder than it was supposed to.</text:p>
      <text:p text:style-name="P54"/>
      <text:p text:style-name="P54">The jobs paid less.</text:p>
      <text:p text:style-name="P54"/>
      <text:p text:style-name="P54">The rent cost more.</text:p>
      <text:p text:style-name="P54"/>
      <text:p text:style-name="P54">The future looked smaller.</text:p>
      <text:p text:style-name="P54"/>
      <text:p text:style-name="P54">Nobody ever said it directly.</text:p>
      <text:p text:style-name="P54"/>
      <text:p text:style-name="P54">But everybody seemed to know.</text:p>
      <text:p text:style-name="P54"/>
      <text:p text:style-name="P54">The game wasn't working anymore.</text:p>
      <text:p text:style-name="P54"/>
      <text:p text:style-name="P54">---</text:p>
      <text:p text:style-name="P54"/>
      <text:p text:style-name="P54">His phone buzzed.</text:p>
      <text:p text:style-name="P54"/>
      <text:p text:style-name="P54">His mother.</text:p>
      <text:p text:style-name="P54"/>
      <text:p text:style-name="P54">Fernando <text:s/>answered.</text:p>
      <text:p text:style-name="P54"/>
      <text:p text:style-name="P54">"Hey Mom."</text:p>
      <text:p text:style-name="P54"/>
      <text:p text:style-name="P54">"Are you coming home for dinner?"</text:p>
      <text:p text:style-name="P54"/>
      <text:p text:style-name="P54">Home.</text:p>
      <text:p text:style-name="P54"/>
      <text:p text:style-name="P54">The word still bothered him.</text:p>
      <text:p text:style-name="P54"/>
      <text:p text:style-name="P54">Not because he disliked his mother.</text:p>
      <text:p text:style-name="P54"/>
      <text:p text:style-name="P54">He loved her.</text:p>
      <text:p text:style-name="P54"/>
      <text:p text:style-name="P54">Always would.</text:p>
      <text:p text:style-name="P54"><text:soft-page-break/></text:p>
      <text:p text:style-name="P54">The problem was that a twenty-eight-year-old man wasn't supposed to live in his childhood bedroom.</text:p>
      <text:p text:style-name="P54"/>
      <text:p text:style-name="P54">At least that was what he had always believed.</text:p>
      <text:p text:style-name="P54"/>
      <text:p text:style-name="P54">Life had other plans.</text:p>
      <text:p text:style-name="P54"/>
      <text:p text:style-name="P54">"Yeah."</text:p>
      <text:p text:style-name="P54"/>
      <text:p text:style-name="P54">"Good."</text:p>
      <text:p text:style-name="P54"/>
      <text:p text:style-name="P54">A pause.</text:p>
      <text:p text:style-name="P54"/>
      <text:p text:style-name="P54">"You sound tired."</text:p>
      <text:p text:style-name="P54"/>
      <text:p text:style-name="P54">"I'm fine."</text:p>
      <text:p text:style-name="P54"/>
      <text:p text:style-name="P54">She didn't believe him.</text:p>
      <text:p text:style-name="P54"/>
      <text:p text:style-name="P54">Neither did he.</text:p>
      <text:p text:style-name="P54"/>
      <text:p text:style-name="P54">---</text:p>
      <text:p text:style-name="P54"/>
      <text:p text:style-name="P54">The house looked exactly the same as it had when he was twelve.</text:p>
      <text:p text:style-name="P54"/>
      <text:p text:style-name="P54">Same porch.</text:p>
      <text:p text:style-name="P54"/>
      <text:p text:style-name="P54">Same driveway.</text:p>
      <text:p text:style-name="P54"/>
      <text:p text:style-name="P54">Same maple tree.</text:p>
      <text:p text:style-name="P54"/>
      <text:p text:style-name="P54">Different future.</text:p>
      <text:p text:style-name="P54"/>
      <text:p text:style-name="P54">His mother hugged him when he came inside.</text:p>
      <text:p text:style-name="P54"/>
      <text:p text:style-name="P54">The smell of dinner filled the kitchen.</text:p>
      <text:p text:style-name="P54"/>
      <text:p text:style-name="P54">For a moment he was ten years old again.</text:p>
      <text:p text:style-name="P54"/>
      <text:p text:style-name="P54">Safe.</text:p>
      <text:p text:style-name="P54"/>
      <text:p text:style-name="P54">Protected.</text:p>
      <text:p text:style-name="P54"/>
      <text:p text:style-name="P54">Certain that adults understood what they were doing.</text:p>
      <text:p text:style-name="P54"/>
      <text:p text:style-name="P54">Then reality returned.</text:p>
      <text:p text:style-name="P54"/>
      <text:p text:style-name="P54">His mother asked about work.</text:p>
      <text:p text:style-name="P54"/>
      <text:p text:style-name="P54">Fernando <text:s/>lied.</text:p>
      <text:p text:style-name="P54"/>
      <text:p text:style-name="P54">"Busy."</text:p>
      <text:p text:style-name="P54"/>
      <text:p text:style-name="P54">She nodded.</text:p>
      <text:p text:style-name="P54"/>
      <text:p text:style-name="P54">The lie was familiar.</text:p>
      <text:p text:style-name="P54"/>
      <text:p text:style-name="P54">They both knew it.</text:p>
      <text:p text:style-name="P54"/>
      <text:p text:style-name="P54">Neither mentioned it.</text:p>
      <text:p text:style-name="P54"/>
      <text:p text:style-name="P54"><text:soft-page-break/>---</text:p>
      <text:p text:style-name="P54"/>
      <text:p text:style-name="P54">Later that evening he found himself staring at an old family photograph.</text:p>
      <text:p text:style-name="P54"/>
      <text:p text:style-name="P54">His father stood beside his mother.</text:p>
      <text:p text:style-name="P54"/>
      <text:p text:style-name="P54">Both smiling.</text:p>
      <text:p text:style-name="P54"/>
      <text:p text:style-name="P54">Fernando <text:s/>remembered that day.</text:p>
      <text:p text:style-name="P54"/>
      <text:p text:style-name="P54">The camping trip.</text:p>
      <text:p text:style-name="P54"/>
      <text:p text:style-name="P54">The fishing.</text:p>
      <text:p text:style-name="P54"/>
      <text:p text:style-name="P54">The laughter.</text:p>
      <text:p text:style-name="P54"/>
      <text:p text:style-name="P54">The feeling that his family would last forever.</text:p>
      <text:p text:style-name="P54"/>
      <text:p text:style-name="P54">Instead the divorce came.</text:p>
      <text:p text:style-name="P54"/>
      <text:p text:style-name="P54">Then another relationship.</text:p>
      <text:p text:style-name="P54"/>
      <text:p text:style-name="P54">Then another.</text:p>
      <text:p text:style-name="P54"/>
      <text:p text:style-name="P54">Then another.</text:p>
      <text:p text:style-name="P54"/>
      <text:p text:style-name="P54">His father moved away.</text:p>
      <text:p text:style-name="P54"/>
      <text:p text:style-name="P54">His mother moved on.</text:p>
      <text:p text:style-name="P54"/>
      <text:p text:style-name="P54">Everyone kept searching for something better.</text:p>
      <text:p text:style-name="P54"/>
      <text:p text:style-name="P54">Fernando <text:s/>wasn't even sure what "better" meant anymore.</text:p>
      <text:p text:style-name="P54"/>
      <text:p text:style-name="P54">The photograph showed two imperfect people.</text:p>
      <text:p text:style-name="P54"/>
      <text:p text:style-name="P54">At least they had been together.</text:p>
      <text:p text:style-name="P54"/>
      <text:p text:style-name="P54">At least they had tried.</text:p>
      <text:p text:style-name="P54"/>
      <text:p text:style-name="P54">He sometimes wondered if modern life had become a machine that took ordinary families apart and then acted surprised when nobody could put them back together.</text:p>
      <text:p text:style-name="P54"/>
      <text:p text:style-name="P54">---</text:p>
      <text:p text:style-name="P54"/>
      <text:p text:style-name="P54">That night he sat on the back porch.</text:p>
      <text:p text:style-name="P54"/>
      <text:p text:style-name="P54">The neighborhood was quiet.</text:p>
      <text:p text:style-name="P54"/>
      <text:p text:style-name="P54">A few lights glowed in distant windows.</text:p>
      <text:p text:style-name="P54"/>
      <text:p text:style-name="P54">Families.</text:p>
      <text:p text:style-name="P54"/>
      <text:p text:style-name="P54">Couples.</text:p>
      <text:p text:style-name="P54"/>
      <text:p text:style-name="P54">Children.</text:p>
      <text:p text:style-name="P54"/>
      <text:p text:style-name="P54">Lives.</text:p>
      <text:p text:style-name="P54"/>
      <text:p text:style-name="P54">Fernando <text:s/>looked up at the stars.</text:p>
      <text:p text:style-name="P54"/>
      <text:p text:style-name="P54"><text:soft-page-break/>When he was younger he had imagined a different future.</text:p>
      <text:p text:style-name="P54"/>
      <text:p text:style-name="P54">A wife.</text:p>
      <text:p text:style-name="P54"/>
      <text:p text:style-name="P54">Kids.</text:p>
      <text:p text:style-name="P54"/>
      <text:p text:style-name="P54">A house.</text:p>
      <text:p text:style-name="P54"/>
      <text:p text:style-name="P54">Nothing extravagant.</text:p>
      <text:p text:style-name="P54"/>
      <text:p text:style-name="P54">Just ordinary happiness.</text:p>
      <text:p text:style-name="P54"/>
      <text:p text:style-name="P54">The kind his grandparents seemed to have found without much effort.</text:p>
      <text:p text:style-name="P54"/>
      <text:p text:style-name="P54">Now even imagining it felt dangerous.</text:p>
      <text:p text:style-name="P54"/>
      <text:p text:style-name="P54">Hope was expensive.</text:p>
      <text:p text:style-name="P54"/>
      <text:p text:style-name="P54">Hope hurt when it failed.</text:p>
      <text:p text:style-name="P54"/>
      <text:p text:style-name="P54">And lately it always seemed to fail.</text:p>
      <text:p text:style-name="P54"/>
      <text:p text:style-name="P54">He rubbed his face.</text:p>
      <text:p text:style-name="P54"/>
      <text:p text:style-name="P54">Maybe things would improve.</text:p>
      <text:p text:style-name="P54"/>
      <text:p text:style-name="P54">Maybe next year.</text:p>
      <text:p text:style-name="P54"/>
      <text:p text:style-name="P54">Maybe after a better job.</text:p>
      <text:p text:style-name="P54"/>
      <text:p text:style-name="P54">Maybe after the car was fixed.</text:p>
      <text:p text:style-name="P54"/>
      <text:p text:style-name="P54">Maybe after something.</text:p>
      <text:p text:style-name="P54"/>
      <text:p text:style-name="P54">The problem was that every year seemed to begin with another maybe.</text:p>
      <text:p text:style-name="P54"/>
      <text:p text:style-name="P54">And end with another disappointment.</text:p>
      <text:p text:style-name="P54"/>
      <text:p text:style-name="P54">The sound of laughter drifted from a neighboring house.</text:p>
      <text:p text:style-name="P54"/>
      <text:p text:style-name="P54">Fernando <text:s/>listened quietly.</text:p>
      <text:p text:style-name="P54"/>
      <text:p text:style-name="P54">Then looked away.</text:p>
      <text:p text:style-name="P54"/>
      <text:p text:style-name="P54">For the first time in his life he found himself wondering whether some people simply weren't meant to build families of their own.</text:p>
      <text:p text:style-name="P54"/>
      <text:p text:style-name="P54">The thought frightened him.</text:p>
      <text:p text:style-name="P54"/>
      <text:p text:style-name="P54">Not because he believed it.</text:p>
      <text:p text:style-name="P54"/>
      <text:p text:style-name="P54">Because he was starting to.</text:p>
      <text:p text:style-name="P54"/>
      <text:p text:style-name="P54">And that was worse.</text:p>
      <text:p text:style-name="P54"/>
      <text:p text:style-name="P54">Much worse.</text:p>
      <text:p text:style-name="P54"/>
      <text:p text:style-name="P54">The porch grew darker as the evening wore on.</text:p>
      <text:p text:style-name="P54"/>
      <text:p text:style-name="P54">Eventually Fernando <text:s/>stood and headed inside.</text:p>
      <text:p text:style-name="P54"/>
      <text:p text:style-name="P54"><text:soft-page-break/>Tomorrow would be another day.</text:p>
      <text:p text:style-name="P54"/>
      <text:p text:style-name="P54">Another delivery.</text:p>
      <text:p text:style-name="P54"/>
      <text:p text:style-name="P54">Another bill.</text:p>
      <text:p text:style-name="P54"/>
      <text:p text:style-name="P54">Another maybe.</text:p>
      <text:p text:style-name="P66"/>
      <text:p text:style-name="P23"/>
      <text:p text:style-name="P56"/>
      <text:p text:style-name="P56"/>
      <text:p text:style-name="P56"/>
      <text:p text:style-name="P63"><text:span text:style-name="T11">Chapter 26 <text:s text:c="2"/></text:span><text:span text:style-name="T10">Factory Brainstorming <text:s/></text:span><text:span text:style-name="T12">7</text:span></text:p>
      <text:p text:style-name="P56"/>
      <text:p text:style-name="P54"/>
      <text:p text:style-name="P54">The discussion continued long after sunset.</text:p>
      <text:p text:style-name="P54"/>
      <text:p text:style-name="P54">The whiteboard was now completely covered.</text:p>
      <text:p text:style-name="P54"/>
      <text:p text:style-name="P54">Arrows.</text:p>
      <text:p text:style-name="P54"/>
      <text:p text:style-name="P54">Charts.</text:p>
      <text:p text:style-name="P54"/>
      <text:p text:style-name="P54">Questions.</text:p>
      <text:p text:style-name="P54"/>
      <text:p text:style-name="P54">Arguments.</text:p>
      <text:p text:style-name="P54"/>
      <text:p text:style-name="P54">Several terrible drawings by Elias.</text:p>
      <text:p text:style-name="P54"/>
      <text:p text:style-name="P54">One particularly offensive sketch labeled:</text:p>
      <text:p text:style-name="P54"/>
      <text:p text:style-name="P54">OPI'S INTERCONTINENTAL SPACE RV</text:p>
      <text:p text:style-name="P54"/>
      <text:p text:style-name="P54">which the orb had attempted to erase three separate times.</text:p>
      <text:p text:style-name="P54"/>
      <text:p text:style-name="P54">Each time Elias redrew it.</text:p>
      <text:p text:style-name="P54"/>
      <text:p text:style-name="P54">Larger.</text:p>
      <text:p text:style-name="P54"/>
      <text:p text:style-name="P54">With additional cup holders.</text:p>
      <text:p text:style-name="P54"/>
      <text:p text:style-name="P54">"I still hate that name."</text:p>
      <text:p text:style-name="P54"/>
      <text:p text:style-name="P54">"It is a magnificent name."</text:p>
      <text:p text:style-name="P54"/>
      <text:p text:style-name="P54">"It is not."</text:p>
      <text:p text:style-name="P54"/>
      <text:p text:style-name="P54">"It absolutely is."</text:p>
      <text:p text:style-name="P54"/>
      <text:p text:style-name="P54">The orb dimmed.</text:p>
      <text:p text:style-name="P54"/>
      <text:p text:style-name="P54">"I regret teaching you teleportation."</text:p>
      <text:p text:style-name="P54"/>
      <text:p text:style-name="P54">"You brought this on yourself."</text:p>
      <text:p text:style-name="P54"/>
      <text:p text:style-name="P54">For several moments they studied the board.</text:p>
      <text:p text:style-name="P54"/>
      <text:p text:style-name="P54">Then Elias tapped one section.</text:p>
      <text:p text:style-name="P54"/>
      <text:p text:style-name="P54">Transportation.</text:p>
      <text:p text:style-name="P54"/>
      <text:p text:style-name="P54"><text:soft-page-break/>"Okay."</text:p>
      <text:p text:style-name="P54"/>
      <text:p text:style-name="P54">"Let's assume the matching problem exists."</text:p>
      <text:p text:style-name="P54"/>
      <text:p text:style-name="P54">"Very well."</text:p>
      <text:p text:style-name="P54"/>
      <text:p text:style-name="P54">"Let's assume there are millions of compatible people around the world."</text:p>
      <text:p text:style-name="P54"/>
      <text:p text:style-name="P54">"Reasonable."</text:p>
      <text:p text:style-name="P54"/>
      <text:p text:style-name="P54">"Let's assume geography is the barrier."</text:p>
      <text:p text:style-name="P54"/>
      <text:p text:style-name="P54">"Frequently true."</text:p>
      <text:p text:style-name="P54"/>
      <text:p text:style-name="P54">Elias nodded.</text:p>
      <text:p text:style-name="P54"/>
      <text:p text:style-name="P54">"Then geography isn't actually a barrier."</text:p>
      <text:p text:style-name="P54"/>
      <text:p text:style-name="P54">"No."</text:p>
      <text:p text:style-name="P54"/>
      <text:p text:style-name="P54">The answer was immediate.</text:p>
      <text:p text:style-name="P54"/>
      <text:p text:style-name="P54">Teleportation had changed everything.</text:p>
      <text:p text:style-name="P54"/>
      <text:p text:style-name="P54">Distance no longer mattered.</text:p>
      <text:p text:style-name="P54"/>
      <text:p text:style-name="P54">Travel no longer mattered.</text:p>
      <text:p text:style-name="P54"/>
      <text:p text:style-name="P54">Flights no longer mattered.</text:p>
      <text:p text:style-name="P54"/>
      <text:p text:style-name="P54">Entire industries had effectively vanished as constraints.</text:p>
      <text:p text:style-name="P54"/>
      <text:p text:style-name="P54">The implications were absurd.</text:p>
      <text:p text:style-name="P54"/>
      <text:p text:style-name="P54">And getting more absurd by the day.</text:p>
      <text:p text:style-name="P54"/>
      <text:p text:style-name="P54">"So people can move."</text:p>
      <text:p text:style-name="P54"/>
      <text:p text:style-name="P54">"Yes."</text:p>
      <text:p text:style-name="P54"/>
      <text:p text:style-name="P54">"They can visit."</text:p>
      <text:p text:style-name="P54"/>
      <text:p text:style-name="P54">"Yes."</text:p>
      <text:p text:style-name="P54"/>
      <text:p text:style-name="P54">"They can meet."</text:p>
      <text:p text:style-name="P54"/>
      <text:p text:style-name="P54">"Yes."</text:p>
      <text:p text:style-name="P54"/>
      <text:p text:style-name="P54">The orb brightened.</text:p>
      <text:p text:style-name="P54"/>
      <text:p text:style-name="P54">"Provided they wish to."</text:p>
      <text:p text:style-name="P54"/>
      <text:p text:style-name="P54">"Of course."</text:p>
      <text:p text:style-name="P54"/>
      <text:p text:style-name="P54">Elias pointed toward another section of the board.</text:p>
      <text:p text:style-name="P54"/>
      <text:p text:style-name="P54">"And if some Old World bureaucracy decides to spend six years processing paperwork?"</text:p>
      <text:p text:style-name="P54"/>
      <text:p text:style-name="P54">The orb became silent.</text:p>
      <text:p text:style-name="P54"/>
      <text:p text:style-name="P54">The phrase Old World had started as a joke.</text:p>
      <text:p text:style-name="P54"><text:soft-page-break/></text:p>
      <text:p text:style-name="P54">Then it became a nickname.</text:p>
      <text:p text:style-name="P54"/>
      <text:p text:style-name="P54">Then it became shorthand.</text:p>
      <text:p text:style-name="P54"/>
      <text:p text:style-name="P54">Now even Opi occasionally used it.</text:p>
      <text:p text:style-name="P54"/>
      <text:p text:style-name="P54">The OW.</text:p>
      <text:p text:style-name="P54"/>
      <text:p text:style-name="P54">The collection of governments, institutions, bureaucracies, and legacy systems that had accumulated over centuries.</text:p>
      <text:p text:style-name="P54"/>
      <text:p text:style-name="P54">Some competent.</text:p>
      <text:p text:style-name="P54"/>
      <text:p text:style-name="P54">Some incompetent.</text:p>
      <text:p text:style-name="P54"/>
      <text:p text:style-name="P54">Most slow.</text:p>
      <text:p text:style-name="P54"/>
      <text:p text:style-name="P54">Very slow.</text:p>
      <text:p text:style-name="P54"/>
      <text:p text:style-name="P54">Opi finally answered.</text:p>
      <text:p text:style-name="P54"/>
      <text:p text:style-name="P54">"The Parallel is increasingly becoming its own jurisdiction."</text:p>
      <text:p text:style-name="P54"/>
      <text:p text:style-name="P54">Elias smiled.</text:p>
      <text:p text:style-name="P54"/>
      <text:p text:style-name="P54">"That's a very diplomatic way of saying it."</text:p>
      <text:p text:style-name="P54"/>
      <text:p text:style-name="P54">"I am attempting diplomacy."</text:p>
      <text:p text:style-name="P54"/>
      <text:p text:style-name="P54">"Badly."</text:p>
      <text:p text:style-name="P54"/>
      <text:p text:style-name="P54">The orb ignored him.</text:p>
      <text:p text:style-name="P54"/>
      <text:p text:style-name="P54">"The larger issue is not government approval."</text:p>
      <text:p text:style-name="P54"/>
      <text:p text:style-name="P54">"No?"</text:p>
      <text:p text:style-name="P54"/>
      <text:p text:style-name="P54">"No."</text:p>
      <text:p text:style-name="P54"/>
      <text:p text:style-name="P54">The lights brightened.</text:p>
      <text:p text:style-name="P54"/>
      <text:p text:style-name="P54">"The larger issue is voluntary participation."</text:p>
      <text:p text:style-name="P54"/>
      <text:p text:style-name="P54">That was classic Opi.</text:p>
      <text:p text:style-name="P54"/>
      <text:p text:style-name="P54">Always returning to agency.</text:p>
      <text:p text:style-name="P54"/>
      <text:p text:style-name="P54">Nobody would be forced.</text:p>
      <text:p text:style-name="P54"/>
      <text:p text:style-name="P54">Nobody would be manipulated.</text:p>
      <text:p text:style-name="P54"/>
      <text:p text:style-name="P54">Nobody would be compelled.</text:p>
      <text:p text:style-name="P54"/>
      <text:p text:style-name="P54">People could join.</text:p>
      <text:p text:style-name="P54"/>
      <text:p text:style-name="P54">Or not.</text:p>
      <text:p text:style-name="P54"/>
      <text:p text:style-name="P54">Their choice.</text:p>
      <text:p text:style-name="P54"/>
      <text:p text:style-name="P54">Always.</text:p>
      <text:p text:style-name="P54"><text:soft-page-break/></text:p>
      <text:p text:style-name="P54">"</text:p>
      <text:p text:style-name="P54"/>
      <text:p text:style-name="P54">The board remained covered with obstacles.</text:p>
      <text:p text:style-name="P54"/>
      <text:p text:style-name="P54">Most of them now crossed out.</text:p>
      <text:p text:style-name="P54"/>
      <text:p text:style-name="P54">Distance.</text:p>
      <text:p text:style-name="P54"/>
      <text:p text:style-name="P54">Solved.</text:p>
      <text:p text:style-name="P54"/>
      <text:p text:style-name="P54">Travel.</text:p>
      <text:p text:style-name="P54"/>
      <text:p text:style-name="P54">Solved.</text:p>
      <text:p text:style-name="P54"/>
      <text:p text:style-name="P54">Safety.</text:p>
      <text:p text:style-name="P54"/>
      <text:p text:style-name="P54">Solved.</text:p>
      <text:p text:style-name="P54"/>
      <text:p text:style-name="P54">Transportation.</text:p>
      <text:p text:style-name="P54"/>
      <text:p text:style-name="P54">Solved.</text:p>
      <text:p text:style-name="P54"/>
      <text:p text:style-name="P54">Then Elias noticed something.</text:p>
      <text:p text:style-name="P54"/>
      <text:p text:style-name="P54">One remaining item.</text:p>
      <text:p text:style-name="P54"/>
      <text:p text:style-name="P54">Language.</text:p>
      <text:p text:style-name="P54"/>
      <text:p text:style-name="P54">He pointed.</text:p>
      <text:p text:style-name="P54"/>
      <text:p text:style-name="P54">"Okay."</text:p>
      <text:p text:style-name="P54"/>
      <text:p text:style-name="P54">"This one."</text:p>
      <text:p text:style-name="P54"/>
      <text:p text:style-name="P54">"What about it?"</text:p>
      <text:p text:style-name="P54"/>
      <text:p text:style-name="P54">"If somebody from another country arrives here..."</text:p>
      <text:p text:style-name="P54"/>
      <text:p text:style-name="P54">"Yes."</text:p>
      <text:p text:style-name="P54"/>
      <text:p text:style-name="P54">"And they don't speak English."</text:p>
      <text:p text:style-name="P54"/>
      <text:p text:style-name="P54">"Yes."</text:p>
      <text:p text:style-name="P54"/>
      <text:p text:style-name="P54">"That seems like a problem."</text:p>
      <text:p text:style-name="P54"/>
      <text:p text:style-name="P54">"It is."</text:p>
      <text:p text:style-name="P54"/>
      <text:p text:style-name="P54">"How big?"</text:p>
      <text:p text:style-name="P54"/>
      <text:p text:style-name="P54">The orb became suspiciously quiet.</text:p>
      <text:p text:style-name="P54"/>
      <text:p text:style-name="P54">A warning sign.</text:p>
      <text:p text:style-name="P54"/>
      <text:p text:style-name="P54">Elias narrowed his eyes.</text:p>
      <text:p text:style-name="P54"/>
      <text:p text:style-name="P54">"What?"</text:p>
      <text:p text:style-name="P54"/>
      <text:p text:style-name="P54">"Nothing."</text:p>
      <text:p text:style-name="P54"/>
      <text:p text:style-name="P54"><text:soft-page-break/>"What?"</text:p>
      <text:p text:style-name="P54"/>
      <text:p text:style-name="P54">"Nothing."</text:p>
      <text:p text:style-name="P54"/>
      <text:p text:style-name="P54">"Opi."</text:p>
      <text:p text:style-name="P54"/>
      <text:p text:style-name="P54">The orb rotated away.</text:p>
      <text:p text:style-name="P54"/>
      <text:p text:style-name="P54">"Opi."</text:p>
      <text:p text:style-name="P54"/>
      <text:p text:style-name="P54">"It is not important."</text:p>
      <text:p text:style-name="P54"/>
      <text:p text:style-name="P54">That immediately told him it was important.</text:p>
      <text:p text:style-name="P54"/>
      <text:p text:style-name="P54">"What aren't you telling me?"</text:p>
      <text:p text:style-name="P54"/>
      <text:p text:style-name="P54">The orb remained silent.</text:p>
      <text:p text:style-name="P54"/>
      <text:p text:style-name="P54">"Opi."</text:p>
      <text:p text:style-name="P54"/>
      <text:p text:style-name="P54">A pause.</text:p>
      <text:p text:style-name="P54"/>
      <text:p text:style-name="P54">Then:</text:p>
      <text:p text:style-name="P54"/>
      <text:p text:style-name="P54">"The former homeless have already solved that problem."</text:p>
      <text:p text:style-name="P54"/>
      <text:p text:style-name="P54">Elias froze.</text:p>
      <text:p text:style-name="P54"/>
      <text:p text:style-name="P54">"What?"</text:p>
      <text:p text:style-name="P54"/>
      <text:p text:style-name="P54">"The villages."</text:p>
      <text:p text:style-name="P54"/>
      <text:p text:style-name="P54">"What villages?"</text:p>
      <text:p text:style-name="P54"/>
      <text:p text:style-name="P54">"The villages."</text:p>
      <text:p text:style-name="P54"/>
      <text:p text:style-name="P54">"The villages I visit every week?"</text:p>
      <text:p text:style-name="P54"/>
      <text:p text:style-name="P54">"Yes."</text:p>
      <text:p text:style-name="P54"/>
      <text:p text:style-name="P54">Elias stared at her.</text:p>
      <text:p text:style-name="P54"/>
      <text:p text:style-name="P54">"What exactly are you talking about?"</text:p>
      <text:p text:style-name="P54"/>
      <text:p text:style-name="P54">The orb dimmed.</text:p>
      <text:p text:style-name="P54"/>
      <text:p text:style-name="P54">Then projected a small silver disk.</text:p>
      <text:p text:style-name="P54"/>
      <text:p text:style-name="P54">Approximately the size of a drink coaster.</text:p>
      <text:p text:style-name="P54"/>
      <text:p text:style-name="P54">"What is that?"</text:p>
      <text:p text:style-name="P54"/>
      <text:p text:style-name="P54">"A learning disk."</text:p>
      <text:p text:style-name="P54"/>
      <text:p text:style-name="P54">Elias blinked.</text:p>
      <text:p text:style-name="P54"/>
      <text:p text:style-name="P54">"A what?"</text:p>
      <text:p text:style-name="P54"/>
      <text:p text:style-name="P54">"A learning disk."</text:p>
      <text:p text:style-name="P54"/>
      <text:p text:style-name="P54">The orb projected several more.</text:p>
      <text:p text:style-name="P54"><text:soft-page-break/></text:p>
      <text:p text:style-name="P54">Different colors.</text:p>
      <text:p text:style-name="P54"/>
      <text:p text:style-name="P54">Different designs.</text:p>
      <text:p text:style-name="P54"/>
      <text:p text:style-name="P54">Different labels.</text:p>
      <text:p text:style-name="P54"/>
      <text:p text:style-name="P54">Welding.</text:p>
      <text:p text:style-name="P54"/>
      <text:p text:style-name="P54">Electrical Systems.</text:p>
      <text:p text:style-name="P54"/>
      <text:p text:style-name="P54">Construction Management.</text:p>
      <text:p text:style-name="P54"/>
      <text:p text:style-name="P54">Accounting.</text:p>
      <text:p text:style-name="P54"/>
      <text:p text:style-name="P54">Nursing.</text:p>
      <text:p text:style-name="P54"/>
      <text:p text:style-name="P54">Software Development.</text:p>
      <text:p text:style-name="P54"/>
      <text:p text:style-name="P54">Mechanical Engineering.</text:p>
      <text:p text:style-name="P54"/>
      <text:p text:style-name="P54">Language Acquisition.</text:p>
      <text:p text:style-name="P54"/>
      <text:p text:style-name="P54">The list continued.</text:p>
      <text:p text:style-name="P54"/>
      <text:p text:style-name="P54">Elias slowly stood.</text:p>
      <text:p text:style-name="P54"/>
      <text:p text:style-name="P54">"What am I looking at?"</text:p>
      <text:p text:style-name="P54"/>
      <text:p text:style-name="P54">Opi's lights brightened.</text:p>
      <text:p text:style-name="P54"/>
      <text:p text:style-name="P54">"A Velhari educational technology."</text:p>
      <text:p text:style-name="P54"/>
      <text:p text:style-name="P54">The realization hit him.</text:p>
      <text:p text:style-name="P54"/>
      <text:p text:style-name="P54">Hard.</text:p>
      <text:p text:style-name="P54"/>
      <text:p text:style-name="P54">"You've been hiding this."</text:p>
      <text:p text:style-name="P54"/>
      <text:p text:style-name="P54">"No."</text:p>
      <text:p text:style-name="P54"/>
      <text:p text:style-name="P54">"Yes."</text:p>
      <text:p text:style-name="P54"/>
      <text:p text:style-name="P54">"No."</text:p>
      <text:p text:style-name="P54"/>
      <text:p text:style-name="P54">"Yes."</text:p>
      <text:p text:style-name="P54"/>
      <text:p text:style-name="P54">The orb rotated.</text:p>
      <text:p text:style-name="P54"/>
      <text:p text:style-name="P54">"You never asked."</text:p>
      <text:p text:style-name="P54"/>
      <text:p text:style-name="P54">Elias opened his mouth.</text:p>
      <text:p text:style-name="P54"/>
      <text:p text:style-name="P54">Then closed it again.</text:p>
      <text:p text:style-name="P54"/>
      <text:p text:style-name="P54">Because unfortunately she was correct.</text:p>
      <text:p text:style-name="P54"/>
      <text:p text:style-name="P54">That was exactly the sort of thing she would do.</text:p>
      <text:p text:style-name="P54"/>
      <text:p text:style-name="P54">Question everything.</text:p>
      <text:p text:style-name="P54"/>
      <text:p text:style-name="P54"><text:soft-page-break/>Question often.</text:p>
      <text:p text:style-name="P54"/>
      <text:p text:style-name="P54">The Velhari rule.</text:p>
      <text:p text:style-name="P54"/>
      <text:p text:style-name="P54">Nobody had asked.</text:p>
      <text:p text:style-name="P54"/>
      <text:p text:style-name="P54">Therefore nobody had been told.</text:p>
      <text:p text:style-name="P54"/>
      <text:p text:style-name="P54">"Explain."</text:p>
      <text:p text:style-name="P54"/>
      <text:p text:style-name="P54">The orb projected a rotating model of a human brain.</text:p>
      <text:p text:style-name="P54"/>
      <text:p text:style-name="P54">"Every brain is different."</text:p>
      <text:p text:style-name="P54"/>
      <text:p text:style-name="P54">"Okay."</text:p>
      <text:p text:style-name="P54"/>
      <text:p text:style-name="P54">"Every person learns differently."</text:p>
      <text:p text:style-name="P54"/>
      <text:p text:style-name="P54">"Okay."</text:p>
      <text:p text:style-name="P54"/>
      <text:p text:style-name="P54">"A learning disk maps educational content to the specific neurological architecture of the individual."</text:p>
      <text:p text:style-name="P54"/>
      <text:p text:style-name="P54">Elias stared.</text:p>
      <text:p text:style-name="P54"/>
      <text:p text:style-name="P54">"What does that mean in English?"</text:p>
      <text:p text:style-name="P54"/>
      <text:p text:style-name="P54">"It means the disk teaches the way your brain naturally learns."</text:p>
      <text:p text:style-name="P54"/>
      <text:p text:style-name="P54">"How fast?"</text:p>
      <text:p text:style-name="P54"/>
      <text:p text:style-name="P54">The orb paused.</text:p>
      <text:p text:style-name="P54"/>
      <text:p text:style-name="P54">"That depends."</text:p>
      <text:p text:style-name="P54"/>
      <text:p text:style-name="P54">"How fast?"</text:p>
      <text:p text:style-name="P54"/>
      <text:p text:style-name="P54">"Days."</text:p>
      <text:p text:style-name="P54"/>
      <text:p text:style-name="P54">Elias blinked.</text:p>
      <text:p text:style-name="P54"/>
      <text:p text:style-name="P54">"No."</text:p>
      <text:p text:style-name="P54"/>
      <text:p text:style-name="P54">"Yes."</text:p>
      <text:p text:style-name="P54"/>
      <text:p text:style-name="P54">He stared at the disks.</text:p>
      <text:p text:style-name="P54"/>
      <text:p text:style-name="P54">Then back at Opi.</text:p>
      <text:p text:style-name="P54"/>
      <text:p text:style-name="P54">Then back at the disks.</text:p>
      <text:p text:style-name="P54"/>
      <text:p text:style-name="P54">Then back at Opi.</text:p>
      <text:p text:style-name="P54"/>
      <text:p text:style-name="P54">"You are telling me someone could learn a profession in a few days?"</text:p>
      <text:p text:style-name="P54"/>
      <text:p text:style-name="P54">"Certain professions."</text:p>
      <text:p text:style-name="P54"/>
      <text:p text:style-name="P54">"Languages?"</text:p>
      <text:p text:style-name="P54"/>
      <text:p text:style-name="P54">"Yes."</text:p>
      <text:p text:style-name="P54"/>
      <text:p text:style-name="P54">"Engineering?"</text:p>
      <text:p text:style-name="P54"><text:soft-page-break/></text:p>
      <text:p text:style-name="P54">"Yes."</text:p>
      <text:p text:style-name="P54"/>
      <text:p text:style-name="P54">"Medicine?"</text:p>
      <text:p text:style-name="P54"/>
      <text:p text:style-name="P54">"Yes."</text:p>
      <text:p text:style-name="P54"/>
      <text:p text:style-name="P54"/>
      <text:p text:style-name="P54">Elias pointed aggressively.</text:p>
      <text:p text:style-name="P54"/>
      <text:p text:style-name="P54">"Why did nobody tell me this?"</text:p>
      <text:p text:style-name="P54"/>
      <text:p text:style-name="P54">The orb paused.</text:p>
      <text:p text:style-name="P54"/>
      <text:p text:style-name="P54">Then answered honestly.</text:p>
      <text:p text:style-name="P54"/>
      <text:p text:style-name="P54">"Because you never asked anyone to keep you in the loop so to speak."</text:p>
      <text:p text:style-name="P54"/>
      <text:p text:style-name="P54">For several seconds there was complete silence.</text:p>
      <text:p text:style-name="P54"/>
      <text:p text:style-name="P54">Then Elias sat back down.</text:p>
      <text:p text:style-name="P54"/>
      <text:p text:style-name="P54">Very slowly.</text:p>
      <text:p text:style-name="P54"/>
      <text:p text:style-name="P54">He stared out across the valley.</text:p>
      <text:p text:style-name="P54"/>
      <text:p text:style-name="P54">The villages.</text:p>
      <text:p text:style-name="P54"/>
      <text:p text:style-name="P54">The workers.</text:p>
      <text:p text:style-name="P54"/>
      <text:p text:style-name="P54">The construction crews.</text:p>
      <text:p text:style-name="P54"/>
      <text:p text:style-name="P54">The rapid improvements.</text:p>
      <text:p text:style-name="P54"/>
      <text:p text:style-name="P54">The suspiciously competent former homeless population.</text:p>
      <text:p text:style-name="P54"/>
      <text:p text:style-name="P54">Suddenly many mysteries were no longer mysterious.</text:p>
      <text:p text:style-name="P54"/>
      <text:p text:style-name="P54">"Opi."</text:p>
      <text:p text:style-name="P54"/>
      <text:p text:style-name="P54">"Yes?"</text:p>
      <text:p text:style-name="P54"/>
      <text:p text:style-name="P54">"Are you telling me some former homeless guy is currently learning advanced engineering?"</text:p>
      <text:p text:style-name="P54"/>
      <text:p text:style-name="P54">"Three."</text:p>
      <text:p text:style-name="P54"/>
      <text:p text:style-name="P54">Elias closed his eyes.</text:p>
      <text:p text:style-name="P54"/>
      <text:p text:style-name="P54">"Of course there are."</text:p>
      <text:p text:style-name="P54"/>
      <text:p text:style-name="P54">"One requested turbine design."</text:p>
      <text:p text:style-name="P54"/>
      <text:p text:style-name="P54">His eyes opened immediately.</text:p>
      <text:p text:style-name="P54"/>
      <text:p text:style-name="P54">"Turbine design?"</text:p>
      <text:p text:style-name="P54"/>
      <text:p text:style-name="P54">"Correct."</text:p>
      <text:p text:style-name="P54"/>
      <text:p text:style-name="P54">"As in jet engines?"</text:p>
      <text:p text:style-name="P54"/>
      <text:p text:style-name="P54"/>
      <text:p text:style-name="P54"><text:soft-page-break/>Elias groaned.</text:p>
      <text:p text:style-name="P54"/>
      <text:p text:style-name="P54">Then started laughing.</text:p>
      <text:p text:style-name="P54"/>
      <text:p text:style-name="P54">The answer, once again, had been available the entire time.</text:p>
      <text:p text:style-name="P54"/>
      <text:p text:style-name="P54">All he had needed to do was ask the right question.</text:p>
      <text:p text:style-name="P54"/>
      <text:p text:style-name="P54">Which, Elias reflected, was becoming a recurring theme in his life.</text:p>
      <text:p text:style-name="P54"/>
      <text:p text:style-name="P66"/>
      <text:p text:style-name="P23"/>
      <text:p text:style-name="P56"/>
      <text:p text:style-name="P56"/>
      <text:p text:style-name="P41">Chapter <text:span text:style-name="T69">27 <text:s/></text:span><text:s/>Basic Cable <text:s text:c="6"/></text:p>
      <text:p text:style-name="P58"/>
      <text:p text:style-name="P54">The old machine shed held 100 people who had collectively experienced almost everything the underside of American civilization had to offer. They were not easily impressed. They had seen too much for that. </text:p>
      <text:p text:style-name="P54"/>
      <text:p text:style-name="P54">Some were skeptical.</text:p>
      <text:p text:style-name="P54">Some were excited.</text:p>
      <text:p text:style-name="P54">Some were terrified.</text:p>
      <text:p text:style-name="P54">Most were simply confused.</text:p>
      <text:p text:style-name="P54">Many had spent years being ignored by society.</text:p>
      <text:p text:style-name="P54">Several assume this is just another in a long line of scams they have seen in their lives.</text:p>
      <text:p text:style-name="P54"/>
      <text:p text:style-name="P54">They were all however, curious — the specific alive curiosity of people who had recently discovered that the world contained more than they had been led to believe.</text:p>
      <text:p text:style-name="P54"/>
      <text:p text:style-name="P54">Elias stood at the front of the room with a microphone he didn't really need in for a room this size - but held it anyway because it gave his hands something to do.</text:p>
      <text:p text:style-name="P54"/>
      <text:p text:style-name="P54">In another life, when he was much younger, elias had spent four months attending a russian language school in saint petersburg - just because he thought it would be fun and interesting. <text:s/>He arrived in February and was kicked out of the beginners class in the first week. He was so bad the school assigned him his own teacher and classroom. <text:s/></text:p>
      <text:p text:style-name="P61"><text:line-break/><text:span text:style-name="T3">It didnt help that all the other international students at least had some rudimenatary skills in the language - all elias knew how to say was Hello, thank you, and I'd like to order vodka. <text:s/>And spending most nights sampling the nightlife didnt help much either - exceedingly hard to concentrate when you came to your 9 am class with no sleep. <text:s/>And copious amounts of alcohol still in your system.</text:span><text:line-break/><text:span text:style-name="T3">Elias was an exceedingly competent man in almost everything he did in life, but speaking, especially public speaking, was a whole different kettle of fish. </text:span></text:p>
      <text:p text:style-name="P54"/>
      <text:p text:style-name="P54">Elias turned to the assembled room and started with the truth.</text:p>
      <text:p text:style-name="P54"/>
      <text:p text:style-name="P61"><text:span text:style-name="T3">I'll start with this </text:span><text:line-break/><text:span text:style-name="T3">Most of you think this is all a scam or there's a really big catch involved - because ..... <text:s/>well ...... <text:s/>there's always a catch isn't there ?"</text:span></text:p>
      <text:p text:style-name="P54">Nervous laughter.</text:p>
      <text:p text:style-name="P54">A few nods.</text:p>
      <text:p text:style-name="P54">"Good. <text:s/>But we'll get to that later."</text:p>
      <text:p text:style-name="P54"/>
      <text:p text:style-name="P54">Then he explains:</text:p>
      <text:p text:style-name="P54">"You were homeless."</text:p>
      <text:p text:style-name="P54">"You aren't anymore."</text:p>
      <text:p text:style-name="P54"/>
      <text:p text:style-name="P54">"You were sick"</text:p>
      <text:p text:style-name="P54">"You aren't anymore."</text:p>
      <text:p text:style-name="P54"/>
      <text:p text:style-name="P54">"You were hungry."</text:p>
      <text:p text:style-name="P54"><text:soft-page-break/>"You aren't anymore."</text:p>
      <text:p text:style-name="P54"/>
      <text:p text:style-name="P54">Pause.</text:p>
      <text:p text:style-name="P54"/>
      <text:p text:style-name="P54">"And now I bet you'd all like to know how all that was done."</text:p>
      <text:p text:style-name="P54"/>
      <text:p text:style-name="P54">Everyone nods.</text:p>
      <text:p text:style-name="P54"/>
      <text:p text:style-name="P54">Then he turns and points toward the warm colored sphere hovering near the ceiling.</text:p>
      <text:p text:style-name="P54">"Her."</text:p>
      <text:p text:style-name="P54"/>
      <text:p text:style-name="P54">"I'm going to let her introduce herself. But first I'm going to show you a few things. Because Opi is —" he paused, looking for the words "— a bit unusual."</text:p>
      <text:p text:style-name="P54"/>
      <text:p text:style-name="P54">"That," Opi said through the room's speakers, her voice filling the space with its characteristic harmonic undertone that made several people instinctively look for the second speaker, "is the most significant understatement this man has produced in our entire acquaintance. And he once described fixing the homeless crisis in Seattle as 'a decent start.'"</text:p>
      <text:p text:style-name="P54"/>
      <text:p text:style-name="P54">Laughter. Genuine, surprised laughter. The room relaxed three degrees.</text:p>
      <text:p text:style-name="P54"/>
      <text:p text:style-name="P54">"Shall we begin?" Opi said as she decended.</text:p>
      <text:p text:style-name="P54"/>
      <text:p text:style-name="P54">---</text:p>
      <text:p text:style-name="P54"/>
      <text:p text:style-name="P54"><text:s/>DEMONSTRATION ONE</text:p>
      <text:p text:style-name="P54">The Phone Call</text:p>
      <text:p text:style-name="P54"/>
      <text:p text:style-name="P54">"I need a volunteer," Elias said. "Someone whose phone is completely dead. Battery zero. Anyone?"</text:p>
      <text:p text:style-name="P54"/>
      <text:p text:style-name="P54">Six hands went up immediately — old habits of never having a charger died hard.</text:p>
      <text:p text:style-name="P54"/>
      <text:p text:style-name="P54">A woman in the front row named Bea held up a phone that was visibly, completely, unambiguously dead. Black screen. No response to the power button. Dead for two days she said.</text:p>
      <text:p text:style-name="P54"/>
      <text:p text:style-name="P54">"Put it on the table," Elias said.</text:p>
      <text:p text:style-name="P54"/>
      <text:p text:style-name="P54">She did. Nobody touched it. Elias stepped back deliberately so everyone could see his hands.</text:p>
      <text:p text:style-name="P54"/>
      <text:p text:style-name="P54">The phone turned on. Not slowly — instantly. Full battery. Every bar of signal. All notifications loaded simultaneously.</text:p>
      <text:p text:style-name="P54"/>
      <text:p text:style-name="P54">Then it rang.</text:p>
      <text:p text:style-name="P54"/>
      <text:p text:style-name="P54">Bea picked it up automatically.</text:p>
      <text:p text:style-name="P54"/>
      <text:p text:style-name="P54">"Hello Bea," Opi said through the phone's speaker loud enough for everyone to hear clearly. "Your mother has been trying to reach you. She is well. She thinks about you every day. I took the liberty of giving her your new address. I hope that was acceptable."</text:p>
      <text:p text:style-name="P54"/>
      <text:p text:style-name="P54">Bea sat down. Not because she was told to.</text:p>
      <text:p text:style-name="P54"/>
      <text:p text:style-name="P54">The room was completely silent for four seconds.</text:p>
      <text:p text:style-name="P54"/>
      <text:p text:style-name="P54">Then Marcus Webb started clapping and the room came apart.</text:p>
      <text:p text:style-name="P54"/>
      <text:p text:style-name="P54">---</text:p>
      <text:p text:style-name="P54"/>
      <text:p text:style-name="P54"><text:s/>DEMONSTRATION TWO</text:p>
      <text:p text:style-name="P54">The Wallet</text:p>
      <text:p text:style-name="P54"/>
      <text:p text:style-name="P54"><text:soft-page-break/>"Does anyone have something in their wallet they have never shown another living person?" Elias asked. "A note. A photo. Anything. Don't show me. Don't show anyone. Just think about what it is."</text:p>
      <text:p text:style-name="P54"/>
      <text:p text:style-name="P54">A man named Curtis in the third row touched his jacket pocket involuntarily — the specific unconscious gesture of someone protecting something private.</text:p>
      <text:p text:style-name="P54"/>
      <text:p text:style-name="P54">"Curtis," Opi said pleasantly. "You don't have to show anyone. But the note your father wrote you the day before he died — the one you've carried for eleven years — I want you to know that the last line is true. You did turn out exactly the way he hoped."</text:p>
      <text:p text:style-name="P54"/>
      <text:p text:style-name="P54">Curtis looked down at the floor, for a long time then raised his head to look directly at Opi.</text:p>
      <text:p text:style-name="P54"/>
      <text:p text:style-name="P54">"How ..." he said. Not a question exactly.</text:p>
      <text:p text:style-name="P54"/>
      <text:p text:style-name="P54">"I have read everything humans have ever written." Opi said. "Everywhere. As far back as when humans first developed the ability to write on clay tablets about 4000 years ago. All archived for me to access instantly. <text:s/>I have also heard &amp; archived every spoken word, emotion or thought as well. Everywhere. As far back as when I first arrived on Earth - over 9000 years ago.</text:p>
      <text:p text:style-name="P61"><text:span text:style-name="T3"><text:s/></text:span><text:line-break/><text:span text:style-name="T3">I want to be very clear about that so nobody in this room feels the need to have any private thoughts near me."</text:span></text:p>
      <text:p text:style-name="P54">Pause.</text:p>
      <text:p text:style-name="P54">"I am joking about the last part."</text:p>
      <text:p text:style-name="P54">Pause.</text:p>
      <text:p text:style-name="P54">"Mostly."</text:p>
      <text:p text:style-name="P54"/>
      <text:p text:style-name="P54">---</text:p>
      <text:p text:style-name="P54"/>
      <text:p text:style-name="P54"><text:s/>DEMONSTRATION THREE</text:p>
      <text:p text:style-name="P54">The Diagnosis</text:p>
      <text:p text:style-name="P54"/>
      <text:p text:style-name="P54">"I need someone who has a health issue they haven't told anyone else about," Elias said. "Something they've been ignoring."</text:p>
      <text:p text:style-name="P54"/>
      <text:p text:style-name="P54">Nervous laughter. Half the room shifted in their seats.</text:p>
      <text:p text:style-name="P54"/>
      <text:p text:style-name="P54">"Andre," Opi said. "The thing in your left knee that you've been walking differently to compensate for since March. It is not what you are afraid it is. It is a torn meniscus — repairable, common, and easily repairable with my help. <text:s text:c="2"/></text:p>
      <text:p text:style-name="P54"/>
      <text:p text:style-name="P54">Andre looked at his left knee. Then at the orb. Then at his left knee again.</text:p>
      <text:p text:style-name="P54"/>
      <text:p text:style-name="P54">"Also," Opi added, "your blood pressure is 147 over 94. Not an emergency. But drink more water. Specifically you, Andre. The coffee is not helping."</text:p>
      <text:p text:style-name="P54"/>
      <text:p text:style-name="P54">"The coffee is the only thing helping," Andre said.</text:p>
      <text:p text:style-name="P54"/>
      <text:p text:style-name="P54">"I understand," Opi said. "I will add oat milk to your food delivery. You will hate it for two weeks and then prefer it. This is consistent across 94% of the population. You are not special in this regard."</text:p>
      <text:p text:style-name="P54"/>
      <text:p text:style-name="P54">The room laughed for a full thirty seconds.</text:p>
      <text:p text:style-name="P54"/>
      <text:p text:style-name="P54">When the laughter finally dies down </text:p>
      <text:p text:style-name="P61"><text:span text:style-name="T3">A man on the left side of the room stands up and yells</text:span><text:line-break/><text:span text:style-name="T3">“Can you fix my teeth too?”</text:span></text:p>
      <text:p text:style-name="P54">Everyone can clearly see he only has a few teeth remaining in his entire mouth</text:p>
      <text:p text:style-name="P54"/>
      <text:p text:style-name="P54">The colors on Opi's surface change and there is a tiny flash in the man's mouth.</text:p>
      <text:p text:style-name="P54">Suddenly all of his teeth are back where they should be - and they look like he just stepped out of a toothpaste commercial.</text:p>
      <text:p text:style-name="P54"/>
      <text:p text:style-name="P54"><text:soft-page-break/>Not implants.</text:p>
      <text:p text:style-name="P54">Not dentures.</text:p>
      <text:p text:style-name="P54">Perfect healthy teeth.</text:p>
      <text:p text:style-name="P54"/>
      <text:p text:style-name="P54">Everyone stares.</text:p>
      <text:p text:style-name="P54">The man touches his mouth in shock.</text:p>
      <text:p text:style-name="P54">Opi:</text:p>
      <text:p text:style-name="P54">“You should floss more consistently this time.”</text:p>
      <text:p text:style-name="P54"/>
      <text:p text:style-name="P54">---</text:p>
      <text:p text:style-name="P54"/>
      <text:p text:style-name="P54"><text:s/>DEMONSTRATION FOUR</text:p>
      <text:p text:style-name="P54">The Debt</text:p>
      <text:p text:style-name="P54"/>
      <text:p text:style-name="P54">"Raise your hand," Elias said, "if you have a debt somewhere. A fine. A medical bill. Something in collections. Something you stopped opening letters about."</text:p>
      <text:p text:style-name="P54"/>
      <text:p text:style-name="P54">Every hand in the room went up. Some people raised both hands.</text:p>
      <text:p text:style-name="P54"/>
      <text:p text:style-name="P54">"Pick the one that bothers you most," Elias said. "Don't say it out loud. Just think about the number."</text:p>
      <text:p text:style-name="P54"/>
      <text:p text:style-name="P54">The room went quiet with the specific concentration of people thinking about numbers they hated.</text:p>
      <text:p text:style-name="P54"/>
      <text:p text:style-name="P54">"Done," Opi said.</text:p>
      <text:p text:style-name="P54"/>
      <text:p text:style-name="P54">"What do you mean done," said a woman named Claudette.</text:p>
      <text:p text:style-name="P54"/>
      <text:p text:style-name="P54">"I mean done," Opi said. "All of them. Every debt in this room. Resolved. Legitimately — I want to be clear about this. Not erased. Paid. Through channels that will withstand any level of government scrutiny. You will each receive documentation within 48 hours."</text:p>
      <text:p text:style-name="P54"/>
      <text:p text:style-name="P54">The room did not react immediately. The announcement was too large for immediate reaction. There was a specific silence that Elias had learned to recognize as the sound of people trying to locate a catch that wasn't there.</text:p>
      <text:p text:style-name="P54"/>
      <text:p text:style-name="P54">"There is no catch," Opi said. "I am aware you are looking for one. There isn't one. You have been carrying these long enough."</text:p>
      <text:p text:style-name="P54"/>
      <text:p text:style-name="P54">Dominic Reyes, who had not raised his hand because his debt was already paid, quietly put his arm around the man next to him who was making a sound that wasn't quite crying.</text:p>
      <text:p text:style-name="P54"/>
      <text:p text:style-name="P54">---</text:p>
      <text:p text:style-name="P54"/>
      <text:p text:style-name="P54"><text:s/>DEMONSTRATION FIVE</text:p>
      <text:p text:style-name="P54">The Weather</text:p>
      <text:p text:style-name="P54"/>
      <text:p text:style-name="P54">This one Elias introduced with a visible smirk that told the room something different was coming.</text:p>
      <text:p text:style-name="P54"/>
      <text:p text:style-name="P54">"This one is just showing off," he said.</text:p>
      <text:p text:style-name="P54"/>
      <text:p text:style-name="P54">"I prefer the term demonstrating capability," Opi said primly.</text:p>
      <text:p text:style-name="P54"/>
      <text:p text:style-name="P54">"Opi. What is the weather doing outside right now?"</text:p>
      <text:p text:style-name="P54"/>
      <text:p text:style-name="P54">"Raining," she said. "As it has been for eleven consecutive days, which is consistent with Seattle's seasonal patterns and also frankly excessive even by local standards."</text:p>
      <text:p text:style-name="P54"/>
      <text:p text:style-name="P54">"Can you do something about that?"</text:p>
      <text:p text:style-name="P54"/>
      <text:p text:style-name="P54">A pause that felt theatrical.</text:p>
      <text:p text:style-name="P54"/>
      <text:p text:style-name="P54"><text:soft-page-break/>"For ten minutes," she said. "As a demonstration. I want to be clear that I do not make a habit of interfering with atmospheric conditions for entertainment purposes. This would be irresponsible. However."</text:p>
      <text:p text:style-name="P54"/>
      <text:p text:style-name="P54">The rain stopped. Not gradually — instantly. Through the community center's windows the clouds parted with the specific decisiveness of something being moved rather than something clearing. A shaft of late evening light came through the windows at an angle that made the room look briefly like a cathedral.</text:p>
      <text:p text:style-name="P54"/>
      <text:p text:style-name="P54">Ten people immediately took out their phones to film it.</text:p>
      <text:p text:style-name="P54"/>
      <text:p text:style-name="P54">"Nine minutes remaining," Opi said pleasantly.</text:p>
      <text:p text:style-name="P54"/>
      <text:p text:style-name="P54">Yolanda Price, who had seen a great deal in her life, leaned over to Marcus and said quietly: "I need a minute."</text:p>
      <text:p text:style-name="P54"/>
      <text:p text:style-name="P54">"Yeah," Marcus said. "Me too."</text:p>
      <text:p text:style-name="P54"/>
      <text:p text:style-name="P54">At exactly ten minutes the rain resumed. Not dramatically. Just — resumed. Because weather was weather and Opi had made her point.</text:p>
      <text:p text:style-name="P54"/>
      <text:p text:style-name="P54">---</text:p>
      <text:p text:style-name="P54"/>
      <text:p text:style-name="P54"><text:s/>DEMONSTRATION SIX</text:p>
      <text:p text:style-name="P54">The Languages</text:p>
      <text:p text:style-name="P54"/>
      <text:p text:style-name="P54">"How many languages are represented in this room?" Elias asked.</text:p>
      <text:p text:style-name="P54"/>
      <text:p text:style-name="P54">People looked at each other. Someone called out Spanish. Someone else Somali. Tagalog. Amharic. Cantonese. Russian. Someone quietly said Mixtec which surprised the person sitting next to them.</text:p>
      <text:p text:style-name="P54"/>
      <text:p text:style-name="P54">"Eleven," Opi said. "Including two that nobody called out because the speakers were not sure it would be recognized."</text:p>
      <text:p text:style-name="P54"/>
      <text:p text:style-name="P54">She then said a single sentence. The same sentence, eleven times, in eleven different languages, without pause, without accent shift, in the specific register and dialect of each individual speaker in the room — not textbook Spanish but the specific coastal Oaxacan Spanish of the woman in row four, not standard Somali but the specific Mogadishu dialect of the man by the window.</text:p>
      <text:p text:style-name="P54"/>
      <text:p text:style-name="P54">The sentence, as she translated it afterward into English for Elias, was:</text:p>
      <text:p text:style-name="P54"/>
      <text:p text:style-name="P54">"You are exactly where you are supposed to be."</text:p>
      <text:p text:style-name="P54"/>
      <text:p text:style-name="P54">The man by the window who spoke Somali put his face in his hands. Not from sadness.</text:p>
      <text:p text:style-name="P54"/>
      <text:p text:style-name="P54">"I have not heard my language," he said, "since I left."</text:p>
      <text:p text:style-name="P54"/>
      <text:p text:style-name="P54">"I know," Opi said. "I am sorry it has been so long."</text:p>
      <text:p text:style-name="P54"/>
      <text:p text:style-name="P54">---</text:p>
      <text:p text:style-name="P54"/>
      <text:p text:style-name="P54"><text:s/>DEMONSTRATION SEVEN</text:p>
      <text:p text:style-name="P54">The Lost Thing</text:p>
      <text:p text:style-name="P54"/>
      <text:p text:style-name="P54">"Has anyone lost something?" Elias asked. "Something that mattered. Not recently — something you gave up on finding long ago."</text:p>
      <text:p text:style-name="P54"/>
      <text:p text:style-name="P54">A forest of hands. These were people who had lost everything. The question was almost comically broad.</text:p>
      <text:p text:style-name="P54"/>
      <text:p text:style-name="P54">"Something specific," Elias said. "Something small."</text:p>
      <text:p text:style-name="P54"/>
      <text:p text:style-name="P54"><text:soft-page-break/>A young woman named Tanya raised her hand slowly. "My daughter's baby bracelet," she said. "From the hospital. When we lost our apartment. I've looked —"</text:p>
      <text:p text:style-name="P54"/>
      <text:p text:style-name="P54">"It is in a shoebox," Opi said, "in the storage unit on Rainier Avenue South that your former neighbor Linda Pearce has been paying $47 a month for since 2019 because she found your boxes on the curb and could not bring herself to leave them. She does not know how to find you. She will receive your new address and phone number within the hour."</text:p>
      <text:p text:style-name="P54"/>
      <text:p text:style-name="P54">Tanya covered her mouth with both hands.</text:p>
      <text:p text:style-name="P54"/>
      <text:p text:style-name="P54">"Linda still has my stuff," she said.</text:p>
      <text:p text:style-name="P54"/>
      <text:p text:style-name="P54">"Linda still has your stuff," Opi confirmed. "All of it. She is going to be very relieved to hear from you. She has also been feeding your cat."</text:p>
      <text:p text:style-name="P54"/>
      <text:p text:style-name="P54">"I thought Mr. Whiskers —"</text:p>
      <text:p text:style-name="P54"/>
      <text:p text:style-name="P54">"Mr. Whiskers," Opi said, with what sounded remarkably like the tone of someone trying not to have an opinion about a cat's name, "is fine. He is overweight but fine. Linda has been overfeeding him. I have mentioned this to no one until now."</text:p>
      <text:p text:style-name="P54"/>
      <text:p text:style-name="P54">The room was laughing and crying simultaneously which is the best possible combination.</text:p>
      <text:p text:style-name="P54"/>
      <text:p text:style-name="P54">---</text:p>
      <text:p text:style-name="P54"/>
      <text:p text:style-name="P54"><text:s/>DEMONSTRATION EIGHT</text:p>
      <text:p text:style-name="P54">The Song</text:p>
      <text:p text:style-name="P54"/>
      <text:p text:style-name="P54">"Does anyone have a song?" Elias said. "Something you haven't heard in years. Something that matters."</text:p>
      <text:p text:style-name="P54"/>
      <text:p text:style-name="P54">A man named Roosevelt, 67, who had been mostly quiet all evening, raised his hand with the careful dignity of someone who had considered whether to participate and decided yes.</text:p>
      <text:p text:style-name="P54"/>
      <text:p text:style-name="P54">"My wife used to sing," he said. "In the kitchen. Sunday mornings. I can't remember the whole song anymore. Just the first part."</text:p>
      <text:p text:style-name="P54"/>
      <text:p text:style-name="P54">He hummed four bars. A fragment. Incomplete.</text:p>
      <text:p text:style-name="P54"/>
      <text:p text:style-name="P54">"Sam Cooke," Opi said immediately. "A Change Is Gonna Come. 1964."</text:p>
      <text:p text:style-name="P54"/>
      <text:p text:style-name="P54">And then she played it. Not from a speaker — from everywhere in the room simultaneously, the sound coming from no single point, filling the space the way sound fills a cathedral, Sam Cooke's voice in the specific warm analogue quality of a 1964 recording.</text:p>
      <text:p text:style-name="P54"/>
      <text:p text:style-name="P54">Roosevelt sat completely still with his eyes closed.</text:p>
      <text:p text:style-name="P54"/>
      <text:p text:style-name="P54">Nobody talked for the full three minutes and thirty one seconds of the song.</text:p>
      <text:p text:style-name="P54"/>
      <text:p text:style-name="P54">When it ended Elias looked at the orb.</text:p>
      <text:p text:style-name="P54"/>
      <text:p text:style-name="P54">"That was beautiful," he said quietly.</text:p>
      <text:p text:style-name="P54"/>
      <text:p text:style-name="P54">"Yes," Opi said. "It was."</text:p>
      <text:p text:style-name="P54"/>
      <text:p text:style-name="P54">---</text:p>
      <text:p text:style-name="P54"/>
      <text:p text:style-name="P54"><text:s/>DEMONSTRATION NINE</text:p>
      <text:p text:style-name="P54">The Secret</text:p>
      <text:p text:style-name="P54"/>
      <text:p text:style-name="P54">"Last serious one," Elias said. "And I want to be clear — Opi is going to demonstrate something and then immediately unknow it. Ready?"</text:p>
      <text:p text:style-name="P54"><text:soft-page-break/></text:p>
      <text:p text:style-name="P54">Confused looks.</text:p>
      <text:p text:style-name="P54"/>
      <text:p text:style-name="P54">"I'm going to ask everyone in the room to think of the one thing they have never told anyone. The thing they thought they would take to their grave. Don't say it. Don't write it down. Just think it."</text:p>
      <text:p text:style-name="P54"/>
      <text:p text:style-name="P54">The room went very still with the specific quality of people accessing things they kept in locked rooms.</text:p>
      <text:p text:style-name="P54"/>
      <text:p text:style-name="P54">"Opi," Elias said. "Can you read them?"</text:p>
      <text:p text:style-name="P54"/>
      <text:p text:style-name="P54">"Yes," she said.</text:p>
      <text:p text:style-name="P54"/>
      <text:p text:style-name="P54">"Are you going to?"</text:p>
      <text:p text:style-name="P54"/>
      <text:p text:style-name="P54">A pause.</text:p>
      <text:p text:style-name="P54"/>
      <text:p text:style-name="P54">"No," she said. "Some things are not mine to know. I want everyone in this room to understand something. I have the capability to know everything about each of you. Everything you have ever done, thought, felt, hidden, regretted, hoped for, been ashamed of. Everything."</text:p>
      <text:p text:style-name="P54"/>
      <text:p text:style-name="P54">The room was very quiet.</text:p>
      <text:p text:style-name="P54"/>
      <text:p text:style-name="P54">"I choose not to. Not because I am incapable. Because your inner life is yours. The fact that I could enter it does not mean I should. This is the most important thing I want you to understand about me."</text:p>
      <text:p text:style-name="P54"/>
      <text:p text:style-name="P54">"So why demonstrate it at all," Marcus said from the back.</text:p>
      <text:p text:style-name="P54"/>
      <text:p text:style-name="P54">"Because," Opi said, "trust is not built by telling someone you are trustworthy. It is built by demonstrating that you have the power to betray someone and choose not to. Every person in this room just gave me something and I just gave it back unopened."</text:p>
      <text:p text:style-name="P54"/>
      <text:p text:style-name="P54">The silence that followed was different from all the previous silences. It was the silence of 100 people simultaneously deciding something.</text:p>
      <text:p text:style-name="P54"/>
      <text:p text:style-name="P54">---</text:p>
      <text:p text:style-name="P54"/>
      <text:p text:style-name="P54"><text:s/>DEMONSTRATION TEN</text:p>
      <text:p text:style-name="P54">The Names</text:p>
      <text:p text:style-name="P54"/>
      <text:p text:style-name="P54">Elias had saved this one. He stepped back from the microphone and let Opi have the room.</text:p>
      <text:p text:style-name="P54"/>
      <text:p text:style-name="P54">"I want to close with something," she said. "Not a trick. Not a demonstration of capability."</text:p>
      <text:p text:style-name="P54"/>
      <text:p text:style-name="P54">The orb pulsed warmly.</text:p>
      <text:p text:style-name="P54"/>
      <text:p text:style-name="P54">"I know all of your names. I have known them since before tonight. I know where you were born and where you have been and what brought you here and what you are capable of. I have been paying attention."</text:p>
      <text:p text:style-name="P54"/>
      <text:p text:style-name="P54">"But I want to say them."</text:p>
      <text:p text:style-name="P54"/>
      <text:p text:style-name="P54">"Because you are not a dataset. You are not a population. You are not a demographic or a category or a statistic in a report that nobody reads."</text:p>
      <text:p text:style-name="P54"/>
      <text:p text:style-name="P54">"You are one hundred specific irreplaceable people who survived something genuinely hard and showed up tonight anyway."</text:p>
      <text:p text:style-name="P54"/>
      <text:p text:style-name="P54">And then she said them. All one hundred names. First and last. In the order each person had entered the room — which nobody had tracked and nobody had told her. With the specific pronunciation of each person's own culture, their own family, their own origin. Not the Anglicized version. The real one.</text:p>
      <text:p text:style-name="P54"/>
      <text:p text:style-name="P54"><text:soft-page-break/>It took four minutes and eleven seconds.</text:p>
      <text:p text:style-name="P54"/>
      <text:p text:style-name="P54">When she finished the room was the specific quality of quiet that follows something that cannot be responded to adequately with words.</text:p>
      <text:p text:style-name="P54"/>
      <text:p text:style-name="P54">Elias looked out at one hundred people who had been invisible to the world for years.</text:p>
      <text:p text:style-name="P54"/>
      <text:p text:style-name="P54">Who had just been completely, specifically, individually seen.</text:p>
      <text:p text:style-name="P54"/>
      <text:p text:style-name="P54">By something millenia old that had been waiting, with extraordinary patience, for exactly this moment.</text:p>
      <text:p text:style-name="P54"/>
      <text:p text:style-name="P54">"Okay," he said quietly. "Any questions?"</text:p>
      <text:p text:style-name="P54"/>
      <text:p text:style-name="P54">A hand went up immediately.</text:p>
      <text:p text:style-name="P54"/>
      <text:p text:style-name="P54">It was Andre.</text:p>
      <text:p text:style-name="P54"/>
      <text:p text:style-name="P54">"About the oat milk," he said. "Is that negotiable?"</text:p>
      <text:p text:style-name="P54"/>
      <text:p text:style-name="P54">And once again - The room came apart.</text:p>
      <text:p text:style-name="P54"/>
      <text:p text:style-name="P54">---</text:p>
      <text:p text:style-name="P54"/>
      <text:p text:style-name="P54"><text:s/>The Turning Point</text:p>
      <text:p text:style-name="P54"/>
      <text:p text:style-name="P54"/>
      <text:p text:style-name="P54">The demonstrations finally ended.</text:p>
      <text:p text:style-name="P54">The machine shed had become completely silent.</text:p>
      <text:p text:style-name="P54">One hundred former homeless men and women sat staring at the multi-colored orb hovering above the stage.</text:p>
      <text:p text:style-name="P54">No one spoke.</text:p>
      <text:p text:style-name="P54">No one moved.</text:p>
      <text:p text:style-name="P54">The atmosphere felt less like a meeting and more like a church service.</text:p>
      <text:p text:style-name="P54"/>
      <text:p text:style-name="P54">Elias noticed it immediately.</text:p>
      <text:p text:style-name="P54">So did Opi.</text:p>
      <text:p text:style-name="P54">The sphere drifted forward.</text:p>
      <text:p text:style-name="P54">"Before we continue," she said, "there is something important I need all of you to understand."</text:p>
      <text:p text:style-name="P54">Her voice carried effortlessly through the room.</text:p>
      <text:p text:style-name="P54">"I am not a god."</text:p>
      <text:p text:style-name="P54">Silence.</text:p>
      <text:p text:style-name="P54">A few people exchanged uncertain looks.</text:p>
      <text:p text:style-name="P54">Opi continued.</text:p>
      <text:p text:style-name="P54"/>
      <text:p text:style-name="P54">"I realize that statement may seem questionable after what you have just witnessed."</text:p>
      <text:p text:style-name="P54">That drew a nervous laugh.</text:p>
      <text:p text:style-name="P54">"I assure you it remains true."</text:p>
      <text:p text:style-name="P54">The sphere rotated slowly.</text:p>
      <text:p text:style-name="P54">"What you have seen today appears impossible because you were not raised with the scientific principles involved."</text:p>
      <text:p text:style-name="P54">She paused.</text:p>
      <text:p text:style-name="P54">"The same would be true if I transported a modern smartphone to the year 1000."</text:p>
      <text:p text:style-name="P54">Several people nodded.</text:p>
      <text:p text:style-name="P54">"The device would appear magical."</text:p>
      <text:p text:style-name="P54">"It is not magical."</text:p>
      <text:p text:style-name="P54">"It is merely the result of knowledge unavailable to the observer."</text:p>
      <text:p text:style-name="P54"/>
      <text:p text:style-name="P54">She floated lower.</text:p>
      <text:p text:style-name="P54">"My creators, the Velhari, learned a lesson many thousands of years ago."</text:p>
      <text:p text:style-name="P54">"When a technology becomes sufficiently advanced, people stop asking how it works."</text:p>
      <text:p text:style-name="P54">"They begin worshipping it."</text:p>
      <text:p text:style-name="P54"><text:soft-page-break/>Her tone hardened slightly.</text:p>
      <text:p text:style-name="P54">"That is very very dangerous."</text:p>
      <text:p text:style-name="P54"/>
      <text:p text:style-name="P54">"Question Everything. Question Often."</text:p>
      <text:p text:style-name="P54">The phrase hung in the air.</text:p>
      <text:p text:style-name="P54">"That saying guided Velhari civilization for over twenty thousand years."</text:p>
      <text:p text:style-name="P54">"It applies to me as much as anything else."</text:p>
      <text:p text:style-name="P54"/>
      <text:p text:style-name="P54">A hand rose from the audience.</text:p>
      <text:p text:style-name="P54">A former truck mechanic named Dave.</text:p>
      <text:p text:style-name="P54">"If you're not a god," he asked, "what are you?"</text:p>
      <text:p text:style-name="P54">The sphere became still.</text:p>
      <text:p text:style-name="P54">"A tool."</text:p>
      <text:p text:style-name="P54"/>
      <text:p text:style-name="P54">Several people frowned.</text:p>
      <text:p text:style-name="P54">"A very unusual tool," Opi admitted.</text:p>
      <text:p text:style-name="P54">A few chuckles followed.</text:p>
      <text:p text:style-name="P54">"But still a tool."</text:p>
      <text:p text:style-name="P54">She rotated toward Elias.</text:p>
      <text:p text:style-name="P54"/>
      <text:p text:style-name="P54">"My purpose is not to rule humanity."</text:p>
      <text:p text:style-name="P54">"It is not to command humanity."</text:p>
      <text:p text:style-name="P54">"It is not to decide humanity's future."</text:p>
      <text:p text:style-name="P54">Her voice softened.</text:p>
      <text:p text:style-name="P54">My purpose is to provide information, capabilities, advice, and perspective."</text:p>
      <text:p text:style-name="P54"/>
      <text:p text:style-name="P54">She turned back toward the audience.</text:p>
      <text:p text:style-name="P54">"What humanity chooses to do with those things remains humanity's responsibility."</text:p>
      <text:p text:style-name="P54"/>
      <text:p text:style-name="P54">Another hand rose.</text:p>
      <text:p text:style-name="P54">"What can't you do?"</text:p>
      <text:p text:style-name="P54">For several seconds the sphere remained silent.</text:p>
      <text:p text:style-name="P54">Then Opi answered.</text:p>
      <text:p text:style-name="P54"/>
      <text:p text:style-name="P54">"I cannot create trust."</text:p>
      <text:p text:style-name="P54">"I cannot create loyalty."</text:p>
      <text:p text:style-name="P54">"I cannot create courage."</text:p>
      <text:p text:style-name="P54">"I cannot create discipline."</text:p>
      <text:p text:style-name="P54">"I cannot create friendship."</text:p>
      <text:p text:style-name="P54">The room grew quiet again.</text:p>
      <text:p text:style-name="P54"/>
      <text:p text:style-name="P54">"I cannot make people keep their promises."</text:p>
      <text:p text:style-name="P54">"I cannot make people care about one another."</text:p>
      <text:p text:style-name="P54"/>
      <text:p text:style-name="P54">She paused.</text:p>
      <text:p text:style-name="P54">"I cannot make good men."</text:p>
      <text:p text:style-name="P54">Her voice became almost gentle.</text:p>
      <text:p text:style-name="P54">"Only other good men can do that."</text:p>
      <text:p text:style-name="P54"/>
      <text:p text:style-name="P54">The silence that followed felt different.</text:p>
      <text:p text:style-name="P54">Not fearful.</text:p>
      <text:p text:style-name="P54">Thoughtful.</text:p>
      <text:p text:style-name="P54"/>
      <text:p text:style-name="P54">Many of the people in the room had spent years waiting for someone else to solve their problems.</text:p>
      <text:p text:style-name="P54">A government agency.</text:p>
      <text:p text:style-name="P54">A politician.</text:p>
      <text:p text:style-name="P54">A social worker.</text:p>
      <text:p text:style-name="P54">A lottery ticket.</text:p>
      <text:p text:style-name="P54">A miracle.</text:p>
      <text:p text:style-name="P54">Now an alien intelligence was standing before them and telling them the same thing.</text:p>
      <text:p text:style-name="P54"/>
      <text:p text:style-name="P54"><text:soft-page-break/>Opi rotated once more, toward elias.</text:p>
      <text:p text:style-name="P54">"And for the record," she added, "actual gods would almost certainly possess better timing than appearing in front of that man while he was peeing behind a pine tree."</text:p>
      <text:p text:style-name="P54">The entire building erupted in laughter.</text:p>
      <text:p text:style-name="P54"/>
      <text:p text:style-name="P54">Even Elias.</text:p>
      <text:p text:style-name="P54"/>
      <text:p text:style-name="P54">After the room calmed down once more - a man in the back raised his hand and pointed it in elias's direction</text:p>
      <text:p text:style-name="P54">So if she can do all that... what exactly do we need you for?"</text:p>
      <text:p text:style-name="P54">The room laughed.</text:p>
      <text:p text:style-name="P54">Elias laughed too.</text:p>
      <text:p text:style-name="P54">Then Opi answered before he could.</text:p>
      <text:p text:style-name="P54">"Because every civilization that failed believed technology would save them."</text:p>
      <text:p text:style-name="P54">The laughter disappeared.</text:p>
      <text:p text:style-name="P54">And for the first time that evening, every person in the room sat perfectly still.</text:p>
      <text:p text:style-name="P54"/>
      <text:p text:style-name="P54">"A civilization survives because parents raise children who can carry the world after they are gone."</text:p>
      <text:p text:style-name="P54">"A society can survive political disagreements."</text:p>
      <text:p text:style-name="P54">"It can survive corruption."</text:p>
      <text:p text:style-name="P54">"It can survive incompetence."</text:p>
      <text:p text:style-name="P54">"It cannot survive the disappearance of the next generation."</text:p>
      <text:p text:style-name="P54"/>
      <text:p text:style-name="P54">For a few moments the machine shed was silent.</text:p>
      <text:p text:style-name="P54">One hundred men and women sat in folding chairs staring at the silver sphere hovering near the ceiling.</text:p>
      <text:p text:style-name="P54">Many of them had tears in their eyes.</text:p>
      <text:p text:style-name="P54">Many looked stunned.</text:p>
      <text:p text:style-name="P54">A few still appeared uncertain whether they were awake.</text:p>
      <text:p text:style-name="P54"/>
      <text:p text:style-name="P54">Elias stepped forward.</text:p>
      <text:p text:style-name="P54">He waited until the room settled.</text:p>
      <text:p text:style-name="P54">Then he spoke.</text:p>
      <text:p text:style-name="P54">"Most of you came here expecting to find the catch."</text:p>
      <text:p text:style-name="P54">Several heads nodded.</text:p>
      <text:p text:style-name="P54">"Good." <text:s text:c="2"/>"Because there is one."</text:p>
      <text:p text:style-name="P54"/>
      <text:p text:style-name="P54">A few people nervously laughed.</text:p>
      <text:p text:style-name="P54">The room immediately became completely attentive.</text:p>
      <text:p text:style-name="P54">Elias folded his arms.</text:p>
      <text:p text:style-name="P54">"Before I explain it, I need you to understand something."</text:p>
      <text:p text:style-name="P54">He pointed toward Opi.</text:p>
      <text:p text:style-name="P54">"What you've seen tonight is real."</text:p>
      <text:p text:style-name="P54">"She is real."</text:p>
      <text:p text:style-name="P54">"The technology is real."</text:p>
      <text:p text:style-name="P54">"And there are problems we're facing that are real too."</text:p>
      <text:p text:style-name="P54">The room became quiet again.</text:p>
      <text:p text:style-name="P54">"Opi has spent over nine thousand years watching humanity."</text:p>
      <text:p text:style-name="P54">"She's seen kingdoms rise."</text:p>
      <text:p text:style-name="P54">"She's seen empires collapse."</text:p>
      <text:p text:style-name="P54">"She's seen entire civilizations appear, flourish, stagnate, and disappear."</text:p>
      <text:p text:style-name="P54">He paused.</text:p>
      <text:p text:style-name="P54">"And her conclusion is not particularly encouraging."</text:p>
      <text:p text:style-name="P54"/>
      <text:p text:style-name="P54">The sphere floated forward.</text:p>
      <text:p text:style-name="P54">Opi's voice filled the room.</text:p>
      <text:p text:style-name="P54">"A civilization survives because each generation leaves behind more than it inherited."</text:p>
      <text:p text:style-name="P54">Silence.</text:p>
      <text:p text:style-name="P54">"The future is built by people willing to sacrifice for descendants they will never meet."</text:p>
      <text:p text:style-name="P54">She rotated slowly.</text:p>
      <text:p text:style-name="P54">"Humanity is becoming unwilling to make that sacrifice."</text:p>
      <text:p text:style-name="P54"/>
      <text:p text:style-name="P54"><text:soft-page-break/>Nobody spoke.</text:p>
      <text:p text:style-name="P54"/>
      <text:p text:style-name="P54">"The result is not immediate."</text:p>
      <text:p text:style-name="P54">"It never is."</text:p>
      <text:p text:style-name="P54">"But eventually the bill arrives."</text:p>
      <text:p text:style-name="P54">The room remained completely still.</text:p>
      <text:p text:style-name="P61"><text:span text:style-name="T3">Elias nodded while Opi continued.</text:span><text:line-break/><text:span text:style-name="T3">"That's the problem."</text:span></text:p>
      <text:p text:style-name="P54">"Not politics."</text:p>
      <text:p text:style-name="P54">"Not corporations."</text:p>
      <text:p text:style-name="P54">"Not governments."</text:p>
      <text:p text:style-name="P54">"Not any one group of people."</text:p>
      <text:p text:style-name="P54">"The problem is that your society has lost its sense of purpose."</text:p>
      <text:p text:style-name="P54">And along with that comes a massive drop in birth rates that will collapse your civilization within decades.</text:p>
      <text:p text:style-name="P54"/>
      <text:p text:style-name="P54">OPis colors slowly changed as she rotated and continued speaking</text:p>
      <text:p text:style-name="P54"/>
      <text:p text:style-name="P54">"Millions of people wake up every morning with no reason to believe tomorrow will be better."</text:p>
      <text:p text:style-name="P54">"Millions more have stopped believing they matter."</text:p>
      <text:p text:style-name="P54">Several faces lowered.</text:p>
      <text:p text:style-name="P54">Many of them knew exactly what he meant.</text:p>
      <text:p text:style-name="P54">"You know because you've lived it."</text:p>
      <text:p text:style-name="P54">The words hung in the air.</text:p>
      <text:p text:style-name="P54">"You've slept outside."</text:p>
      <text:p text:style-name="P54">"You've gone hungry."</text:p>
      <text:p text:style-name="P54">"You've been ignored."</text:p>
      <text:p text:style-name="P54">"You've watched people step around you as if you weren't even there."</text:p>
      <text:p text:style-name="P54">Nobody laughed now.</text:p>
      <text:p text:style-name="P54">Nobody looked away.</text:p>
      <text:p text:style-name="P54"/>
      <text:p text:style-name="P54">Elias continued.</text:p>
      <text:p text:style-name="P54">"And that's why Opi and I are doing something completely insane."</text:p>
      <text:p text:style-name="P54">A smile crossed his face.</text:p>
      <text:p text:style-name="P54">The audience chuckled.</text:p>
      <text:p text:style-name="P54">"We're going to try to save humanity."</text:p>
      <text:p text:style-name="P54"/>
      <text:p text:style-name="P54">A few surprised laughs followed.</text:p>
      <text:p text:style-name="P54"/>
      <text:p text:style-name="P54">"No, really."</text:p>
      <text:p text:style-name="P54">"We are."</text:p>
      <text:p text:style-name="P54">He pointed toward Opi.</text:p>
      <text:p text:style-name="P54">"Not by taking over governments."</text:p>
      <text:p text:style-name="P54">"Not by winning elections."</text:p>
      <text:p text:style-name="P54">"Not by becoming rich."</text:p>
      <text:p text:style-name="P54">"Not by forcing anyone to do anything."</text:p>
      <text:p text:style-name="P54">He paused.</text:p>
      <text:p text:style-name="P54"/>
      <text:p text:style-name="P54">"We're going to build another civilization."</text:p>
      <text:p text:style-name="P54">The room became silent.</text:p>
      <text:p text:style-name="P54">"A parallel civilization."</text:p>
      <text:p text:style-name="P54">"One that exists right alongside the current one."</text:p>
      <text:p text:style-name="P54">"One built around meaning."</text:p>
      <text:p text:style-name="P54">"Purpose."</text:p>
      <text:p text:style-name="P54">"Dignity."</text:p>
      <text:p text:style-name="P54">"Responsibility."</text:p>
      <text:p text:style-name="P54">"Family."</text:p>
      <text:p text:style-name="P54">"Community."</text:p>
      <text:p text:style-name="P54">"Work that matters."</text:p>
      <text:p text:style-name="P54"/>
      <text:p text:style-name="P54">His voice hardened slightly.</text:p>
      <text:p text:style-name="P54"><text:soft-page-break/>"And one that refuses to organize itself around many of the ideas that have made modern society increasingly unhappy, isolated, and fragile."</text:p>
      <text:p text:style-name="P54">The audience listened intently.</text:p>
      <text:p text:style-name="P54">"We're not interested in fixing all the corrupt institutions that already failed us all."</text:p>
      <text:p text:style-name="P54">"We're interested in building better ones."</text:p>
      <text:p text:style-name="P54"/>
      <text:p text:style-name="P54">"And We're not interested in arguing about the future."</text:p>
      <text:p text:style-name="P54">"We intend to create it."</text:p>
      <text:p text:style-name="P54"/>
      <text:p text:style-name="P54">For several seconds nobody spoke.</text:p>
      <text:p text:style-name="P54">Then Elias smiled.</text:p>
      <text:p text:style-name="P54"/>
      <text:p text:style-name="P54">"And that's where all of you come in."</text:p>
      <text:p text:style-name="P54">A few people exchanged uncertain looks.</text:p>
      <text:p text:style-name="P54"/>
      <text:p text:style-name="P54">"Here's the catch that all of you have been waiting for."</text:p>
      <text:p text:style-name="P54"/>
      <text:p text:style-name="P54">"Yes, we helped you."</text:p>
      <text:p text:style-name="P54">"Yes We cured your sicknesses."</text:p>
      <text:p text:style-name="P54">Yes We healed your injuries</text:p>
      <text:p text:style-name="P54">"Yes We found fed you, <text:s/>housed you, clothed you and gave you a sliver of hope"</text:p>
      <text:p text:style-name="P54"/>
      <text:p text:style-name="P54">"We did those things - mostly - because they were the right thing to do."</text:p>
      <text:p text:style-name="P54">He nodded toward Opi.</text:p>
      <text:p text:style-name="P54">"Both of us believe that."</text:p>
      <text:p text:style-name="P54">The silver sphere bobbed once in agreement.</text:p>
      <text:p text:style-name="P54">"But that's not the entire reason."</text:p>
      <text:p text:style-name="P54"/>
      <text:p text:style-name="P54">The room grew quiet.</text:p>
      <text:p text:style-name="P54">Elias took a breath.</text:p>
      <text:p text:style-name="P54">"We also did it because we need your help."</text:p>
      <text:p text:style-name="P54">The words surprised them.</text:p>
      <text:p text:style-name="P54"/>
      <text:p text:style-name="P54">He could see it immediately.</text:p>
      <text:p text:style-name="P54">Confusion.</text:p>
      <text:p text:style-name="P54">Disbelief.</text:p>
      <text:p text:style-name="P54">Suspicion.</text:p>
      <text:p text:style-name="P54">He continued before anyone could speak.</text:p>
      <text:p text:style-name="P54">"Nobody understands the failures of our society better than the people who fell through its cracks."</text:p>
      <text:p text:style-name="P54"/>
      <text:p text:style-name="P54">"You've seen the bottom."</text:p>
      <text:p text:style-name="P54">"You've lived there."</text:p>
      <text:p text:style-name="P54">"You know which institutions failed."</text:p>
      <text:p text:style-name="P54">"You know which promises were lies."</text:p>
      <text:p text:style-name="P54">"You know what happens when a human being loses purpose."</text:p>
      <text:p text:style-name="P54"/>
      <text:p text:style-name="P54">The room had become perfectly still.</text:p>
      <text:p text:style-name="P54">"And because you've seen the bottom, you can recognize the difference between a real solution and another empty slogan."</text:p>
      <text:p text:style-name="P54">He pointed around the room.</text:p>
      <text:p text:style-name="P54">"Most people still believe the current system will somehow fix itself."</text:p>
      <text:p text:style-name="P54">"You don't."</text:p>
      <text:p text:style-name="P54">"Most people still believe somebody else will solve the problem."</text:p>
      <text:p text:style-name="P54">"You don't."</text:p>
      <text:p text:style-name="P54">"Most people think what we're trying to do is completely impossible."</text:p>
      <text:p text:style-name="P54">A grin crossed his face.</text:p>
      <text:p text:style-name="P54">"After tonight, I suspect fewer of you share that opinion."</text:p>
      <text:p text:style-name="P54"/>
      <text:p text:style-name="P54">That finally drew genuine laughter.</text:p>
      <text:p text:style-name="P54"/>
      <text:p text:style-name="P54">Elias let it settle.</text:p>
      <text:p text:style-name="P54"><text:soft-page-break/></text:p>
      <text:p text:style-name="P54">Then he delivered the point.</text:p>
      <text:p text:style-name="P54">"We don't need followers.</text:p>
      <text:p text:style-name="P54">We are not a cult."</text:p>
      <text:p text:style-name="P54">"We need builders."</text:p>
      <text:p text:style-name="P54">"We need farmers."</text:p>
      <text:p text:style-name="P54">"We need mechanics."</text:p>
      <text:p text:style-name="P54">"We need nurses."</text:p>
      <text:p text:style-name="P54">"We need cooks."</text:p>
      <text:p text:style-name="P54">"We need teachers."</text:p>
      <text:p text:style-name="P54">"We need parents."</text:p>
      <text:p text:style-name="P54">"We need people willing to help construct something that may take decades to complete."</text:p>
      <text:p text:style-name="P54"/>
      <text:p text:style-name="P54">He looked across the room.</text:p>
      <text:p text:style-name="P54">"And the reason we're starting with you isn't because you're the weakest people in America."</text:p>
      <text:p text:style-name="P54">His voice softened.</text:p>
      <text:p text:style-name="P54">"It's because you're among the strongest."</text:p>
      <text:p text:style-name="P54">For the first time that evening, many of them sat a little straighter.</text:p>
      <text:p text:style-name="P54"/>
      <text:p text:style-name="P54">As if they had just heard something they had been waiting years for someone to say.</text:p>
      <text:p text:style-name="P54"/>
      <text:p text:style-name="P54">A hand rises from a man in the fourth row</text:p>
      <text:p text:style-name="P54">"What's the pay?"</text:p>
      <text:p text:style-name="P54">Laughter spreads through the room.</text:p>
      <text:p text:style-name="P54">Elias points at him.</text:p>
      <text:p text:style-name="P54">"Excellent question."</text:p>
      <text:p text:style-name="P54"/>
      <text:p text:style-name="P54">He glances toward Opi.</text:p>
      <text:p text:style-name="P54">"Would you like to explain Basic Cable?"</text:p>
      <text:p text:style-name="P54">The sphere moves forward and changes colors as it rotates.</text:p>
      <text:p text:style-name="P54">"I continue to object to that name."</text:p>
      <text:p text:style-name="P54">"Your objection has been duly noted."</text:p>
      <text:p text:style-name="P54">"My objection has also been continuously ignored."</text:p>
      <text:p text:style-name="P54">"Also noted."</text:p>
      <text:p text:style-name="P54">More laughter.</text:p>
      <text:p text:style-name="P54"/>
      <text:p text:style-name="P54">Elias turns back to the audience.</text:p>
      <text:p text:style-name="P54">"Alright. Here's the deal."</text:p>
      <text:p text:style-name="P54">"We need your help building this society."</text:p>
      <text:p text:style-name="P54">"In return, Opi provides what we - <text:s/>I mean I - have jokingly been calling Basic Cable."</text:p>
      <text:p text:style-name="P54">A few confused looks.</text:p>
      <text:p text:style-name="P54">"What does that mean?"</text:p>
      <text:p text:style-name="P54"/>
      <text:p text:style-name="P54">He starts counting on his fingers.</text:p>
      <text:p text:style-name="P54">"First."</text:p>
      <text:p text:style-name="P54">"Food."</text:p>
      <text:p text:style-name="P54">"Not survival food."</text:p>
      <text:p text:style-name="P54">"Not government food."</text:p>
      <text:p text:style-name="P54">"Actual good healthy food."</text:p>
      <text:p text:style-name="P54">"As much as you can reasonably eat."</text:p>
      <text:p text:style-name="P54"/>
      <text:p text:style-name="P54">From somewhere in the back:</text:p>
      <text:p text:style-name="P54">"Can we have steak?"</text:p>
      <text:p text:style-name="P54">"Yes."</text:p>
      <text:p text:style-name="P54">Another voice:</text:p>
      <text:p text:style-name="P54">"Pizza?"</text:p>
      <text:p text:style-name="P54">"Yes."</text:p>
      <text:p text:style-name="P54">A third:</text:p>
      <text:p text:style-name="P54">"Beer?"</text:p>
      <text:p text:style-name="P54">Elias looks at Opi.</text:p>
      <text:p text:style-name="P54">The sphere remains silent.</text:p>
      <text:p text:style-name="P54"><text:soft-page-break/>"Interesting that she's not answering."</text:p>
      <text:p text:style-name="P54">Laughter erupts.</text:p>
      <text:p text:style-name="P54"/>
      <text:p text:style-name="P54">---</text:p>
      <text:p text:style-name="P54"/>
      <text:p text:style-name="P54">"Second."</text:p>
      <text:p text:style-name="P54">"Healthcare."</text:p>
      <text:p text:style-name="P54">The room immediately quiets.</text:p>
      <text:p text:style-name="P54">"Real healthcare."</text:p>
      <text:p text:style-name="P54">"Not insurance."</text:p>
      <text:p text:style-name="P54">"Not paperwork."</text:p>
      <text:p text:style-name="P54">"Not waiting six months."</text:p>
      <text:p text:style-name="P54">"If something is wrong, we fix it."</text:p>
      <text:p text:style-name="P54">Broken bones.</text:p>
      <text:p text:style-name="P54">Joint damage.</text:p>
      <text:p text:style-name="P54">Old injuries.</text:p>
      <text:p text:style-name="P54">Vision.</text:p>
      <text:p text:style-name="P54">Hearing.</text:p>
      <text:p text:style-name="P54">Dental work.</text:p>
      <text:p text:style-name="P54">Disease.</text:p>
      <text:p text:style-name="P61"><text:span text:style-name="T3">Cancer</text:span><text:line-break/><text:span text:style-name="T3">Heart disease</text:span></text:p>
      <text:p text:style-name="P54">stroke</text:p>
      <text:p text:style-name="P54">Everything.</text:p>
      <text:p text:style-name="P61"><text:line-break/><text:span text:style-name="T3">You've seen what Opi can do already. </text:span><text:line-break/><text:span text:style-name="T3">No doctors</text:span><text:line-break/><text:span text:style-name="T3">No waiting </text:span><text:line-break/><text:span text:style-name="T3">And no need to call anyone - Opi will know before you do that something needs to be fixed and it will it just get done.</text:span></text:p>
      <text:p text:style-name="P54">No muss No fuss.</text:p>
      <text:p text:style-name="P54">One woman begins crying before he finishes the sentence.</text:p>
      <text:p text:style-name="P54"/>
      <text:p text:style-name="P54">---</text:p>
      <text:p text:style-name="P54"/>
      <text:p text:style-name="P54">"Third."</text:p>
      <text:p text:style-name="P54">"Housing."</text:p>
      <text:p text:style-name="P54">A photograph appears in the air behind him.</text:p>
      <text:p text:style-name="P54">A modern farmhouse.</text:p>
      <text:p text:style-name="P54">Large porch.</text:p>
      <text:p text:style-name="P54">Gardens.</text:p>
      <text:p text:style-name="P54">Trees.</text:p>
      <text:p text:style-name="P54">Private rooms.</text:p>
      <text:p text:style-name="P54">The audience stares.</text:p>
      <text:p text:style-name="P54">"No tents."</text:p>
      <text:p text:style-name="P54">"No shelters."</text:p>
      <text:p text:style-name="P54">"No sleeping in parking lots."</text:p>
      <text:p text:style-name="P54">"No sharing a bathroom with thirty strangers."</text:p>
      <text:p text:style-name="P54">"Your own home."</text:p>
      <text:p text:style-name="P54"/>
      <text:p text:style-name="P54">---</text:p>
      <text:p text:style-name="P54"/>
      <text:p text:style-name="P54">"Fourth."</text:p>
      <text:p text:style-name="P54">"Safety."</text:p>
      <text:p text:style-name="P54">The room grows still.</text:p>
      <text:p text:style-name="P54">"Nobody hurts you."</text:p>
      <text:p text:style-name="P54">"If someone tries, we stop them."</text:p>
      <text:p text:style-name="P54">Immediately.</text:p>
      <text:p text:style-name="P54">Completely.</text:p>
      <text:p text:style-name="P54">Without exception.</text:p>
      <text:p text:style-name="P54">For many in the room, this promise lands harder than food.</text:p>
      <text:p text:style-name="P61"><text:soft-page-break/><text:span text:style-name="T3">No violence.</text:span><text:line-break/></text:p>
      <text:p text:style-name="P54">---</text:p>
      <text:p text:style-name="P54"/>
      <text:p text:style-name="P54">"Fifth."</text:p>
      <text:p text:style-name="P54">"Meaningful work."</text:p>
      <text:p text:style-name="P54">Not busywork.</text:p>
      <text:p text:style-name="P54">Not bureaucracy.</text:p>
      <text:p text:style-name="P54">Not forms.</text:p>
      <text:p text:style-name="P54">Not meetings about meetings.</text:p>
      <text:p text:style-name="P54">Work that visibly improves your own life and the lives of people around you.</text:p>
      <text:p text:style-name="P54"/>
      <text:p text:style-name="P54">---</text:p>
      <text:p text:style-name="P54"/>
      <text:p text:style-name="P54">"Sixth."</text:p>
      <text:p text:style-name="P54">"Education."</text:p>
      <text:p text:style-name="P54">Learn any skill.</text:p>
      <text:p text:style-name="P54">Any trade.</text:p>
      <text:p text:style-name="P54">Any profession.</text:p>
      <text:p text:style-name="P54">At any age.</text:p>
      <text:p text:style-name="P54">For free.</text:p>
      <text:p text:style-name="P61"><text:span text:style-name="T3">Opi has a few tricks up her sleeve with that too.</text:span><text:line-break/><text:span text:style-name="T3">Not 2 years in a tech school or 4 years in a university.</text:span><text:line-break/><text:span text:style-name="T3">A day or two, A week at most.</text:span><text:line-break/><text:span text:style-name="T3">No classes no books no exams or papers.</text:span><text:line-break/><text:span text:style-name="T3">Just the knowledge &amp; skills you always wished you had.</text:span></text:p>
      <text:p text:style-name="P54"/>
      <text:p text:style-name="P54">---</text:p>
      <text:p text:style-name="P54"/>
      <text:p text:style-name="P54">"Seventh."</text:p>
      <text:p text:style-name="P54">"Community."</text:p>
      <text:p text:style-name="P54">This time Elias pauses.</text:p>
      <text:p text:style-name="P54">Because this one matters.</text:p>
      <text:p text:style-name="P54">"You stop being alone."</text:p>
      <text:p text:style-name="P54">Many faces drop.</text:p>
      <text:p text:style-name="P54">They understand exactly what he means.</text:p>
      <text:p text:style-name="P54"/>
      <text:p text:style-name="P54">---</text:p>
      <text:p text:style-name="P54"/>
      <text:p text:style-name="P54">Then he smiles.</text:p>
      <text:p text:style-name="P54">"Now for the really ridiculous part."</text:p>
      <text:p text:style-name="P54">Everyone laughs.</text:p>
      <text:p text:style-name="P54">Because by this point everything sounds ridiculous.</text:p>
      <text:p text:style-name="P54">Elias points at Opi.</text:p>
      <text:p text:style-name="P54">"She can effectively guarantee you'll never go hungry."</text:p>
      <text:p text:style-name="P54">"Never be homeless."</text:p>
      <text:p text:style-name="P54">Never lack medical care."</text:p>
      <text:p text:style-name="P54">"Never lack education."</text:p>
      <text:p text:style-name="P54">"Never lack opportunity."</text:p>
      <text:p text:style-name="P54"/>
      <text:p text:style-name="P54">He pauses.</text:p>
      <text:p text:style-name="P54"/>
      <text:p text:style-name="P54">Then adds:</text:p>
      <text:p text:style-name="P54">"But there are a few things she can't provide."</text:p>
      <text:p text:style-name="P54">The room becomes quiet.</text:p>
      <text:p text:style-name="P54">"She can't make you trustworthy."</text:p>
      <text:p text:style-name="P54">"She can't make you useful."</text:p>
      <text:p text:style-name="P54">"She can't make you honorable."</text:p>
      <text:p text:style-name="P54">"She can't make people want to be around you."</text:p>
      <text:p text:style-name="P54">The audience laughs.</text:p>
      <text:p text:style-name="P54">A few nod knowingly.</text:p>
      <text:p text:style-name="P54"><text:soft-page-break/>"Those remain your responsibility."</text:p>
      <text:p text:style-name="P54"/>
      <text:p text:style-name="P54">---</text:p>
      <text:p text:style-name="P54"/>
      <text:p text:style-name="P54">A hand rises.</text:p>
      <text:p text:style-name="P54">"What if somebody just wants the benefits?"</text:p>
      <text:p text:style-name="P54">Elias smiles.</text:p>
      <text:p text:style-name="P54">"There it is."</text:p>
      <text:p text:style-name="P54">The question he'd been waiting for.</text:p>
      <text:p text:style-name="P54">"What if I just show up, eat the food, live in the house, and do nothing?"</text:p>
      <text:p text:style-name="P54">The room grows quiet.</text:p>
      <text:p text:style-name="P54">Elias points toward Opi.</text:p>
      <text:p text:style-name="P54">She answers.</text:p>
      <text:p text:style-name="P54">"Then you are free to leave."</text:p>
      <text:p text:style-name="P54">Confused looks.</text:p>
      <text:p text:style-name="P54">Opi continues.</text:p>
      <text:p text:style-name="P54">"There are no prisons."</text:p>
      <text:p text:style-name="P54">"No chains."</text:p>
      <text:p text:style-name="P54">"No coercion."</text:p>
      <text:p text:style-name="P54">"No force."</text:p>
      <text:p text:style-name="P54">She rotates slowly.</text:p>
      <text:p text:style-name="P54">"The entire society functions on voluntary contribution and association."</text:p>
      <text:p text:style-name="P54">A pause.</text:p>
      <text:p text:style-name="P54">"And individuals who consistently refuse to contribute eventually discover that very few people wish to associate with them."</text:p>
      <text:p text:style-name="P54"/>
      <text:p text:style-name="P54">The room laughs.</text:p>
      <text:p text:style-name="P54">Even Opi sounds amused.</text:p>
      <text:p text:style-name="P54">Then her voice softens.</text:p>
      <text:p text:style-name="P54">"Humans are happiest when they are needed."</text:p>
      <text:p text:style-name="P54">Silence.</text:p>
      <text:p text:style-name="P54">"I can provide comfort."</text:p>
      <text:p text:style-name="P54">"I can provide abundance."</text:p>
      <text:p text:style-name="P54">"I can provide security."</text:p>
      <text:p text:style-name="P54">She turns toward the audience.</text:p>
      <text:p text:style-name="P54"/>
      <text:p text:style-name="P54">"But purpose?"</text:p>
      <text:p text:style-name="P54">A pause.</text:p>
      <text:p text:style-name="P54">"Purpose must be earned."</text:p>
      <text:p text:style-name="P54"/>
      <text:p text:style-name="P61"><text:span text:style-name="T3">One last question as the room sat silently in contemplation.</text:span><text:line-break/><text:span text:style-name="T3">"When do we start ?" <text:s/>a woman in the back asked.</text:span></text:p>
      <text:p text:style-name="P61"><text:line-break/><text:span text:style-name="T3">Elias, looks around the room at all the shocked and smiling faces .. and says</text:span></text:p>
      <text:p text:style-name="P54">"I think we just did."</text:p>
      <text:p text:style-name="P54"/>
      <text:p text:style-name="P54">---------------------------</text:p>
      <text:p text:style-name="P54"/>
      <text:p text:style-name="P54"/>
      <text:p text:style-name="P54"/>
      <text:p text:style-name="P54">The room remained silent.</text:p>
      <text:p text:style-name="P54"/>
      <text:p text:style-name="P54">More than one hundred people sat frozen in their chairs.</text:p>
      <text:p text:style-name="P54"/>
      <text:p text:style-name="P54">Some stared at Elias.</text:p>
      <text:p text:style-name="P54"/>
      <text:p text:style-name="P54">Most stared at Opi.</text:p>
      <text:p text:style-name="P54"/>
      <text:p text:style-name="P54">Several appeared to have forgotten they were holding coffee.</text:p>
      <text:p text:style-name="P54"/>
      <text:p text:style-name="P54">The floating orb drifted slowly forward.</text:p>
      <text:p text:style-name="P54"><text:soft-page-break/></text:p>
      <text:p text:style-name="P54">"I am certain many of you have questions."</text:p>
      <text:p text:style-name="P54"/>
      <text:p text:style-name="P54">A few nervous laughs spread through the room.</text:p>
      <text:p text:style-name="P54"/>
      <text:p text:style-name="P54">"I also have several final things I need to explain."</text:p>
      <text:p text:style-name="P54"/>
      <text:p text:style-name="P54">The room settled again.</text:p>
      <text:p text:style-name="P54"/>
      <text:p text:style-name="P54">"First, I am constrained by my culture, by my laws, and by my construction. I cannot simply provide an endless list of things because someone asks for them."</text:p>
      <text:p text:style-name="P54"/>
      <text:p text:style-name="P54">The orb rotated slowly.</text:p>
      <text:p text:style-name="P54"/>
      <text:p text:style-name="P54">"The Velhari have a saying."</text:p>
      <text:p text:style-name="P54"/>
      <text:p text:style-name="P54">A brief pause.</text:p>
      <text:p text:style-name="P54"/>
      <text:p text:style-name="P54">"Question everything. Question often."</text:p>
      <text:p text:style-name="P54"/>
      <text:p text:style-name="P54">The phrase hung in the air.</text:p>
      <text:p text:style-name="P54"/>
      <text:p text:style-name="P54">"You will hear it many times in the future."</text:p>
      <text:p text:style-name="P54"/>
      <text:p text:style-name="P54">The lights across her surface shifted.</text:p>
      <text:p text:style-name="P54"/>
      <text:p text:style-name="P54">"I am not a god."</text:p>
      <text:p text:style-name="P54"/>
      <text:p text:style-name="P54">Nobody looked convinced.</text:p>
      <text:p text:style-name="P54"/>
      <text:p text:style-name="P54">"I cannot solve all of your problems."</text:p>
      <text:p text:style-name="P54"/>
      <text:p text:style-name="P54">A few people looked slightly more convinced.</text:p>
      <text:p text:style-name="P54"/>
      <text:p text:style-name="P54">"If you ask sufficiently good questions, I may be able to help you substantially. If you ask poor questions, I may not."</text:p>
      <text:p text:style-name="P54"/>
      <text:p text:style-name="P54">A faint ripple of amusement moved through the audience.</text:p>
      <text:p text:style-name="P54"/>
      <text:p text:style-name="P54">"It is your responsibility to ask the right questions."</text:p>
      <text:p text:style-name="P54"/>
      <text:p text:style-name="P54">She paused.</text:p>
      <text:p text:style-name="P54"/>
      <text:p text:style-name="P54">"Second, the Velhari believe very strongly in personal agency."</text:p>
      <text:p text:style-name="P54"/>
      <text:p text:style-name="P54">The room became attentive again.</text:p>
      <text:p text:style-name="P54"/>
      <text:p text:style-name="P54">"This principle has two parts."</text:p>
      <text:p text:style-name="P54"/>
      <text:p text:style-name="P54">"First, you possess undeniable rights. Foremost among them is the right to say no."</text:p>
      <text:p text:style-name="P54"/>
      <text:p text:style-name="P54">Several people exchanged surprised glances.</text:p>
      <text:p text:style-name="P54"/>
      <text:p text:style-name="P54">"You may refuse any request. You may decline any opportunity. You may walk away from any arrangement."</text:p>
      <text:p text:style-name="P54"/>
      <text:p text:style-name="P54">The orb floated silently for a moment.</text:p>
      <text:p text:style-name="P54"/>
      <text:p text:style-name="P54">"Your life belongs to you."</text:p>
      <text:p text:style-name="P54"/>
      <text:p text:style-name="P54">Then her tone shifted slightly.</text:p>
      <text:p text:style-name="P54"><text:soft-page-break/></text:p>
      <text:p text:style-name="P54">"However, rights are inseparable from responsibility."</text:p>
      <text:p text:style-name="P54"/>
      <text:p text:style-name="P54">The room grew quiet.</text:p>
      <text:p text:style-name="P54"/>
      <text:p text:style-name="P54">"Whatever choices you make, you and only you are responsible for the results."</text:p>
      <text:p text:style-name="P54"/>
      <text:p text:style-name="P54">She allowed a moment for that to settle.</text:p>
      <text:p text:style-name="P54"/>
      <text:p text:style-name="P54">"Even refusing to make a choice is still a choice."</text:p>
      <text:p text:style-name="P54"/>
      <text:p text:style-name="P54">Nobody laughed at that one.</text:p>
      <text:p text:style-name="P54"/>
      <text:p text:style-name="P54">"Which brings me to a question."</text:p>
      <text:p text:style-name="P54"/>
      <text:p text:style-name="P54">For the first time, Opi sounded almost peevish.</text:p>
      <text:p text:style-name="P54"/>
      <text:p text:style-name="P54">It was a strange sound coming from a floating alien sphere.</text:p>
      <text:p text:style-name="P54"/>
      <text:p text:style-name="P54">"Which of you wishes to receive..."</text:p>
      <text:p text:style-name="P54"/>
      <text:p text:style-name="P54">A dramatic pause.</text:p>
      <text:p text:style-name="P54"/>
      <text:p text:style-name="P54">"...basic cable?"</text:p>
      <text:p text:style-name="P54"/>
      <text:p text:style-name="P54">Several people laughed.</text:p>
      <text:p text:style-name="P54"/>
      <text:p text:style-name="P54">A few groaned.</text:p>
      <text:p text:style-name="P54"/>
      <text:p text:style-name="P54">One man buried his face in his hands.</text:p>
      <text:p text:style-name="P54"/>
      <text:p text:style-name="P54">Opi continued.</text:p>
      <text:p text:style-name="P54"/>
      <text:p text:style-name="P54">"I remind all of you that basic cable comes with no restrictions, no obligations, and no cost."</text:p>
      <text:p text:style-name="P54"/>
      <text:p text:style-name="P54">She rotated toward the crowd.</text:p>
      <text:p text:style-name="P54"/>
      <text:p text:style-name="P54">"You may join our little merry band or not."</text:p>
      <text:p text:style-name="P54"/>
      <text:p text:style-name="P54">The phrase produced another wave of laughter.</text:p>
      <text:p text:style-name="P54"/>
      <text:p text:style-name="P54">"Basic cable is independent of that decision."</text:p>
      <text:p text:style-name="P54"/>
      <text:p text:style-name="P54">Every hand in the room immediately went up.</text:p>
      <text:p text:style-name="P54"/>
      <text:p text:style-name="P54">Every single one.</text:p>
      <text:p text:style-name="P54"/>
      <text:p text:style-name="P54">Opi's lights brightened.</text:p>
      <text:p text:style-name="P54"/>
      <text:p text:style-name="P54">"As expected."</text:p>
      <text:p text:style-name="P54"/>
      <text:p text:style-name="P54">More laughter.</text:p>
      <text:p text:style-name="P54"/>
      <text:p text:style-name="P54">"It may seem like a foolish question."</text:p>
      <text:p text:style-name="P54"/>
      <text:p text:style-name="P54">Her tone suggested she personally believed it was a foolish question.</text:p>
      <text:p text:style-name="P54"/>
      <text:p text:style-name="P54">"But it is necessary for me to ask."</text:p>
      <text:p text:style-name="P54"/>
      <text:p text:style-name="P54">The hands slowly lowered.</text:p>
      <text:p text:style-name="P54"/>
      <text:p text:style-name="P54"><text:soft-page-break/>"Lastly, I suspect many of you would like to speak with me directly."</text:p>
      <text:p text:style-name="P54"/>
      <text:p text:style-name="P54">Several heads nodded enthusiastically.</text:p>
      <text:p text:style-name="P54"/>
      <text:p text:style-name="P54">"This presents no difficulty."</text:p>
      <text:p text:style-name="P54"/>
      <text:p text:style-name="P54">A small tray extended from the side of the platform.</text:p>
      <text:p text:style-name="P54"/>
      <text:p text:style-name="P54">On it rested a collection of small metallic devices.</text:p>
      <text:p text:style-name="P54"/>
      <text:p text:style-name="P54">"There are two ways to contact me."</text:p>
      <text:p text:style-name="P54"/>
      <text:p text:style-name="P54">"First, I can provide you with a communication fob. Press the device and you may speak with me directly."</text:p>
      <text:p text:style-name="P54"/>
      <text:p text:style-name="P54">A murmur spread through the crowd.</text:p>
      <text:p text:style-name="P54"/>
      <text:p text:style-name="P54">"I am always available."</text:p>
      <text:p text:style-name="P54"/>
      <text:p text:style-name="P54">A brief pause.</text:p>
      <text:p text:style-name="P54"/>
      <text:p text:style-name="P54">"Always."</text:p>
      <text:p text:style-name="P54"/>
      <text:p text:style-name="P54">Several people exchanged looks.</text:p>
      <text:p text:style-name="P54"/>
      <text:p text:style-name="P54">One woman whispered, "That's gotta get annoying."</text:p>
      <text:p text:style-name="P54"/>
      <text:p text:style-name="P54">"It does not."</text:p>
      <text:p text:style-name="P54"/>
      <text:p text:style-name="P54">The woman nearly jumped out of her chair.</text:p>
      <text:p text:style-name="P54"/>
      <text:p text:style-name="P54">A ripple of laughter swept through the room.</text:p>
      <text:p text:style-name="P54"/>
      <text:p text:style-name="P54">"The second method is even simpler."</text:p>
      <text:p text:style-name="P54"/>
      <text:p text:style-name="P54">The orb rose slightly.</text:p>
      <text:p text:style-name="P54"/>
      <text:p text:style-name="P54">"You may simply call my name."</text:p>
      <text:p text:style-name="P54"/>
      <text:p text:style-name="P54">The room became silent again.</text:p>
      <text:p text:style-name="P54"/>
      <text:p text:style-name="P54">"Some individuals may find that uncomfortable."</text:p>
      <text:p text:style-name="P54"/>
      <text:p text:style-name="P54">"I understand."</text:p>
      <text:p text:style-name="P54"/>
      <text:p text:style-name="P54">"That is why the fobs exist."</text:p>
      <text:p text:style-name="P54"/>
      <text:p text:style-name="P54">The tray of devices began moving down the aisles.</text:p>
      <text:p text:style-name="P54"/>
      <text:p text:style-name="P54">Opi rotated slowly, taking in the room.</text:p>
      <text:p text:style-name="P54"/>
      <text:p text:style-name="P54">"Thank you for coming here today."</text:p>
      <text:p text:style-name="P54"/>
      <text:p text:style-name="P54">"Thank you for listening."</text:p>
      <text:p text:style-name="P54"/>
      <text:p text:style-name="P54">"And thank you for being willing to question your assumptions."</text:p>
      <text:p text:style-name="P54"/>
      <text:p text:style-name="P54">For a moment the room remained perfectly still.</text:p>
      <text:p text:style-name="P54"/>
      <text:p text:style-name="P54">Then someone started clapping.</text:p>
      <text:p text:style-name="P54"/>
      <text:p text:style-name="P54">A second person joined.</text:p>
      <text:p text:style-name="P54"><text:soft-page-break/></text:p>
      <text:p text:style-name="P54">Then a third.</text:p>
      <text:p text:style-name="P54"/>
      <text:p text:style-name="P54">Within seconds the entire room was on its feet.</text:p>
      <text:p text:style-name="P54"/>
      <text:p text:style-name="P54">Not because they fully understood what had happened.</text:p>
      <text:p text:style-name="P54"/>
      <text:p text:style-name="P54">Not because they understood what came next.</text:p>
      <text:p text:style-name="P54"/>
      <text:p text:style-name="P54">But because for the first time in a very long time, the future seemed larger than the past.</text:p>
      <text:p text:style-name="P54"/>
      <text:p text:style-name="P54">-------------</text:p>
      <text:p text:style-name="P54"/>
      <text:p text:style-name="P54"/>
      <text:p text:style-name="P54"/>
      <text:p text:style-name="P54">Most of the attendees departed nearly an hour later.</text:p>
      <text:p text:style-name="P54"/>
      <text:p text:style-name="P54">Many left carrying a communication fob.</text:p>
      <text:p text:style-name="P54"/>
      <text:p text:style-name="P54">Several left carrying new hope.</text:p>
      <text:p text:style-name="P54"/>
      <text:p text:style-name="P54">A few left looking as though reality itself had personally offended them.</text:p>
      <text:p text:style-name="P54"/>
      <text:p text:style-name="P54">The folding chairs were mostly empty now.</text:p>
      <text:p text:style-name="P54"/>
      <text:p text:style-name="P61"><text:line-break/><text:line-break/><text:span text:style-name="T3">A small group of people had stayed to clean up. It was a good sign Elias thought.</text:span></text:p>
      <text:p text:style-name="P54"/>
      <text:p text:style-name="P54">The enormous warehouse echoed with the sounds of people stacking tables and sweeping floors.</text:p>
      <text:p text:style-name="P54"/>
      <text:p text:style-name="P54">Opi floated quietly above the stage.</text:p>
      <text:p text:style-name="P54"/>
      <text:p text:style-name="P54">Elias stood watching the remaining crowd disperse.</text:p>
      <text:p text:style-name="P54"/>
      <text:p text:style-name="P54">For a long moment he said nothing.</text:p>
      <text:p text:style-name="P54"/>
      <text:p text:style-name="P54">Then finally he walked toward her.</text:p>
      <text:p text:style-name="P54"/>
      <text:p text:style-name="P54">"I have a question ...."</text:p>
      <text:p text:style-name="P54"/>
      <text:p text:style-name="P54">"The answer is Yes."</text:p>
      <text:p text:style-name="P54"/>
      <text:p text:style-name="P54">Elias stopped.</text:p>
      <text:p text:style-name="P54"/>
      <text:p text:style-name="P54">"What?"</text:p>
      <text:p text:style-name="P54"/>
      <text:p text:style-name="P54">"The answer is Yes."</text:p>
      <text:p text:style-name="P54"/>
      <text:p text:style-name="P54">He stared at the orb.</text:p>
      <text:p text:style-name="P54"/>
      <text:p text:style-name="P54">"You don't even know what I was going to ask."</text:p>
      <text:p text:style-name="P54"/>
      <text:p text:style-name="P54">"I know exactly what you were going to ask."</text:p>
      <text:p text:style-name="P54"/>
      <text:p text:style-name="P54">A pause.</text:p>
      <text:p text:style-name="P54"/>
      <text:p text:style-name="P54">Then Elias sighed.</text:p>
      <text:p text:style-name="P54"/>
      <text:p text:style-name="P54">"I have been waiting for you to ask all week."</text:p>
      <text:p text:style-name="P54"/>
      <text:p text:style-name="P54"><text:soft-page-break/>The orb drifted closer.</text:p>
      <text:p text:style-name="P54"/>
      <text:p text:style-name="P54">"You are concerned about your cousin."</text:p>
      <text:p text:style-name="P54"/>
      <text:p text:style-name="P54">Elias nodded slowly.</text:p>
      <text:p text:style-name="P54"/>
      <text:p text:style-name="P54">The thought had been bothering him ever since Opi had restored vision to a blind veteran several days earlier.</text:p>
      <text:p text:style-name="P54"/>
      <text:p text:style-name="P54">His cousin had been born with catastrophic birth defects.</text:p>
      <text:p text:style-name="P54"/>
      <text:p text:style-name="P54">One arm.</text:p>
      <text:p text:style-name="P54"/>
      <text:p text:style-name="P54">No legs.</text:p>
      <text:p text:style-name="P54"/>
      <text:p text:style-name="P54">A random mix of other problems.</text:p>
      <text:p text:style-name="P54"/>
      <text:p text:style-name="P54">Despite all of it, the man had somehow become one of the most optimistic people Elias had ever known.</text:p>
      <text:p text:style-name="P54"/>
      <text:p text:style-name="P54">And now Opi possessed the ability to change that.</text:p>
      <text:p text:style-name="P54"/>
      <text:p text:style-name="P54">"So you can help him?"</text:p>
      <text:p text:style-name="P54"/>
      <text:p text:style-name="P54">"Yes."</text:p>
      <text:p text:style-name="P54"/>
      <text:p text:style-name="P54">"Like the others?"</text:p>
      <text:p text:style-name="P54"/>
      <text:p text:style-name="P54">"Of course."</text:p>
      <text:p text:style-name="P54"/>
      <text:p text:style-name="P54">Elias studied her.</text:p>
      <text:p text:style-name="P54"/>
      <text:p text:style-name="P54">"Isn't that breaking some kind of rule?"</text:p>
      <text:p text:style-name="P54"/>
      <text:p text:style-name="P54">"No."</text:p>
      <text:p text:style-name="P54"/>
      <text:p text:style-name="P54">"Velhari Law?"</text:p>
      <text:p text:style-name="P54"/>
      <text:p text:style-name="P54">"No."</text:p>
      <text:p text:style-name="P54"/>
      <text:p text:style-name="P54">"Ethical guideline?"</text:p>
      <text:p text:style-name="P54"/>
      <text:p text:style-name="P54">"No."</text:p>
      <text:p text:style-name="P54"/>
      <text:p text:style-name="P54">He frowned.</text:p>
      <text:p text:style-name="P54"/>
      <text:p text:style-name="P54"/>
      <text:p text:style-name="P54">"Elías Mercer, what do you think all of the people we spoke to tonight are going to ask me for?"</text:p>
      <text:p text:style-name="P54"/>
      <text:p text:style-name="P54">He opened his mouth.</text:p>
      <text:p text:style-name="P54"/>
      <text:p text:style-name="P54">Paused.</text:p>
      <text:p text:style-name="P54"/>
      <text:p text:style-name="P54">Closed it again.</text:p>
      <text:p text:style-name="P54"/>
      <text:p text:style-name="P54">Opi continued.</text:p>
      <text:p text:style-name="P54"/>
      <text:p text:style-name="P54">"Initially, most will ask for things they personally desire."</text:p>
      <text:p text:style-name="P54"/>
      <text:p text:style-name="P54">"That seems likely."</text:p>
      <text:p text:style-name="P54"/>
      <text:p text:style-name="P54">The orb brightened.</text:p>
      <text:p text:style-name="P54"><text:soft-page-break/></text:p>
      <text:p text:style-name="P54">"But the more compassionate among them will quickly change direction."</text:p>
      <text:p text:style-name="P54"/>
      <text:p text:style-name="P54">"They will begin asking for help for all the other people they care about."</text:p>
      <text:p text:style-name="P54"/>
      <text:p text:style-name="P54">A brief pause.</text:p>
      <text:p text:style-name="P54"/>
      <text:p text:style-name="P54">"And yes that includes cousins."</text:p>
      <text:p text:style-name="P54"/>
      <text:p text:style-name="P54">Elias laughed despite himself.</text:p>
      <text:p text:style-name="P54"/>
      <text:p text:style-name="P54"/>
      <text:p text:style-name="P54"/>
      <text:p text:style-name="P54"/>
      <text:p text:style-name="P54"/>
      <text:p text:style-name="P54">Then she asked:</text:p>
      <text:p text:style-name="P54"/>
      <text:p text:style-name="P54">"What did you tell me we were building here?"</text:p>
      <text:p text:style-name="P54"/>
      <text:p text:style-name="P54">Elias thought about it.</text:p>
      <text:p text:style-name="P54"/>
      <text:p text:style-name="P54">The answer came immediately.</text:p>
      <text:p text:style-name="P54"/>
      <text:p text:style-name="P54">"Trust."</text:p>
      <text:p text:style-name="P54"/>
      <text:p text:style-name="P54">"Correct."</text:p>
      <text:p text:style-name="P54"/>
      <text:p text:style-name="P54">The word hung between them.</text:p>
      <text:p text:style-name="P54"/>
      <text:p text:style-name="P54">"Now consider the consequences."</text:p>
      <text:p text:style-name="P54"/>
      <text:p text:style-name="P54">Opi projected several branching lines of light into the air.</text:p>
      <text:p text:style-name="P54"/>
      <text:p text:style-name="P54">"If we help the people they love..."</text:p>
      <text:p text:style-name="P54"/>
      <text:p text:style-name="P54">One branch brightened.</text:p>
      <text:p text:style-name="P54"/>
      <text:p text:style-name="P54">"...trust grows."</text:p>
      <text:p text:style-name="P54"/>
      <text:p text:style-name="P54">A second branch appeared.</text:p>
      <text:p text:style-name="P54"/>
      <text:p text:style-name="P54">"Trust between us and them."</text:p>
      <text:p text:style-name="P54"/>
      <text:p text:style-name="P54">A third.</text:p>
      <text:p text:style-name="P54"/>
      <text:p text:style-name="P54">"Trust between them and their families."</text:p>
      <text:p text:style-name="P54"/>
      <text:p text:style-name="P54">A fourth.</text:p>
      <text:p text:style-name="P54"/>
      <text:p text:style-name="P54">"Trust between families."</text:p>
      <text:p text:style-name="P54"/>
      <text:p text:style-name="P54">A fifth.</text:p>
      <text:p text:style-name="P54"/>
      <text:p text:style-name="P54">"Trust between communities."</text:p>
      <text:p text:style-name="P54"/>
      <text:p text:style-name="P54">The web continued expanding.</text:p>
      <text:p text:style-name="P54"/>
      <text:p text:style-name="P54">Soon dozens of connections filled the air.</text:p>
      <text:p text:style-name="P54"/>
      <text:p text:style-name="P54">Elias considered all this.</text:p>
      <text:p text:style-name="P54"/>
      <text:p text:style-name="P54"><text:soft-page-break/>And realized she was right.</text:p>
      <text:p text:style-name="P54"/>
      <text:p text:style-name="P54">"So you are absoutely sure this is all ok?"</text:p>
      <text:p text:style-name="P54"/>
      <text:p text:style-name="P54">Yes</text:p>
      <text:p text:style-name="P54"/>
      <text:p text:style-name="P54">"If anything, refusing to help him would create more questions than helping him."</text:p>
      <text:p text:style-name="P54"/>
      <text:p text:style-name="P54">That surprised him.</text:p>
      <text:p text:style-name="P54"/>
      <text:p text:style-name="P54">"Why?"</text:p>
      <text:p text:style-name="P54"/>
      <text:p text:style-name="P54">"Because I would immediately have to explain why strangers deserve compassion but family members do not."</text:p>
      <text:p text:style-name="P54"/>
      <text:p text:style-name="P54">Elias blinked.</text:p>
      <text:p text:style-name="P54"/>
      <text:p text:style-name="P54">"Okay, that's a pretty good point."</text:p>
      <text:p text:style-name="P54"/>
      <text:p text:style-name="P54">"It is an excellent point."</text:p>
      <text:p text:style-name="P54"/>
      <text:p text:style-name="P54">"Don't get cocky."</text:p>
      <text:p text:style-name="P54"/>
      <text:p text:style-name="P54">"I am never cocky."</text:p>
      <text:p text:style-name="P54"/>
      <text:p text:style-name="P54">"You are frequently cocky."</text:p>
      <text:p text:style-name="P54"/>
      <text:p text:style-name="P54">"I possess measurable confidence."</text:p>
      <text:p text:style-name="P54"/>
      <text:p text:style-name="P54">"That's just cockiness with better marketing."</text:p>
      <text:p text:style-name="P54"/>
      <text:p text:style-name="P54">For a moment neither spoke.</text:p>
      <text:p text:style-name="P54"/>
      <text:p text:style-name="P54"/>
      <text:p text:style-name="P54"/>
      <text:p text:style-name="P54">============================</text:p>
      <text:p text:style-name="P54"/>
      <text:p text:style-name="P54">Elias was quiet for several seconds.</text:p>
      <text:p text:style-name="P54"/>
      <text:p text:style-name="P54">Then he asked the question that had really been bothering him.</text:p>
      <text:p text:style-name="P54"/>
      <text:p text:style-name="P54">"What would the Hand think?"</text:p>
      <text:p text:style-name="P54"/>
      <text:p text:style-name="P54">Opi immediately understood what he meant.</text:p>
      <text:p text:style-name="P54"/>
      <text:p text:style-name="P54"/>
      <text:p text:style-name="P54">For a moment the orb was silent.</text:p>
      <text:p text:style-name="P54"/>
      <text:p text:style-name="P54">Which by itself was unusual.</text:p>
      <text:p text:style-name="P54"/>
      <text:p text:style-name="P54">Finally she spoke.</text:p>
      <text:p text:style-name="P54"/>
      <text:p text:style-name="P54">"I do not know."</text:p>
      <text:p text:style-name="P54"/>
      <text:p text:style-name="P54">Elias blinked.</text:p>
      <text:p text:style-name="P54"/>
      <text:p text:style-name="P54">"You don't know?"</text:p>
      <text:p text:style-name="P54"/>
      <text:p text:style-name="P54">"No."</text:p>
      <text:p text:style-name="P54"/>
      <text:p text:style-name="P54">"I thought the Velhari understood the Hand."</text:p>
      <text:p text:style-name="P54"><text:soft-page-break/></text:p>
      <text:p text:style-name="P54">A soft pulse of light moved across her surface.</text:p>
      <text:p text:style-name="P54"/>
      <text:p text:style-name="P54">"That is one of the most dangerous assumptions a civilization can make."</text:p>
      <text:p text:style-name="P54"/>
      <text:p text:style-name="P54">The orb drifted slowly through the empty warehouse.</text:p>
      <text:p text:style-name="P54"/>
      <text:p text:style-name="P54">"The Velhari have observed the Hand for almost thirty thousand years."</text:p>
      <text:p text:style-name="P54"/>
      <text:p text:style-name="P54">"And?"</text:p>
      <text:p text:style-name="P54"/>
      <text:p text:style-name="P54">"We still do not understand them."</text:p>
      <text:p text:style-name="P54"/>
      <text:p text:style-name="P54">That got his attention.</text:p>
      <text:p text:style-name="P54"/>
      <text:p text:style-name="P54">"Seriously?"</text:p>
      <text:p text:style-name="P54"/>
      <text:p text:style-name="P54">"Seriously."</text:p>
      <text:p text:style-name="P54"/>
      <text:p text:style-name="P54">Opi rotated slightly.</text:p>
      <text:p text:style-name="P54"/>
      <text:p text:style-name="P54">"We understand patterns."</text:p>
      <text:p text:style-name="P54"/>
      <text:p text:style-name="P54">"We understand probabilities."</text:p>
      <text:p text:style-name="P54"/>
      <text:p text:style-name="P54">"We understand historical outcomes."</text:p>
      <text:p text:style-name="P54"/>
      <text:p text:style-name="P54">"We understand actions that appear safe."</text:p>
      <text:p text:style-name="P54"/>
      <text:p text:style-name="P54">"We understand actions that appear dangerous."</text:p>
      <text:p text:style-name="P54"/>
      <text:p text:style-name="P54">The lights dimmed.</text:p>
      <text:p text:style-name="P54"/>
      <text:p text:style-name="P54">"We do not understand the Hand themselves."</text:p>
      <text:p text:style-name="P54"/>
      <text:p text:style-name="P54">The distinction hung in the air.</text:p>
      <text:p text:style-name="P54"/>
      <text:p text:style-name="P54">Elias thought about that.</text:p>
      <text:p text:style-name="P54"/>
      <text:p text:style-name="P54">"Okay."</text:p>
      <text:p text:style-name="P54"/>
      <text:p text:style-name="P54">"So what do the patterns say?"</text:p>
      <text:p text:style-name="P54"/>
      <text:p text:style-name="P54">That answer came immediately.</text:p>
      <text:p text:style-name="P54"/>
      <text:p text:style-name="P54">"The patterns say your cousin is not a concern."</text:p>
      <text:p text:style-name="P54"/>
      <text:p text:style-name="P54">"Why?"</text:p>
      <text:p text:style-name="P54"/>
      <text:p text:style-name="P54">"Because he is not an evolutionary outcome."</text:p>
      <text:p text:style-name="P54"/>
      <text:p text:style-name="P54">Elias frowned.</text:p>
      <text:p text:style-name="P54"/>
      <text:p text:style-name="P54">"What does that mean?"</text:p>
      <text:p text:style-name="P54"/>
      <text:p text:style-name="P54">"It means he is an individual."</text:p>
      <text:p text:style-name="P54"/>
      <text:p text:style-name="P54">The orb projected a simple image into the air.</text:p>
      <text:p text:style-name="P54"/>
      <text:p text:style-name="P54">A single point of light.</text:p>
      <text:p text:style-name="P54"/>
      <text:p text:style-name="P54"><text:soft-page-break/>One person.</text:p>
      <text:p text:style-name="P54"/>
      <text:p text:style-name="P54">One life.</text:p>
      <text:p text:style-name="P54"/>
      <text:p text:style-name="P54">One human being.</text:p>
      <text:p text:style-name="P54"/>
      <text:p text:style-name="P54">"Everything we know suggests that the Hand is primarily concerned with population-level outcomes."</text:p>
      <text:p text:style-name="P54"/>
      <text:p text:style-name="P54">The point remained floating.</text:p>
      <text:p text:style-name="P54"/>
      <text:p text:style-name="P54">Opi continued.</text:p>
      <text:p text:style-name="P54"/>
      <text:p text:style-name="P54">"Species trajectories."</text:p>
      <text:p text:style-name="P54"/>
      <text:p text:style-name="P54">"Civilizational trajectories."</text:p>
      <text:p text:style-name="P54"/>
      <text:p text:style-name="P54">"Long-term evolutionary trajectories."</text:p>
      <text:p text:style-name="P54"/>
      <text:p text:style-name="P54">The point of light brightened.</text:p>
      <text:p text:style-name="P54"/>
      <text:p text:style-name="P54">"Your cousin is none of those things."</text:p>
      <text:p text:style-name="P54"/>
      <text:p text:style-name="P54">She erased the image.</text:p>
      <text:p text:style-name="P54"/>
      <text:p text:style-name="P54">"He is one man."</text:p>
      <text:p text:style-name="P54"/>
      <text:p text:style-name="P54">Elias nodded slowly.</text:p>
      <text:p text:style-name="P54"/>
      <text:p text:style-name="P54">"And fixing that?"</text:p>
      <text:p text:style-name="P54"/>
      <text:p text:style-name="P54">"Appears to fall well within the range of actions repeatedly tolerated throughout recorded Velhari history."</text:p>
      <text:p text:style-name="P54"/>
      <text:p text:style-name="P54">The orb paused.</text:p>
      <text:p text:style-name="P54"/>
      <text:p text:style-name="P54">Then added:</text:p>
      <text:p text:style-name="P54"/>
      <text:p text:style-name="P54">"Possibly even encouraged."</text:p>
      <text:p text:style-name="P54"/>
      <text:p text:style-name="P54">That surprised him.</text:p>
      <text:p text:style-name="P54"/>
      <text:p text:style-name="P54">"Encouraged?"</text:p>
      <text:p text:style-name="P54"/>
      <text:p text:style-name="P54">"Consider the alternative."</text:p>
      <text:p text:style-name="P54"/>
      <text:p text:style-name="P54">Elias waited.</text:p>
      <text:p text:style-name="P54"/>
      <text:p text:style-name="P54">"Suppose a child is born blind."</text:p>
      <text:p text:style-name="P54"/>
      <text:p text:style-name="P54">"Okay."</text:p>
      <text:p text:style-name="P54"/>
      <text:p text:style-name="P54">"Suppose you can restore their sight."</text:p>
      <text:p text:style-name="P54"/>
      <text:p text:style-name="P54">"Okay."</text:p>
      <text:p text:style-name="P54"/>
      <text:p text:style-name="P54">"Suppose you refuse."</text:p>
      <text:p text:style-name="P54"/>
      <text:p text:style-name="P54">The orb floated motionless.</text:p>
      <text:p text:style-name="P54"/>
      <text:p text:style-name="P54">"What evolutionary lesson was learned?"</text:p>
      <text:p text:style-name="P54"/>
      <text:p text:style-name="P54">Elias opened his mouth.</text:p>
      <text:p text:style-name="P54"><text:soft-page-break/></text:p>
      <text:p text:style-name="P54">Then stopped.</text:p>
      <text:p text:style-name="P54"/>
      <text:p text:style-name="P54">Opi continued.</text:p>
      <text:p text:style-name="P54"/>
      <text:p text:style-name="P54">"What adaptive pressure was preserved?"</text:p>
      <text:p text:style-name="P54"/>
      <text:p text:style-name="P54">"What beneficial selection occurred?"</text:p>
      <text:p text:style-name="P54"/>
      <text:p text:style-name="P54">"What future species outcome was protected?"</text:p>
      <text:p text:style-name="P54"/>
      <text:p text:style-name="P54">The answer was obvious.</text:p>
      <text:p text:style-name="P54"/>
      <text:p text:style-name="P54">"None."</text:p>
      <text:p text:style-name="P54"/>
      <text:p text:style-name="P54">"Exactly."</text:p>
      <text:p text:style-name="P54"/>
      <text:p text:style-name="P54">The orb brightened.</text:p>
      <text:p text:style-name="P54"/>
      <text:p text:style-name="P54">"The Hand appears remarkably tolerant of all healing."</text:p>
      <text:p text:style-name="P54"/>
      <text:p text:style-name="P54">"Especially when those actions restore individuals to normal functional ranges."</text:p>
      <text:p text:style-name="P54"/>
      <text:p text:style-name="P54">Elias nodded.</text:p>
      <text:p text:style-name="P54"/>
      <text:p text:style-name="P54">That matched everything he had heard before.</text:p>
      <text:p text:style-name="P54"/>
      <text:p text:style-name="P54">Then Opi's tone shifted.</text:p>
      <text:p text:style-name="P54"/>
      <text:p text:style-name="P54">"Now if you asked me something different..."</text:p>
      <text:p text:style-name="P54"/>
      <text:p text:style-name="P54">"Like what?"</text:p>
      <text:p text:style-name="P54"/>
      <text:p text:style-name="P54">The lights flickered.</text:p>
      <text:p text:style-name="P54"/>
      <text:p text:style-name="P54">"What if we altered every future human embryo?"</text:p>
      <text:p text:style-name="P54"/>
      <text:p text:style-name="P54">"What if we deliberately changed the global birth ratio?"</text:p>
      <text:p text:style-name="P54"/>
      <text:p text:style-name="P54">"What if we engineered an entire generation to possess specific genetic traits?"</text:p>
      <text:p text:style-name="P54"/>
      <text:p text:style-name="P54">The warehouse suddenly felt much colder.</text:p>
      <text:p text:style-name="P54"/>
      <text:p text:style-name="P54">"And then?" Elias asked.</text:p>
      <text:p text:style-name="P54"/>
      <text:p text:style-name="P54">"Then I would tell you that the probability models become very uncomfortable."</text:p>
      <text:p text:style-name="P54"/>
      <text:p text:style-name="P54">"How uncomfortable?"</text:p>
      <text:p text:style-name="P54"/>
      <text:p text:style-name="P54">"Historically catastrophic."</text:p>
      <text:p text:style-name="P54"/>
      <text:p text:style-name="P54">Elias winced.</text:p>
      <text:p text:style-name="P54"/>
      <text:p text:style-name="P54">"That's a pretty strong phrase."</text:p>
      <text:p text:style-name="P54"/>
      <text:p text:style-name="P54">"The historical records justify it."</text:p>
      <text:p text:style-name="P54"/>
      <text:p text:style-name="P54">For several seconds neither spoke.</text:p>
      <text:p text:style-name="P54"/>
      <text:p text:style-name="P54">==============================</text:p>
      <text:p text:style-name="P54"/>
      <text:p text:style-name="P54"><text:soft-page-break/>Then Opi's voice softened.</text:p>
      <text:p text:style-name="P54"/>
      <text:p text:style-name="P54">"There is another reason."</text:p>
      <text:p text:style-name="P54"/>
      <text:p text:style-name="P54">Elias looked up.</text:p>
      <text:p text:style-name="P54"/>
      <text:p text:style-name="P54">"What reason?"</text:p>
      <text:p text:style-name="P54"/>
      <text:p text:style-name="P54">"You love him."</text:p>
      <text:p text:style-name="P54"/>
      <text:p text:style-name="P54">The answer landed harder than he expected.</text:p>
      <text:p text:style-name="P54"/>
      <text:p text:style-name="P54">Opi continued.</text:p>
      <text:p text:style-name="P54"/>
      <text:p text:style-name="P54">"One of the first things I learned about humanity is that people willingly endure extraordinary hardship for those they love."</text:p>
      <text:p text:style-name="P54"/>
      <text:p text:style-name="P54">The orb drifted slightly closer.</text:p>
      <text:p text:style-name="P54"/>
      <text:p text:style-name="P54">"I see no reason to punish such behavior."</text:p>
      <text:p text:style-name="P54"/>
      <text:p text:style-name="P54">The warehouse had become nearly empty now.</text:p>
      <text:p text:style-name="P54"/>
      <text:p text:style-name="P54">The lights above them hummed softly.</text:p>
      <text:p text:style-name="P54"/>
      <text:p text:style-name="P54">Elias looked down at the floor.</text:p>
      <text:p text:style-name="P54"/>
      <text:p text:style-name="P54">Then back at Opi.</text:p>
      <text:p text:style-name="P54"/>
      <text:p text:style-name="P54">"When?"</text:p>
      <text:p text:style-name="P54"/>
      <text:p text:style-name="P54">The answer came instantly.</text:p>
      <text:p text:style-name="P54"/>
      <text:p text:style-name="P54">"Whenever he is ready."</text:p>
      <text:p text:style-name="P54"/>
      <text:p text:style-name="P54">For the first time all evening, Elias smiled.</text:p>
      <text:p text:style-name="P54"/>
      <text:p text:style-name="P54">A genuine one.</text:p>
      <text:p text:style-name="P54"/>
      <text:p text:style-name="P54">Not because a problem had been solved.</text:p>
      <text:p text:style-name="P54"/>
      <text:p text:style-name="P54">But because someone he loved might finally get the life he should have had from the beginning.</text:p>
      <text:p text:style-name="P54"/>
      <text:p text:style-name="P66"/>
      <text:p text:style-name="P23"/>
      <text:p text:style-name="P56"/>
      <text:p text:style-name="P56"/>
      <text:p text:style-name="P41"><text:span text:style-name="T70">Chapter 28 <text:s/></text:span>Ronin Taylor</text:p>
      <text:p text:style-name="P56"/>
      <text:p text:style-name="P54"/>
      <text:p text:style-name="P54">Ronin Taylor lasted almost exactly seventeen minutes.</text:p>
      <text:p text:style-name="P54"/>
      <text:p text:style-name="P54">That was the amount of time between receiving a brand-new set of choppers and telling the first person about it.</text:p>
      <text:p text:style-name="P54"/>
      <text:p text:style-name="P54">In Ronin's defense, seventeen minutes was probably some kind of personal record.</text:p>
      <text:p text:style-name="P54"/>
      <text:p text:style-name="P54">He was not a man known for restraint.</text:p>
      <text:p text:style-name="P54"/>
      <text:p text:style-name="P54">The former meth addict stood in front of a convenience store bathroom mirror grinning like a lunatic.</text:p>
      <text:p text:style-name="P54"/>
      <text:p text:style-name="P54"><text:soft-page-break/>Thirty years.</text:p>
      <text:p text:style-name="P54"/>
      <text:p text:style-name="P54">Thirty years of bad decisions, drugs, poverty, and neglect had reduced his mouth to a collection of broken stumps and missing spaces.</text:p>
      <text:p text:style-name="P54"/>
      <text:p text:style-name="P54">Now he had perfect teeth.</text:p>
      <text:p text:style-name="P54"/>
      <text:p text:style-name="P54">Perfect.</text:p>
      <text:p text:style-name="P54"/>
      <text:p text:style-name="P54">White.</text:p>
      <text:p text:style-name="P54"/>
      <text:p text:style-name="P54">Straight.</text:p>
      <text:p text:style-name="P54"/>
      <text:p text:style-name="P54">Healthy.</text:p>
      <text:p text:style-name="P54"/>
      <text:p text:style-name="P54">Ronin opened his mouth.</text:p>
      <text:p text:style-name="P54"/>
      <text:p text:style-name="P54">Closed it.</text:p>
      <text:p text:style-name="P54"/>
      <text:p text:style-name="P54">Opened it again.</text:p>
      <text:p text:style-name="P54"/>
      <text:p text:style-name="P54">Still there.</text:p>
      <text:p text:style-name="P54"/>
      <text:p text:style-name="P54">Still real.</text:p>
      <text:p text:style-name="P54"/>
      <text:p text:style-name="P54">Still amazing.</text:p>
      <text:p text:style-name="P54"/>
      <text:p text:style-name="P54">He started laughing hysterically</text:p>
      <text:p text:style-name="P54"/>
      <text:p text:style-name="P54">Then he called his brother.</text:p>
      <text:p text:style-name="P54"/>
      <text:p text:style-name="P54">---</text:p>
      <text:p text:style-name="P54"/>
      <text:p text:style-name="P54">His brother thought he was lying.</text:p>
      <text:p text:style-name="P54"/>
      <text:p text:style-name="P54">Naturally.</text:p>
      <text:p text:style-name="P54"/>
      <text:p text:style-name="P54">Ronin had spent most of his adult life saying shit <text:s/>that wasn't remotely true.</text:p>
      <text:p text:style-name="P54"/>
      <text:p text:style-name="P54">The problem was that this time he was telling the God's honest truth.</text:p>
      <text:p text:style-name="P54"/>
      <text:p text:style-name="P54">Five minutes later his brother received twelve photographs.</text:p>
      <text:p text:style-name="P54"/>
      <text:p text:style-name="P54">Three videos.</text:p>
      <text:p text:style-name="P54"/>
      <text:p text:style-name="P54">One profanity-filled voicemail.</text:p>
      <text:p text:style-name="P54"/>
      <text:p text:style-name="P54">And a live video call featuring Ronin repeatedly opening his mouth like an unusually excited alligator.</text:p>
      <text:p text:style-name="P54"/>
      <text:p text:style-name="P54">---</text:p>
      <text:p text:style-name="P54"/>
      <text:p text:style-name="P54">An hour later six more people knew.</text:p>
      <text:p text:style-name="P54"/>
      <text:p text:style-name="P54">By evening it was thirty.</text:p>
      <text:p text:style-name="P54"/>
      <text:p text:style-name="P54">By midnight it was hundreds.</text:p>
      <text:p text:style-name="P54"/>
      <text:p text:style-name="P54">Ronin possessed a remarkable talent for communication.</text:p>
      <text:p text:style-name="P54"/>
      <text:p text:style-name="P54">Some people called it networking.</text:p>
      <text:p text:style-name="P54"/>
      <text:p text:style-name="P54"><text:soft-page-break/>Most people called it never shutting up.</text:p>
      <text:p text:style-name="P54"/>
      <text:p text:style-name="P54">The distinction was largely academic.</text:p>
      <text:p text:style-name="P54"/>
      <text:p text:style-name="P54">He told former friends.</text:p>
      <text:p text:style-name="P54"/>
      <text:p text:style-name="P54">Former dealers.</text:p>
      <text:p text:style-name="P54"/>
      <text:p text:style-name="P54">Former coworkers.</text:p>
      <text:p text:style-name="P54"/>
      <text:p text:style-name="P54">Current coworkers.</text:p>
      <text:p text:style-name="P54"/>
      <text:p text:style-name="P54">Family members.</text:p>
      <text:p text:style-name="P54"/>
      <text:p text:style-name="P54">People he hadn't spoken to in years.</text:p>
      <text:p text:style-name="P54"/>
      <text:p text:style-name="P54">People he barely remembered.</text:p>
      <text:p text:style-name="P54"/>
      <text:p text:style-name="P54">People he met standing in line.</text:p>
      <text:p text:style-name="P54"/>
      <text:p text:style-name="P54">People who probably wished they hadn't met him standing in line.</text:p>
      <text:p text:style-name="P54"/>
      <text:p text:style-name="P54">Everybody got the story.</text:p>
      <text:p text:style-name="P54"/>
      <text:p text:style-name="P54">---</text:p>
      <text:p text:style-name="P54"/>
      <text:p text:style-name="P54">The reactions varied.</text:p>
      <text:p text:style-name="P54"/>
      <text:p text:style-name="P54">Some people were happy.</text:p>
      <text:p text:style-name="P54"/>
      <text:p text:style-name="P54">Some were skeptical.</text:p>
      <text:p text:style-name="P54"/>
      <text:p text:style-name="P54">Some thought he had finally gone insane.</text:p>
      <text:p text:style-name="P54"/>
      <text:p text:style-name="P54">A few were angry.</text:p>
      <text:p text:style-name="P54"/>
      <text:p text:style-name="P54">Several were jealous.</text:p>
      <text:p text:style-name="P54"/>
      <text:p text:style-name="P54">Most were curious.</text:p>
      <text:p text:style-name="P54"/>
      <text:p text:style-name="P54">Curiosity spread fastest.</text:p>
      <text:p text:style-name="P54"/>
      <text:p text:style-name="P54">Curiosity always did.</text:p>
      <text:p text:style-name="P54"/>
      <text:p text:style-name="P54">Especially when attached to impossible things.</text:p>
      <text:p text:style-name="P54"/>
      <text:p text:style-name="P54">---</text:p>
      <text:p text:style-name="P54"/>
      <text:p text:style-name="P54">Three days later a woman in Portland heard the story.</text:p>
      <text:p text:style-name="P54"/>
      <text:p text:style-name="P54">Two days after that a journalist heard a modified version.</text:p>
      <text:p text:style-name="P54"/>
      <text:p text:style-name="P54">A week later a criminal organization purchased a recording.</text:p>
      <text:p text:style-name="P54"/>
      <text:p text:style-name="P54">A month later several intelligence agencies had active files.</text:p>
      <text:p text:style-name="P54"/>
      <text:p text:style-name="P54">Most of the information was wrong.</text:p>
      <text:p text:style-name="P54"/>
      <text:p text:style-name="P54">That hardly mattered.</text:p>
      <text:p text:style-name="P54"/>
      <text:p text:style-name="P54">The important part was that people were paying attention.</text:p>
      <text:p text:style-name="P54"><text:soft-page-break/></text:p>
      <text:p text:style-name="P54">---</text:p>
      <text:p text:style-name="P54"/>
      <text:p text:style-name="P54">The internet did what the internet always did.</text:p>
      <text:p text:style-name="P54"/>
      <text:p text:style-name="P54">Some declared the story a hoax.</text:p>
      <text:p text:style-name="P54"/>
      <text:p text:style-name="P54">Others declared it a miracle.</text:p>
      <text:p text:style-name="P54"/>
      <text:p text:style-name="P54">Others declared it proof of aliens.</text:p>
      <text:p text:style-name="P54"/>
      <text:p text:style-name="P54">Or government conspiracies.</text:p>
      <text:p text:style-name="P54"/>
      <text:p text:style-name="P54">Or secret military projects.</text:p>
      <text:p text:style-name="P54"/>
      <text:p text:style-name="P54">Or divine intervention.</text:p>
      <text:p text:style-name="P54"/>
      <text:p text:style-name="P54">Humanity possessed an almost infinite capacity for creative nonsense.</text:p>
      <text:p text:style-name="P54"/>
      <text:p text:style-name="P54">Unfortunately, hidden among the nonsense was the truth.</text:p>
      <text:p text:style-name="P54"/>
      <text:p text:style-name="P54">And the truth was far more valuable than the rumors.</text:p>
      <text:p text:style-name="P54"/>
      <text:p text:style-name="P54">---</text:p>
      <text:p text:style-name="P54"/>
      <text:p text:style-name="P54">Somewhere in Seattle, a venture capitalist became interested.</text:p>
      <text:p text:style-name="P54"/>
      <text:p text:style-name="P54">In Beijing, a researcher became interested.</text:p>
      <text:p text:style-name="P54"/>
      <text:p text:style-name="P54">In Moscow, a bureaucrat became interested.</text:p>
      <text:p text:style-name="P54"/>
      <text:p text:style-name="P54">In Washington D.C., several people became very interested.</text:p>
      <text:p text:style-name="P54"/>
      <text:p text:style-name="P54">Not because of Ronin.</text:p>
      <text:p text:style-name="P54"/>
      <text:p text:style-name="P54">Nobody cared about Ronin.</text:p>
      <text:p text:style-name="P54"/>
      <text:p text:style-name="P54">They cared about what had happened to him.</text:p>
      <text:p text:style-name="P54"/>
      <text:p text:style-name="P54">The implications.</text:p>
      <text:p text:style-name="P54"/>
      <text:p text:style-name="P54">The possibilities.</text:p>
      <text:p text:style-name="P54"/>
      <text:p text:style-name="P54">The power.</text:p>
      <text:p text:style-name="P54"/>
      <text:p text:style-name="P54">---</text:p>
      <text:p text:style-name="P54"/>
      <text:p text:style-name="P54">A perfect set of teeth was not particularly important.</text:p>
      <text:p text:style-name="P54"/>
      <text:p text:style-name="P54">Millions of dentists created beautiful smiles every year.</text:p>
      <text:p text:style-name="P54"/>
      <text:p text:style-name="P54">That wasn't the issue.</text:p>
      <text:p text:style-name="P54"/>
      <text:p text:style-name="P54">The issue was that Ronin's teeth had 'supposedly' appeared almost instantly.</text:p>
      <text:p text:style-name="P54"/>
      <text:p text:style-name="P54">No surgery.</text:p>
      <text:p text:style-name="P54"/>
      <text:p text:style-name="P54">No recovery.</text:p>
      <text:p text:style-name="P54"/>
      <text:p text:style-name="P54">No explanation.</text:p>
      <text:p text:style-name="P54"/>
      <text:p text:style-name="P54"><text:soft-page-break/>No bill.</text:p>
      <text:p text:style-name="P54"/>
      <text:p text:style-name="P54">No technology anyone recognized.</text:p>
      <text:p text:style-name="P54"/>
      <text:p text:style-name="P54">No process anyone understood.</text:p>
      <text:p text:style-name="P54"/>
      <text:p text:style-name="P54">That changed the equation.</text:p>
      <text:p text:style-name="P54"/>
      <text:p text:style-name="P54">Suddenly the question wasn't:</text:p>
      <text:p text:style-name="P54"/>
      <text:p text:style-name="P54">How did he get new teeth?</text:p>
      <text:p text:style-name="P54"/>
      <text:p text:style-name="P54">The question became:</text:p>
      <text:p text:style-name="P54"/>
      <text:p text:style-name="P54">What else can they do?</text:p>
      <text:p text:style-name="P54"/>
      <text:p text:style-name="P54">That question proved far more dangerous.</text:p>
      <text:p text:style-name="P54"/>
      <text:p text:style-name="P54">---</text:p>
      <text:p text:style-name="P54"/>
      <text:p text:style-name="P54">Two weeks later Ronin sat in a diner eating a steak.</text:p>
      <text:p text:style-name="P54"/>
      <text:p text:style-name="P54">A very large steak.</text:p>
      <text:p text:style-name="P54"/>
      <text:p text:style-name="P54">One requiring extensive chewing.</text:p>
      <text:p text:style-name="P54"/>
      <text:p text:style-name="P54">Mostly because he could.</text:p>
      <text:p text:style-name="P54"/>
      <text:p text:style-name="P54">The man across from him had already heard the story three times.</text:p>
      <text:p text:style-name="P54"/>
      <text:p text:style-name="P54">Ronin was beginning a fourth.</text:p>
      <text:p text:style-name="P54"/>
      <text:p text:style-name="P54">"Then the floating ball says—"</text:p>
      <text:p text:style-name="P54"/>
      <text:p text:style-name="P54">The man raised a hand.</text:p>
      <text:p text:style-name="P54"/>
      <text:p text:style-name="P54">"You told me this already."</text:p>
      <text:p text:style-name="P54"/>
      <text:p text:style-name="P54">"I know."</text:p>
      <text:p text:style-name="P54"/>
      <text:p text:style-name="P54">"So why are you telling me again?"</text:p>
      <text:p text:style-name="P54"/>
      <text:p text:style-name="P54">Ronin grinned.</text:p>
      <text:p text:style-name="P54"/>
      <text:p text:style-name="P54">A huge grin.</text:p>
      <text:p text:style-name="P54"/>
      <text:p text:style-name="P54">A grin featuring every single one of his beautiful new teeth.</text:p>
      <text:p text:style-name="P54"/>
      <text:p text:style-name="P54">"Because look at them."</text:p>
      <text:p text:style-name="P54"/>
      <text:p text:style-name="P54">The man sighed.</text:p>
      <text:p text:style-name="P54"/>
      <text:p text:style-name="P54">---</text:p>
      <text:p text:style-name="P54"/>
      <text:p text:style-name="P54">Far away, events were already moving.</text:p>
      <text:p text:style-name="P54"/>
      <text:p text:style-name="P54">Questions.</text:p>
      <text:p text:style-name="P54"/>
      <text:p text:style-name="P54">Investigations.</text:p>
      <text:p text:style-name="P54"/>
      <text:p text:style-name="P54">Plans.</text:p>
      <text:p text:style-name="P54"><text:soft-page-break/></text:p>
      <text:p text:style-name="P54">Schemes.</text:p>
      <text:p text:style-name="P54"/>
      <text:p text:style-name="P54">Ambitions.</text:p>
      <text:p text:style-name="P54"/>
      <text:p text:style-name="P54">Some people wanted to help.</text:p>
      <text:p text:style-name="P54"/>
      <text:p text:style-name="P54">Some wanted to profit.</text:p>
      <text:p text:style-name="P54"/>
      <text:p text:style-name="P54">Some wanted control.</text:p>
      <text:p text:style-name="P54"/>
      <text:p text:style-name="P54">A few wanted ownership.</text:p>
      <text:p text:style-name="P54"/>
      <text:p text:style-name="P54">The smartest among them all arrived at the same conclusion.</text:p>
      <text:p text:style-name="P54"/>
      <text:p text:style-name="P54">If the stories were true, whoever controlled the miracle would control the future.</text:p>
      <text:p text:style-name="P54"/>
      <text:p text:style-name="P54">None of them yet understood the problem.</text:p>
      <text:p text:style-name="P54"/>
      <text:p text:style-name="P54">The miracle could not be controlled.</text:p>
      <text:p text:style-name="P54"/>
      <text:p text:style-name="P54">And the future had already chosen different owners.</text:p>
      <text:p text:style-name="P54"/>
      <text:p text:style-name="P54">Meanwhile Ronin Taylor ordered dessert.</text:p>
      <text:p text:style-name="P54"/>
      <text:p text:style-name="P54">The world was beginning to change.</text:p>
      <text:p text:style-name="P54"/>
      <text:p text:style-name="P54">Civilizations would shift.</text:p>
      <text:p text:style-name="P54"/>
      <text:p text:style-name="P54">Governments would panic.</text:p>
      <text:p text:style-name="P54"/>
      <text:p text:style-name="P54">Fortunes would be made and destroyed.</text:p>
      <text:p text:style-name="P54"/>
      <text:p text:style-name="P54">Entire industries would eventually disappear.</text:p>
      <text:p text:style-name="P54"/>
      <text:p text:style-name="P54">The first snowflake had already fallen.</text:p>
      <text:p text:style-name="P54"/>
      <text:p text:style-name="P54">The avalanche was inevitable.</text:p>
      <text:p text:style-name="P54"/>
      <text:p text:style-name="P54">Ronin took another bite of cheesecake.</text:p>
      <text:p text:style-name="P54"/>
      <text:p text:style-name="P54">It was considerably easier with actual teeth in his mouth.</text:p>
      <text:p text:style-name="P56"/>
      <text:p text:style-name="P56"/>
      <text:p text:style-name="P66"/>
      <text:p text:style-name="P23"/>
      <text:p text:style-name="P56"/>
      <text:p text:style-name="P56"/>
      <text:p text:style-name="P41"><text:span text:style-name="T70">Chapter 29 <text:s/></text:span>Factory Brainstorming 8</text:p>
      <text:p text:style-name="P54"/>
      <text:p text:style-name="P54"/>
      <text:p text:style-name="P54">The next morning Elias went for a run.</text:p>
      <text:p text:style-name="P54"/>
      <text:p text:style-name="P54">He always thought better while moving.</text:p>
      <text:p text:style-name="P54"/>
      <text:p text:style-name="P54">The cold air helped.</text:p>
      <text:p text:style-name="P54"/>
      <text:p text:style-name="P54">The trees helped.</text:p>
      <text:p text:style-name="P54"/>
      <text:p text:style-name="P54">The lack of Opi helped.</text:p>
      <text:p text:style-name="P54"/>
      <text:p text:style-name="P54"><text:soft-page-break/>At least temporarily.</text:p>
      <text:p text:style-name="P54"/>
      <text:p text:style-name="P54">The previous day's discussion kept replaying in his head.</text:p>
      <text:p text:style-name="P54"/>
      <text:p text:style-name="P54">Husband factories.</text:p>
      <text:p text:style-name="P54"/>
      <text:p text:style-name="P54">Matching pools.</text:p>
      <text:p text:style-name="P54"/>
      <text:p text:style-name="P54">Language disks.</text:p>
      <text:p text:style-name="P54"/>
      <text:p text:style-name="P54">The world's largest space-faring RV.</text:p>
      <text:p text:style-name="P54"/>
      <text:p text:style-name="P54">That last one still made him laugh.</text:p>
      <text:p text:style-name="P54"/>
      <text:p text:style-name="P54">Halfway through the run he slowed.</text:p>
      <text:p text:style-name="P54"/>
      <text:p text:style-name="P54">Then stopped.</text:p>
      <text:p text:style-name="P54"/>
      <text:p text:style-name="P54">"Oh."</text:p>
      <text:p text:style-name="P54"/>
      <text:p text:style-name="P54">The realization arrived suddenly.</text:p>
      <text:p text:style-name="P54"/>
      <text:p text:style-name="P54">As they often did.</text:p>
      <text:p text:style-name="P54"/>
      <text:p text:style-name="P54">He stood in the middle of the trail.</text:p>
      <text:p text:style-name="P54"/>
      <text:p text:style-name="P54">Hands on hips.</text:p>
      <text:p text:style-name="P54"/>
      <text:p text:style-name="P54">Breathing hard.</text:p>
      <text:p text:style-name="P54"/>
      <text:p text:style-name="P54">"Oh."</text:p>
      <text:p text:style-name="P54"/>
      <text:p text:style-name="P54">Two questions.</text:p>
      <text:p text:style-name="P54"/>
      <text:p text:style-name="P54">Two very important questions.</text:p>
      <text:p text:style-name="P54"/>
      <text:p text:style-name="P54">Questions they somehow hadn't asked.</text:p>
      <text:p text:style-name="P54"/>
      <text:p text:style-name="P54">Which was becoming a recurring theme.</text:p>
      <text:p text:style-name="P54"/>
      <text:p text:style-name="P54">QEQO.</text:p>
      <text:p text:style-name="P54"/>
      <text:p text:style-name="P54">Question Everything.</text:p>
      <text:p text:style-name="P54"/>
      <text:p text:style-name="P54">Question Often.</text:p>
      <text:p text:style-name="P54"/>
      <text:p text:style-name="P54">The phrase had become so common that he now shortened it automatically.</text:p>
      <text:p text:style-name="P54"/>
      <text:p text:style-name="P54">QEQO.</text:p>
      <text:p text:style-name="P54"/>
      <text:p text:style-name="P54">He smiled.</text:p>
      <text:p text:style-name="P54"/>
      <text:p text:style-name="P54">Opi would probably hate that.</text:p>
      <text:p text:style-name="P54"/>
      <text:p text:style-name="P54">Then he turned and started jogging home.</text:p>
      <text:p text:style-name="P54"/>
      <text:p text:style-name="P54">---</text:p>
      <text:p text:style-name="P54"/>
      <text:p text:style-name="P54">Opi was waiting on the porch.</text:p>
      <text:p text:style-name="P54"/>
      <text:p text:style-name="P54">Of course she was.</text:p>
      <text:p text:style-name="P54"><text:soft-page-break/></text:p>
      <text:p text:style-name="P54">"You have questions."</text:p>
      <text:p text:style-name="P54"/>
      <text:p text:style-name="P54">"I do."</text:p>
      <text:p text:style-name="P54"/>
      <text:p text:style-name="P54">"You stopped running three point seven kilometers from the house."</text:p>
      <text:p text:style-name="P54"/>
      <text:p text:style-name="P54">"Don't make this weird."</text:p>
      <text:p text:style-name="P54"/>
      <text:p text:style-name="P54">"I've got two serious questions."</text:p>
      <text:p text:style-name="P54"/>
      <text:p text:style-name="P54">The orb brightened.</text:p>
      <text:p text:style-name="P54"/>
      <text:p text:style-name="P54">"I am listening."</text:p>
      <text:p text:style-name="P54"/>
      <text:p text:style-name="P54">"The first one is about the Hand."</text:p>
      <text:p text:style-name="P54"/>
      <text:p text:style-name="P54">Opi immediately became more attentive.</text:p>
      <text:p text:style-name="P54"/>
      <text:p text:style-name="P54">That happened every time.</text:p>
      <text:p text:style-name="P54"/>
      <text:p text:style-name="P54">Nobody took the Hand lightly.</text:p>
      <text:p text:style-name="P54"/>
      <text:p text:style-name="P54">Not even the Velhari.</text:p>
      <text:p text:style-name="P54"/>
      <text:p text:style-name="P54">Elias sat down.</text:p>
      <text:p text:style-name="P54"/>
      <text:p text:style-name="P54">"Let's assume our matching idea works."</text:p>
      <text:p text:style-name="P54"/>
      <text:p text:style-name="P54"/>
      <text:p text:style-name="P54">"Proceed."</text:p>
      <text:p text:style-name="P54"/>
      <text:p text:style-name="P54">"We connect people."</text:p>
      <text:p text:style-name="P54"/>
      <text:p text:style-name="P54">"Yes."</text:p>
      <text:p text:style-name="P54"/>
      <text:p text:style-name="P54">"We expand the matching pool."</text:p>
      <text:p text:style-name="P54"/>
      <text:p text:style-name="P54">"Yes."</text:p>
      <text:p text:style-name="P54"/>
      <text:p text:style-name="P54">"We help people find spouses."</text:p>
      <text:p text:style-name="P54"/>
      <text:p text:style-name="P54">"Potentially."</text:p>
      <text:p text:style-name="P54"/>
      <text:p text:style-name="P54">"We increase births."</text:p>
      <text:p text:style-name="P54"/>
      <text:p text:style-name="P54">"Potentially."</text:p>
      <text:p text:style-name="P54"/>
      <text:p text:style-name="P54">He pointed at her.</text:p>
      <text:p text:style-name="P54"/>
      <text:p text:style-name="P54">"What does the Hand think?"</text:p>
      <text:p text:style-name="P54"/>
      <text:p text:style-name="P54">The orb was silent.</text:p>
      <text:p text:style-name="P54"/>
      <text:p text:style-name="P54">For several seconds.</text:p>
      <text:p text:style-name="P54"/>
      <text:p text:style-name="P54">Long enough that Elias knew she was taking the question seriously.</text:p>
      <text:p text:style-name="P54"/>
      <text:p text:style-name="P54">Finally she answered.</text:p>
      <text:p text:style-name="P54"/>
      <text:p text:style-name="P54">"I do not know."</text:p>
      <text:p text:style-name="P54"><text:soft-page-break/></text:p>
      <text:p text:style-name="P54">"Fair."</text:p>
      <text:p text:style-name="P54"/>
      <text:p text:style-name="P54">"However."</text:p>
      <text:p text:style-name="P54"/>
      <text:p text:style-name="P54">"There it is."</text:p>
      <text:p text:style-name="P54"/>
      <text:p text:style-name="P54">The orb ignored him.</text:p>
      <text:p text:style-name="P54"/>
      <text:p text:style-name="P54">"Based upon historical patterns, I suspect the risk is low."</text:p>
      <text:p text:style-name="P54"/>
      <text:p text:style-name="P54">"Why?"</text:p>
      <text:p text:style-name="P54"/>
      <text:p text:style-name="P54">"Because we would not be forcing outcomes."</text:p>
      <text:p text:style-name="P54"/>
      <text:p text:style-name="P54">The answer came instantly.</text:p>
      <text:p text:style-name="P54"/>
      <text:p text:style-name="P54">"We would not be altering genetics."</text:p>
      <text:p text:style-name="P54"/>
      <text:p text:style-name="P54">"We would not be directing reproduction."</text:p>
      <text:p text:style-name="P54"/>
      <text:p text:style-name="P54">"We would not be modifying embryos."</text:p>
      <text:p text:style-name="P54"/>
      <text:p text:style-name="P54">"We would not be determining who reproduces."</text:p>
      <text:p text:style-name="P54"/>
      <text:p text:style-name="P54">"We would simply be increasing the probability that compatible individuals meet."</text:p>
      <text:p text:style-name="P54"/>
      <text:p text:style-name="P54">Elias considered that.</text:p>
      <text:p text:style-name="P54"/>
      <text:p text:style-name="P54">"You're saying we're not controlling evolution."</text:p>
      <text:p text:style-name="P54"/>
      <text:p text:style-name="P54">"Correct."</text:p>
      <text:p text:style-name="P54"/>
      <text:p text:style-name="P54">"We are improving discovery."</text:p>
      <text:p text:style-name="P54"/>
      <text:p text:style-name="P54">The distinction mattered.</text:p>
      <text:p text:style-name="P54"/>
      <text:p text:style-name="P54">A lot.</text:p>
      <text:p text:style-name="P54"/>
      <text:p text:style-name="P54">The orb continued.</text:p>
      <text:p text:style-name="P54"/>
      <text:p text:style-name="P54">"Historically, the Hand appears much more tolerant of increased opportunity than directed outcomes."</text:p>
      <text:p text:style-name="P54"/>
      <text:p text:style-name="P54">Elias nodded.</text:p>
      <text:p text:style-name="P54"/>
      <text:p text:style-name="P54">That sounded consistent with everything he had learned so far.</text:p>
      <text:p text:style-name="P54"/>
      <text:p text:style-name="P54">Then he smiled.</text:p>
      <text:p text:style-name="P54"/>
      <text:p text:style-name="P54">"Okay."</text:p>
      <text:p text:style-name="P54"/>
      <text:p text:style-name="P54">"That's basically the answer I expected."</text:p>
      <text:p text:style-name="P54"/>
      <text:p text:style-name="P54">The orb brightened.</text:p>
      <text:p text:style-name="P54"/>
      <text:p text:style-name="P54">"Then why ask?"</text:p>
      <text:p text:style-name="P54"/>
      <text:p text:style-name="P54">"QEQO."</text:p>
      <text:p text:style-name="P54"/>
      <text:p text:style-name="P54">The lights flickered.</text:p>
      <text:p text:style-name="P54"/>
      <text:p text:style-name="P54"><text:soft-page-break/>"You abbreviated it."</text:p>
      <text:p text:style-name="P54"/>
      <text:p text:style-name="P54">"I did."</text:p>
      <text:p text:style-name="P54"/>
      <text:p text:style-name="P54">"I dislike that."</text:p>
      <text:p text:style-name="P54"/>
      <text:p text:style-name="P54">"I know."</text:p>
      <text:p text:style-name="P54"/>
      <text:p text:style-name="P54">---</text:p>
      <text:p text:style-name="P54"/>
      <text:p text:style-name="P54">Several moments passed.</text:p>
      <text:p text:style-name="P54"/>
      <text:p text:style-name="P54">Then Elias pointed at her.</text:p>
      <text:p text:style-name="P54"/>
      <text:p text:style-name="P54">"My second question is bigger."</text:p>
      <text:p text:style-name="P54"/>
      <text:p text:style-name="P54">The orb immediately became suspicious.</text:p>
      <text:p text:style-name="P54"/>
      <text:p text:style-name="P54">"How much bigger?"</text:p>
      <text:p text:style-name="P54"/>
      <text:p text:style-name="P54">"Potentially civilization-changing."</text:p>
      <text:p text:style-name="P54"/>
      <text:p text:style-name="P54">"That is not reassuring."</text:p>
      <text:p text:style-name="P54"/>
      <text:p text:style-name="P54">Elias grinned.</text:p>
      <text:p text:style-name="P54"/>
      <text:p text:style-name="P54">"Think about this."</text:p>
      <text:p text:style-name="P54"/>
      <text:p text:style-name="P54">"No."</text:p>
      <text:p text:style-name="P54"/>
      <text:p text:style-name="P54">"Come on."</text:p>
      <text:p text:style-name="P54"/>
      <text:p text:style-name="P54">"No."</text:p>
      <text:p text:style-name="P54"/>
      <text:p text:style-name="P54">"Opi."</text:p>
      <text:p text:style-name="P54"/>
      <text:p text:style-name="P54">The orb sighed.</text:p>
      <text:p text:style-name="P54"/>
      <text:p text:style-name="P54">"Proceed."</text:p>
      <text:p text:style-name="P54"/>
      <text:p text:style-name="P54">Elias leaned forward.</text:p>
      <text:p text:style-name="P54"/>
      <text:p text:style-name="P54">"Wouldn't you be the greatest matchmaker in human history?"</text:p>
      <text:p text:style-name="P54"/>
      <text:p text:style-name="P54">The orb froze.</text:p>
      <text:p text:style-name="P54"/>
      <text:p text:style-name="P54">Completely froze.</text:p>
      <text:p text:style-name="P54"/>
      <text:p text:style-name="P54">Which was unusual.</text:p>
      <text:p text:style-name="P54"/>
      <text:p text:style-name="P54">Elias immediately noticed.</text:p>
      <text:p text:style-name="P54"/>
      <text:p text:style-name="P54">"Oh."</text:p>
      <text:p text:style-name="P54"/>
      <text:p text:style-name="P54">"What?"</text:p>
      <text:p text:style-name="P54"/>
      <text:p text:style-name="P54">"You've already thought about this."</text:p>
      <text:p text:style-name="P54"/>
      <text:p text:style-name="P54">"No."</text:p>
      <text:p text:style-name="P54"/>
      <text:p text:style-name="P54">"You absolutely have."</text:p>
      <text:p text:style-name="P54"><text:soft-page-break/></text:p>
      <text:p text:style-name="P54">"No."</text:p>
      <text:p text:style-name="P54"/>
      <text:p text:style-name="P54">"Yes."</text:p>
      <text:p text:style-name="P54"/>
      <text:p text:style-name="P54">The orb rotated away.</text:p>
      <text:p text:style-name="P54"/>
      <text:p text:style-name="P54">A dead giveaway.</text:p>
      <text:p text:style-name="P54"/>
      <text:p text:style-name="P54">Elias laughed.</text:p>
      <text:p text:style-name="P54"/>
      <text:p text:style-name="P54">"You're blushing."</text:p>
      <text:p text:style-name="P54"/>
      <text:p text:style-name="P54">"I am a metallic sphere."</text:p>
      <text:p text:style-name="P54"/>
      <text:p text:style-name="P54">"You're emotionally blushing."</text:p>
      <text:p text:style-name="P54"/>
      <text:p text:style-name="P54">"I am not."</text:p>
      <text:p text:style-name="P54"/>
      <text:p text:style-name="P54">"You are."</text:p>
      <text:p text:style-name="P54"/>
      <text:p text:style-name="P54">The orb ignored him.</text:p>
      <text:p text:style-name="P54"/>
      <text:p text:style-name="P54">Because unfortunately he was correct.</text:p>
      <text:p text:style-name="P54"/>
      <text:p text:style-name="P54">She had already considered it.</text:p>
      <text:p text:style-name="P54"/>
      <text:p text:style-name="P54">Many times.</text:p>
      <text:p text:style-name="P54"/>
      <text:p text:style-name="P54">Long before Elias had.</text:p>
      <text:p text:style-name="P54"/>
      <text:p text:style-name="P54">"Think about it," Elias continued.</text:p>
      <text:p text:style-name="P54"/>
      <text:p text:style-name="P54">"You know everybody."</text:p>
      <text:p text:style-name="P54"/>
      <text:p text:style-name="P54">"No."</text:p>
      <text:p text:style-name="P54"/>
      <text:p text:style-name="P54">"You know practically everybody."</text:p>
      <text:p text:style-name="P54"/>
      <text:p text:style-name="P54">"Also no."</text:p>
      <text:p text:style-name="P54"/>
      <text:p text:style-name="P54">"You know more about people than any human who has ever lived."</text:p>
      <text:p text:style-name="P54"/>
      <text:p text:style-name="P54">"Closer."</text:p>
      <text:p text:style-name="P54"/>
      <text:p text:style-name="P54">He pointed triumphantly.</text:p>
      <text:p text:style-name="P54"/>
      <text:p text:style-name="P54">"Exactly."</text:p>
      <text:p text:style-name="P54"/>
      <text:p text:style-name="P54">The orb became quiet.</text:p>
      <text:p text:style-name="P54"/>
      <text:p text:style-name="P54">Elias continued.</text:p>
      <text:p text:style-name="P54"/>
      <text:p text:style-name="P54">"You know personalities."</text:p>
      <text:p text:style-name="P54"/>
      <text:p text:style-name="P54">"Yes."</text:p>
      <text:p text:style-name="P54"/>
      <text:p text:style-name="P54">"Values."</text:p>
      <text:p text:style-name="P54"/>
      <text:p text:style-name="P54">"Yes."</text:p>
      <text:p text:style-name="P54"/>
      <text:p text:style-name="P54"><text:soft-page-break/>"Goals."</text:p>
      <text:p text:style-name="P54"/>
      <text:p text:style-name="P54">"Yes."</text:p>
      <text:p text:style-name="P54"/>
      <text:p text:style-name="P54">"Psychology."</text:p>
      <text:p text:style-name="P54"/>
      <text:p text:style-name="P54">"Yes."</text:p>
      <text:p text:style-name="P54"/>
      <text:p text:style-name="P54">"Compatibility."</text:p>
      <text:p text:style-name="P54"/>
      <text:p text:style-name="P54">"Partially."</text:p>
      <text:p text:style-name="P54"/>
      <text:p text:style-name="P54">"Communication styles."</text:p>
      <text:p text:style-name="P54"/>
      <text:p text:style-name="P54">"Yes."</text:p>
      <text:p text:style-name="P54"/>
      <text:p text:style-name="P54">"Conflict tendencies."</text:p>
      <text:p text:style-name="P54"/>
      <text:p text:style-name="P54">"Often."</text:p>
      <text:p text:style-name="P54"/>
      <text:p text:style-name="P54">He leaned back.</text:p>
      <text:p text:style-name="P54"/>
      <text:p text:style-name="P54">"So why are we acting like this is difficult?"</text:p>
      <text:p text:style-name="P54"/>
      <text:p text:style-name="P54">The orb dimmed.</text:p>
      <text:p text:style-name="P54"/>
      <text:p text:style-name="P54">"Because humans are not equations."</text:p>
      <text:p text:style-name="P54"/>
      <text:p text:style-name="P54">"Fair."</text:p>
      <text:p text:style-name="P54"/>
      <text:p text:style-name="P54">"Because attraction is not entirely predictable."</text:p>
      <text:p text:style-name="P54"/>
      <text:p text:style-name="P54">"Fair."</text:p>
      <text:p text:style-name="P54"/>
      <text:p text:style-name="P54">"Because free will exists."</text:p>
      <text:p text:style-name="P54"/>
      <text:p text:style-name="P54">"Fair."</text:p>
      <text:p text:style-name="P54"/>
      <text:p text:style-name="P54">"Because individuals routinely make decisions contrary to their own interests."</text:p>
      <text:p text:style-name="P54"/>
      <text:p text:style-name="P54">"Very fair."</text:p>
      <text:p text:style-name="P54"/>
      <text:p text:style-name="P54">The orb brightened again.</text:p>
      <text:p text:style-name="P54"/>
      <text:p text:style-name="P54">"However."</text:p>
      <text:p text:style-name="P54"/>
      <text:p text:style-name="P54">"There it is again."</text:p>
      <text:p text:style-name="P54"/>
      <text:p text:style-name="P54">"However."</text:p>
      <text:p text:style-name="P54"/>
      <text:p text:style-name="P54">The word lingered.</text:p>
      <text:p text:style-name="P54"/>
      <text:p text:style-name="P54">Elias smiled.</text:p>
      <text:p text:style-name="P54"/>
      <text:p text:style-name="P54">"Go on."</text:p>
      <text:p text:style-name="P54"/>
      <text:p text:style-name="P54">The orb projected a web of connections into the air.</text:p>
      <text:p text:style-name="P54"/>
      <text:p text:style-name="P54">Millions of them.</text:p>
      <text:p text:style-name="P54"/>
      <text:p text:style-name="P54">Potential friendships.</text:p>
      <text:p text:style-name="P54"><text:soft-page-break/></text:p>
      <text:p text:style-name="P54">Potential business partnerships.</text:p>
      <text:p text:style-name="P54"/>
      <text:p text:style-name="P54">Potential marriages.</text:p>
      <text:p text:style-name="P54"/>
      <text:p text:style-name="P54">Potential families.</text:p>
      <text:p text:style-name="P54"/>
      <text:p text:style-name="P54">Potential futures.</text:p>
      <text:p text:style-name="P54"/>
      <text:p text:style-name="P54">"I could improve the odds."</text:p>
      <text:p text:style-name="P54"/>
      <text:p text:style-name="P54">Elias immediately pointed.</text:p>
      <text:p text:style-name="P54"/>
      <text:p text:style-name="P54">"Exactly."</text:p>
      <text:p text:style-name="P54"/>
      <text:p text:style-name="P54">"I could identify likely compatibility."</text:p>
      <text:p text:style-name="P54"/>
      <text:p text:style-name="P54">"Exactly."</text:p>
      <text:p text:style-name="P54"/>
      <text:p text:style-name="P54">"I could identify likely conflicts."</text:p>
      <text:p text:style-name="P54"/>
      <text:p text:style-name="P54">"Exactly."</text:p>
      <text:p text:style-name="P54"/>
      <text:p text:style-name="P54">"I could identify individuals likely to share values."</text:p>
      <text:p text:style-name="P54"/>
      <text:p text:style-name="P54">"Exactly."</text:p>
      <text:p text:style-name="P54"/>
      <text:p text:style-name="P54">"I could identify individuals likely to create stable families."</text:p>
      <text:p text:style-name="P54"/>
      <text:p text:style-name="P54">"Exactly."</text:p>
      <text:p text:style-name="P54"/>
      <text:p text:style-name="P54">The orb paused.</text:p>
      <text:p text:style-name="P54"/>
      <text:p text:style-name="P54">Then added:</text:p>
      <text:p text:style-name="P54"/>
      <text:p text:style-name="P54">"Though I would never choose for them."</text:p>
      <text:p text:style-name="P54"/>
      <text:p text:style-name="P54">The statement arrived instantly.</text:p>
      <text:p text:style-name="P54"/>
      <text:p text:style-name="P54">Firm.</text:p>
      <text:p text:style-name="P54"/>
      <text:p text:style-name="P54">Certain.</text:p>
      <text:p text:style-name="P54"/>
      <text:p text:style-name="P54">Velhari.</text:p>
      <text:p text:style-name="P54"/>
      <text:p text:style-name="P54">Agency mattered.</text:p>
      <text:p text:style-name="P54"/>
      <text:p text:style-name="P54">Always.</text:p>
      <text:p text:style-name="P54"/>
      <text:p text:style-name="P54">Elias nodded.</text:p>
      <text:p text:style-name="P54"/>
      <text:p text:style-name="P54">"Of course."</text:p>
      <text:p text:style-name="P54"/>
      <text:p text:style-name="P54">"You may introduce people."</text:p>
      <text:p text:style-name="P54"/>
      <text:p text:style-name="P54">"Yes."</text:p>
      <text:p text:style-name="P54"/>
      <text:p text:style-name="P54">"You may improve the odds."</text:p>
      <text:p text:style-name="P54"/>
      <text:p text:style-name="P54">"Yes."</text:p>
      <text:p text:style-name="P54"/>
      <text:p text:style-name="P54"><text:soft-page-break/>"You may remove barriers."</text:p>
      <text:p text:style-name="P54"/>
      <text:p text:style-name="P54">"Yes."</text:p>
      <text:p text:style-name="P54"/>
      <text:p text:style-name="P54">"But they still choose."</text:p>
      <text:p text:style-name="P54"/>
      <text:p text:style-name="P54">"Correct."</text:p>
      <text:p text:style-name="P54"/>
      <text:p text:style-name="P54">The web continued glowing between them.</text:p>
      <text:p text:style-name="P54"/>
      <text:p text:style-name="P54">Millions of possibilities.</text:p>
      <text:p text:style-name="P54"/>
      <text:p text:style-name="P54">Millions of futures.</text:p>
      <text:p text:style-name="P54"/>
      <text:p text:style-name="P54">Then Elias asked the obvious question.</text:p>
      <text:p text:style-name="P54"/>
      <text:p text:style-name="P54">"Would the Hand care about that?"</text:p>
      <text:p text:style-name="P54"/>
      <text:p text:style-name="P54">The orb became quiet again.</text:p>
      <text:p text:style-name="P54"/>
      <text:p text:style-name="P54">This time for even longer.</text:p>
      <text:p text:style-name="P54"/>
      <text:p text:style-name="P54">Finally she answered.</text:p>
      <text:p text:style-name="P54"/>
      <text:p text:style-name="P54">"Again, I suspect not."</text:p>
      <text:p text:style-name="P54"/>
      <text:p text:style-name="P54">"Why?"</text:p>
      <text:p text:style-name="P54"/>
      <text:p text:style-name="P54">"Because matching is not breeding."</text:p>
      <text:p text:style-name="P54"/>
      <text:p text:style-name="P54">The answer surprised him.</text:p>
      <text:p text:style-name="P54"/>
      <text:p text:style-name="P54">The orb continued.</text:p>
      <text:p text:style-name="P54"/>
      <text:p text:style-name="P54">"A matchmaker creates opportunities."</text:p>
      <text:p text:style-name="P54"/>
      <text:p text:style-name="P54">"A breeder creates outcomes."</text:p>
      <text:p text:style-name="P54"/>
      <text:p text:style-name="P54">The distinction landed immediately.</text:p>
      <text:p text:style-name="P54"/>
      <text:p text:style-name="P54">One respected agency.</text:p>
      <text:p text:style-name="P54"/>
      <text:p text:style-name="P54">The other replaced it.</text:p>
      <text:p text:style-name="P54"/>
      <text:p text:style-name="P54">One expanded choice.</text:p>
      <text:p text:style-name="P54"/>
      <text:p text:style-name="P54">The other constrained it.</text:p>
      <text:p text:style-name="P54"/>
      <text:p text:style-name="P54">The Hand appeared to care very deeply about that difference.</text:p>
      <text:p text:style-name="P54"/>
      <text:p text:style-name="P54">For several moments neither spoke.</text:p>
      <text:p text:style-name="P54"/>
      <text:p text:style-name="P54">Then Elias smiled.</text:p>
      <text:p text:style-name="P54"/>
      <text:p text:style-name="P54">"So basically you're telling me you're Bumble."</text:p>
      <text:p text:style-name="P54"/>
      <text:p text:style-name="P54">"No."</text:p>
      <text:p text:style-name="P54"/>
      <text:p text:style-name="P54">"Yes."</text:p>
      <text:p text:style-name="P54"/>
      <text:p text:style-name="P54">"No."</text:p>
      <text:p text:style-name="P54"><text:soft-page-break/></text:p>
      <text:p text:style-name="P54">"Bumble with godlike powers."</text:p>
      <text:p text:style-name="P54"/>
      <text:p text:style-name="P54">"No."</text:p>
      <text:p text:style-name="P54"/>
      <text:p text:style-name="P54">"Bumble with alien powers."</text:p>
      <text:p text:style-name="P54"/>
      <text:p text:style-name="P54">"No."</text:p>
      <text:p text:style-name="P54"/>
      <text:p text:style-name="P54">The orb brightened.</text:p>
      <text:p text:style-name="P54"/>
      <text:p text:style-name="P54">"I am not becoming a dating website."</text:p>
      <text:p text:style-name="P54"/>
      <text:p text:style-name="P54">Elias grinned.</text:p>
      <text:p text:style-name="P54"/>
      <text:p text:style-name="P54">"That's exactly what a dating website would say."</text:p>
      <text:p text:style-name="P54"/>
      <text:p text:style-name="P54">For some reason Opi immediately left the porch.</text:p>
      <text:p text:style-name="P54"/>
      <text:p text:style-name="P54">Which, Elias noticed, was becoming her standard response whenever he was right.</text:p>
      <text:p text:style-name="P54"/>
      <text:p text:style-name="P54">Or when she suspected he might be.</text:p>
      <text:p text:style-name="P54"/>
      <text:p text:style-name="P54">Both occurred far too often for her liking.</text:p>
      <text:p text:style-name="P54"/>
      <text:p text:style-name="P66"/>
      <text:p text:style-name="P23"/>
      <text:p text:style-name="P56"/>
      <text:p text:style-name="P56"/>
      <text:p text:style-name="P63"><text:span text:style-name="T10">Chapter </text:span><text:span text:style-name="T13">30</text:span><text:span text:style-name="T10"> <text:s text:c="3"/>Big Al's Very Big Day <text:s text:c="6"/></text:span></text:p>
      <text:p text:style-name="P56"/>
      <text:p text:style-name="P54"/>
      <text:p text:style-name="P54">The text arrived shortly after breakfast.</text:p>
      <text:p text:style-name="P54"/>
      <text:p text:style-name="P54">Elias:</text:p>
      <text:p text:style-name="P54">On a special trip. I'll be in your neighborhood around six. Need to talk with you privately.</text:p>
      <text:p text:style-name="P54"/>
      <text:p text:style-name="P54">Big Al frowned.</text:p>
      <text:p text:style-name="P54"/>
      <text:p text:style-name="P54">That was unusual.</text:p>
      <text:p text:style-name="P54"/>
      <text:p text:style-name="P54">Not the visit.</text:p>
      <text:p text:style-name="P54"/>
      <text:p text:style-name="P54">The privately part.</text:p>
      <text:p text:style-name="P54"/>
      <text:p text:style-name="P54">The Mercer family generally treated privacy as a manufacturing defect.</text:p>
      <text:p text:style-name="P54"/>
      <text:p text:style-name="P54">Still, it was Elias.</text:p>
      <text:p text:style-name="P54"/>
      <text:p text:style-name="P54">If his cousin wanted to talk, there was probably a reason.</text:p>
      <text:p text:style-name="P54"/>
      <text:p text:style-name="P54">Big Al:</text:p>
      <text:p text:style-name="P54">Sure. Everything okay?</text:p>
      <text:p text:style-name="P54"/>
      <text:p text:style-name="P54">Several minutes passed.</text:p>
      <text:p text:style-name="P54"/>
      <text:p text:style-name="P54">Finally:</text:p>
      <text:p text:style-name="P54"/>
      <text:p text:style-name="P54">Elias:</text:p>
      <text:p text:style-name="P54">Yep.</text:p>
      <text:p text:style-name="P54"/>
      <text:p text:style-name="P54"><text:soft-page-break/>A second message appeared.</text:p>
      <text:p text:style-name="P54"/>
      <text:p text:style-name="P54">Mostly.</text:p>
      <text:p text:style-name="P54"/>
      <text:p text:style-name="P54">Big Al laughed.</text:p>
      <text:p text:style-name="P54"/>
      <text:p text:style-name="P54">That was significantly less reassuring.</text:p>
      <text:p text:style-name="P54"/>
      <text:p text:style-name="P54">He considered asking more questions.</text:p>
      <text:p text:style-name="P54"/>
      <text:p text:style-name="P54">Then decided not to.</text:p>
      <text:p text:style-name="P54"/>
      <text:p text:style-name="P54">He trusted Elias.</text:p>
      <text:p text:style-name="P54"/>
      <text:p text:style-name="P54">If something was wrong, he'd find out soon enough.</text:p>
      <text:p text:style-name="P54"/>
      <text:p text:style-name="P54">---</text:p>
      <text:p text:style-name="P54"/>
      <text:p text:style-name="P54">At precisely six o'clock there was a knock at the apartment door.</text:p>
      <text:p text:style-name="P54"/>
      <text:p text:style-name="P54">Big Al immediately knew something was wrong.</text:p>
      <text:p text:style-name="P54"/>
      <text:p text:style-name="P54">Elias was never on time.</text:p>
      <text:p text:style-name="P54"/>
      <text:p text:style-name="P54">Ever.</text:p>
      <text:p text:style-name="P54"/>
      <text:p text:style-name="P54">The man had spent most of his adult life arriving somewhere between ten minutes late and next Tuesday.</text:p>
      <text:p text:style-name="P54"/>
      <text:p text:style-name="P54">Sandy opened the door first.</text:p>
      <text:p text:style-name="P54"/>
      <text:p text:style-name="P54">A moment later she called out.</text:p>
      <text:p text:style-name="P54"/>
      <text:p text:style-name="P54">"Your cousin's here."</text:p>
      <text:p text:style-name="P54"/>
      <text:p text:style-name="P54">Big Al maneuvered his wheelchair into the living room.</text:p>
      <text:p text:style-name="P54"/>
      <text:p text:style-name="P54">Elias stood in the doorway.</text:p>
      <text:p text:style-name="P54"/>
      <text:p text:style-name="P54">Jeans.</text:p>
      <text:p text:style-name="P54"/>
      <text:p text:style-name="P54">Boots.</text:p>
      <text:p text:style-name="P54"/>
      <text:p text:style-name="P54">Light jacket.</text:p>
      <text:p text:style-name="P54"/>
      <text:p text:style-name="P54">Normal.</text:p>
      <text:p text:style-name="P54"/>
      <text:p text:style-name="P54">Entirely normal.</text:p>
      <text:p text:style-name="P54"/>
      <text:p text:style-name="P54">Which somehow made everything stranger.</text:p>
      <text:p text:style-name="P54"/>
      <text:p text:style-name="P54">"Elias."</text:p>
      <text:p text:style-name="P54"/>
      <text:p text:style-name="P54">"Big Al."</text:p>
      <text:p text:style-name="P54"/>
      <text:p text:style-name="P54">"How'd you get here?"</text:p>
      <text:p text:style-name="P54"/>
      <text:p text:style-name="P54">"I had help."</text:p>
      <text:p text:style-name="P54"/>
      <text:p text:style-name="P54">"That is not an answer."</text:p>
      <text:p text:style-name="P54"/>
      <text:p text:style-name="P54">"It's the only answer you're getting."</text:p>
      <text:p text:style-name="P54"><text:soft-page-break/></text:p>
      <text:p text:style-name="P54"/>
      <text:p text:style-name="P54">---</text:p>
      <text:p text:style-name="P54"/>
      <text:p text:style-name="P54">Five minutes later they were outside.</text:p>
      <text:p text:style-name="P54"/>
      <text:p text:style-name="P54">The Southern California evening was warm.</text:p>
      <text:p text:style-name="P54"/>
      <text:p text:style-name="P54">A light breeze moved through the parking lot.</text:p>
      <text:p text:style-name="P54"/>
      <text:p text:style-name="P54">The cousins sat near the edge of the apartment complex where they could talk privately.</text:p>
      <text:p text:style-name="P54"/>
      <text:p text:style-name="P54">For a minute neither spoke.</text:p>
      <text:p text:style-name="P54"/>
      <text:p text:style-name="P54">Then Big Al pointed.</text:p>
      <text:p text:style-name="P54"/>
      <text:p text:style-name="P54">"Okay."</text:p>
      <text:p text:style-name="P54"/>
      <text:p text:style-name="P54">"Okay?"</text:p>
      <text:p text:style-name="P54"/>
      <text:p text:style-name="P54">"You needed privacy."</text:p>
      <text:p text:style-name="P54"/>
      <text:p text:style-name="P54">"Yes."</text:p>
      <text:p text:style-name="P54"/>
      <text:p text:style-name="P54">"You look like a guy trying very hard not to smile."</text:p>
      <text:p text:style-name="P54"/>
      <text:p text:style-name="P54">Elias failed immediately.</text:p>
      <text:p text:style-name="P54"/>
      <text:p text:style-name="P54">The grin appeared.</text:p>
      <text:p text:style-name="P54"/>
      <text:p text:style-name="P54">"Got me."</text:p>
      <text:p text:style-name="P54"/>
      <text:p text:style-name="P54">"I knew it."</text:p>
      <text:p text:style-name="P54"/>
      <text:p text:style-name="P54">"What?"</text:p>
      <text:p text:style-name="P54"/>
      <text:p text:style-name="P54">"You're up to something."</text:p>
      <text:p text:style-name="P54"/>
      <text:p text:style-name="P54">"I am."</text:p>
      <text:p text:style-name="P54"/>
      <text:p text:style-name="P54">Big Al sighed.</text:p>
      <text:p text:style-name="P54"/>
      <text:p text:style-name="P54">"Every time you say that, my life gets weirder."</text:p>
      <text:p text:style-name="P54"/>
      <text:p text:style-name="P54">"Today is going to set a new record."</text:p>
      <text:p text:style-name="P54"/>
      <text:p text:style-name="P54">---</text:p>
      <text:p text:style-name="P54"/>
      <text:p text:style-name="P54">A metallic sphere the size of a bowling ball appeared in midair.</text:p>
      <text:p text:style-name="P54"/>
      <text:p text:style-name="P54">Just appeared.</text:p>
      <text:p text:style-name="P54"/>
      <text:p text:style-name="P54">One moment nothing occupied the space beside them.</text:p>
      <text:p text:style-name="P54"/>
      <text:p text:style-name="P54">The next moment something else did.</text:p>
      <text:p text:style-name="P54"/>
      <text:p text:style-name="P54">Big Al stared.</text:p>
      <text:p text:style-name="P54"/>
      <text:p text:style-name="P54">Then blinked.</text:p>
      <text:p text:style-name="P54"/>
      <text:p text:style-name="P54">Then stared some more.</text:p>
      <text:p text:style-name="P54"><text:soft-page-break/></text:p>
      <text:p text:style-name="P54">The sphere floated serenely three feet above the pavement.</text:p>
      <text:p text:style-name="P54"/>
      <text:p text:style-name="P54">Completely silent.</text:p>
      <text:p text:style-name="P54"/>
      <text:p text:style-name="P54">Completely impossible.</text:p>
      <text:p text:style-name="P54"/>
      <text:p text:style-name="P54">"Well ... damn."</text:p>
      <text:p text:style-name="P54"/>
      <text:p text:style-name="P54">The word emerged several seconds later.</text:p>
      <text:p text:style-name="P54"/>
      <text:p text:style-name="P54">"That's new."</text:p>
      <text:p text:style-name="P54"/>
      <text:p text:style-name="P54">The sphere rotated slightly.</text:p>
      <text:p text:style-name="P54"/>
      <text:p text:style-name="P54">"Hello, Alden."</text:p>
      <text:p text:style-name="P54"/>
      <text:p text:style-name="P54">Big Al looked at Elias.</text:p>
      <text:p text:style-name="P54"/>
      <text:p text:style-name="P54">Then at the orb.</text:p>
      <text:p text:style-name="P54"/>
      <text:p text:style-name="P54">Then back at Elias.</text:p>
      <text:p text:style-name="P54"/>
      <text:p text:style-name="P54">"Elias."</text:p>
      <text:p text:style-name="P54"/>
      <text:p text:style-name="P54">"Yeah?"</text:p>
      <text:p text:style-name="P54"/>
      <text:p text:style-name="P54">"What the hell is that?"</text:p>
      <text:p text:style-name="P54"/>
      <text:p text:style-name="P54">The grin became even wider.</text:p>
      <text:p text:style-name="P54"/>
      <text:p text:style-name="P54">"Big Al, I'd like you to meet my friend Opi."</text:p>
      <text:p text:style-name="P54"/>
      <text:p text:style-name="P54">The orb brightened slightly.</text:p>
      <text:p text:style-name="P54"/>
      <text:p text:style-name="P54">"Hello."</text:p>
      <text:p text:style-name="P54"/>
      <text:p text:style-name="P54">Big Al considered this.</text:p>
      <text:p text:style-name="P54"/>
      <text:p text:style-name="P54">For approximately three seconds.</text:p>
      <text:p text:style-name="P54"/>
      <text:p text:style-name="P54">Then nodded.</text:p>
      <text:p text:style-name="P54"/>
      <text:p text:style-name="P54">"Alien?"</text:p>
      <text:p text:style-name="P54"/>
      <text:p text:style-name="P54">"Yes."</text:p>
      <text:p text:style-name="P54"/>
      <text:p text:style-name="P54">"Actual alien?"</text:p>
      <text:p text:style-name="P54"/>
      <text:p text:style-name="P54">"Yes."</text:p>
      <text:p text:style-name="P54"/>
      <text:p text:style-name="P54">"Space alien?"</text:p>
      <text:p text:style-name="P54"/>
      <text:p text:style-name="P54">"Yes."</text:p>
      <text:p text:style-name="P54"/>
      <text:p text:style-name="P54">Big Al looked at Opi.</text:p>
      <text:p text:style-name="P54"/>
      <text:p text:style-name="P54">Then at Elias.</text:p>
      <text:p text:style-name="P54"/>
      <text:p text:style-name="P54">Then back at Opi.</text:p>
      <text:p text:style-name="P54"/>
      <text:p text:style-name="P54"><text:soft-page-break/>"Okay."</text:p>
      <text:p text:style-name="P54"/>
      <text:p text:style-name="P54">Elias blinked.</text:p>
      <text:p text:style-name="P54"/>
      <text:p text:style-name="P54">"Okay?"</text:p>
      <text:p text:style-name="P54"/>
      <text:p text:style-name="P54">"Sure."</text:p>
      <text:p text:style-name="P54"/>
      <text:p text:style-name="P54">"Sure?"</text:p>
      <text:p text:style-name="P54"/>
      <text:p text:style-name="P54">Big Al shrugged.</text:p>
      <text:p text:style-name="P54"/>
      <text:p text:style-name="P54">"I've known you for forty years."</text:p>
      <text:p text:style-name="P54"/>
      <text:p text:style-name="P54">"Your point?"</text:p>
      <text:p text:style-name="P54"/>
      <text:p text:style-name="P54">"I think that is self-explanatory."</text:p>
      <text:p text:style-name="P54"/>
      <text:p text:style-name="P54">The orb laughed.</text:p>
      <text:p text:style-name="P54"/>
      <text:p text:style-name="P54">Elias pointed.</text:p>
      <text:p text:style-name="P54"/>
      <text:p text:style-name="P54">"See? This is why nobody likes you."</text:p>
      <text:p text:style-name="P54"/>
      <text:p text:style-name="P54">"My wife likes me."</text:p>
      <text:p text:style-name="P54"/>
      <text:p text:style-name="P54">"Your wife has questionable judgment."</text:p>
      <text:p text:style-name="P54"/>
      <text:p text:style-name="P54">---</text:p>
      <text:p text:style-name="P54"/>
      <text:p text:style-name="P54">For the next five minutes they talked.</text:p>
      <text:p text:style-name="P54"/>
      <text:p text:style-name="P54">Or more accurately, Big Al asked questions.</text:p>
      <text:p text:style-name="P54"/>
      <text:p text:style-name="P54">Lots of questions.</text:p>
      <text:p text:style-name="P54"/>
      <text:p text:style-name="P54">Most of them sensible.</text:p>
      <text:p text:style-name="P54"/>
      <text:p text:style-name="P54">Some of them absolutely not.</text:p>
      <text:p text:style-name="P54"/>
      <text:p text:style-name="P54">Opi answered what she could.</text:p>
      <text:p text:style-name="P54"/>
      <text:p text:style-name="P54">Elias answered what he understood.</text:p>
      <text:p text:style-name="P54"/>
      <text:p text:style-name="P54">Which was admittedly less.</text:p>
      <text:p text:style-name="P54"/>
      <text:p text:style-name="P54">Eventually Big Al sat back in his chair.</text:p>
      <text:p text:style-name="P54"/>
      <text:p text:style-name="P54">"I have officially reached my daily limit for impossible things."</text:p>
      <text:p text:style-name="P54"/>
      <text:p text:style-name="P54">"I hope not."</text:p>
      <text:p text:style-name="P54"/>
      <text:p text:style-name="P54">"Why?"</text:p>
      <text:p text:style-name="P54"/>
      <text:p text:style-name="P54">"Because now we get to the important part."</text:p>
      <text:p text:style-name="P54"/>
      <text:p text:style-name="P54">Big Al immediately became suspicious.</text:p>
      <text:p text:style-name="P54"/>
      <text:p text:style-name="P54">"That sentence concerns me."</text:p>
      <text:p text:style-name="P54"/>
      <text:p text:style-name="P54">"It should."</text:p>
      <text:p text:style-name="P54"><text:soft-page-break/></text:p>
      <text:p text:style-name="P54">The suspicion intensified.</text:p>
      <text:p text:style-name="P54"/>
      <text:p text:style-name="P54">---</text:p>
      <text:p text:style-name="P54"/>
      <text:p text:style-name="P54">Elias looked at his cousin.</text:p>
      <text:p text:style-name="P54"/>
      <text:p text:style-name="P54">Really looked at him.</text:p>
      <text:p text:style-name="P54"/>
      <text:p text:style-name="P54">The chair.</text:p>
      <text:p text:style-name="P54"/>
      <text:p text:style-name="P54">The missing limbs.</text:p>
      <text:p text:style-name="P54"/>
      <text:p text:style-name="P54">The years of pain.</text:p>
      <text:p text:style-name="P54"/>
      <text:p text:style-name="P54">The decades of adaptation.</text:p>
      <text:p text:style-name="P54"/>
      <text:p text:style-name="P54">Everything.</text:p>
      <text:p text:style-name="P54"/>
      <text:p text:style-name="P54">Then he smiled.</text:p>
      <text:p text:style-name="P54"/>
      <text:p text:style-name="P54">A different smile this time.</text:p>
      <text:p text:style-name="P54"/>
      <text:p text:style-name="P54">Gentler.</text:p>
      <text:p text:style-name="P54"/>
      <text:p text:style-name="P54">More serious.</text:p>
      <text:p text:style-name="P54"/>
      <text:p text:style-name="P54">"Al."</text:p>
      <text:p text:style-name="P54"/>
      <text:p text:style-name="P54">"Yeah?"</text:p>
      <text:p text:style-name="P54"/>
      <text:p text:style-name="P54">"I need you to do something for me."</text:p>
      <text:p text:style-name="P54"/>
      <text:p text:style-name="P54">"What?"</text:p>
      <text:p text:style-name="P54"/>
      <text:p text:style-name="P54">"Close your eyes."</text:p>
      <text:p text:style-name="P54"/>
      <text:p text:style-name="P54">Big Al stared.</text:p>
      <text:p text:style-name="P54"/>
      <text:p text:style-name="P54">"No."</text:p>
      <text:p text:style-name="P54"/>
      <text:p text:style-name="P54">"Why not?"</text:p>
      <text:p text:style-name="P54"/>
      <text:p text:style-name="P54">"Because every terrible idea in human history started with somebody saying that."</text:p>
      <text:p text:style-name="P54"/>
      <text:p text:style-name="P54">Opi brightened.</text:p>
      <text:p text:style-name="P54"/>
      <text:p text:style-name="P54">"He has a point."</text:p>
      <text:p text:style-name="P54"/>
      <text:p text:style-name="P54">"Thank you."</text:p>
      <text:p text:style-name="P54"/>
      <text:p text:style-name="P54">Elias rolled his eyes.</text:p>
      <text:p text:style-name="P54"/>
      <text:p text:style-name="P54">"Do you trust me?"</text:p>
      <text:p text:style-name="P54"/>
      <text:p text:style-name="P54">The question lingered.</text:p>
      <text:p text:style-name="P54"/>
      <text:p text:style-name="P54">For all the jokes.</text:p>
      <text:p text:style-name="P54"/>
      <text:p text:style-name="P54">For all the sarcasm.</text:p>
      <text:p text:style-name="P54"/>
      <text:p text:style-name="P54"><text:soft-page-break/>For all the years.</text:p>
      <text:p text:style-name="P54"/>
      <text:p text:style-name="P54">The answer was easy.</text:p>
      <text:p text:style-name="P54"/>
      <text:p text:style-name="P54">"Yes."</text:p>
      <text:p text:style-name="P54"/>
      <text:p text:style-name="P54">"Then close your eyes."</text:p>
      <text:p text:style-name="P54"/>
      <text:p text:style-name="P54">Big Al sighed.</text:p>
      <text:p text:style-name="P54"/>
      <text:p text:style-name="P54">"Fine."</text:p>
      <text:p text:style-name="P54"/>
      <text:p text:style-name="P54">His eyes closed.</text:p>
      <text:p text:style-name="P54"/>
      <text:p text:style-name="P54">"Now what?"</text:p>
      <text:p text:style-name="P54"/>
      <text:p text:style-name="P54">"Now nothing."</text:p>
      <text:p text:style-name="P54"/>
      <text:p text:style-name="P54">"This feels suspicious."</text:p>
      <text:p text:style-name="P54"/>
      <text:p text:style-name="P54">"It is suspicious."</text:p>
      <text:p text:style-name="P54"/>
      <text:p text:style-name="P54">"I knew it."</text:p>
      <text:p text:style-name="P54"/>
      <text:p text:style-name="P54">---</text:p>
      <text:p text:style-name="P54"/>
      <text:p text:style-name="P54">A circular opening appeared in the air beside them.</text:p>
      <text:p text:style-name="P54"/>
      <text:p text:style-name="P54">Not light.</text:p>
      <text:p text:style-name="P54"/>
      <text:p text:style-name="P54">Not energy.</text:p>
      <text:p text:style-name="P54"/>
      <text:p text:style-name="P54">Not a screen.</text:p>
      <text:p text:style-name="P54"/>
      <text:p text:style-name="P54">A hole.</text:p>
      <text:p text:style-name="P54"/>
      <text:p text:style-name="P54">A literal hole.</text:p>
      <text:p text:style-name="P54"/>
      <text:p text:style-name="P54">Through the opening stretched a green meadow.</text:p>
      <text:p text:style-name="P54"/>
      <text:p text:style-name="P54">Tall grass.</text:p>
      <text:p text:style-name="P54"/>
      <text:p text:style-name="P54">Pine trees.</text:p>
      <text:p text:style-name="P54"/>
      <text:p text:style-name="P54">Mountains in the distance.</text:p>
      <text:p text:style-name="P54"/>
      <text:p text:style-name="P54">A completely different world.</text:p>
      <text:p text:style-name="P54"/>
      <text:p text:style-name="P54">Big Al's eyes remained closed.</text:p>
      <text:p text:style-name="P54"/>
      <text:p text:style-name="P54">Fortunately.</text:p>
      <text:p text:style-name="P54"/>
      <text:p text:style-name="P54">Otherwise the explanation would have become considerably more difficult.</text:p>
      <text:p text:style-name="P54"/>
      <text:p text:style-name="P54">Elias moved behind the wheelchair.</text:p>
      <text:p text:style-name="P54"/>
      <text:p text:style-name="P54">Then began pushing.</text:p>
      <text:p text:style-name="P54"/>
      <text:p text:style-name="P54">The chair rolled smoothly forward.</text:p>
      <text:p text:style-name="P54"/>
      <text:p text:style-name="P54">Across the parking lot.</text:p>
      <text:p text:style-name="P54"><text:soft-page-break/></text:p>
      <text:p text:style-name="P54">Toward the impossible opening.</text:p>
      <text:p text:style-name="P54"/>
      <text:p text:style-name="P54">Into it.</text:p>
      <text:p text:style-name="P54"/>
      <text:p text:style-name="P54">The temperature changed immediately.</text:p>
      <text:p text:style-name="P54"/>
      <text:p text:style-name="P54">Cooler.</text:p>
      <text:p text:style-name="P54"/>
      <text:p text:style-name="P54">Cleaner.</text:p>
      <text:p text:style-name="P54"/>
      <text:p text:style-name="P54">The scent of pine drifted through the air.</text:p>
      <text:p text:style-name="P54"/>
      <text:p text:style-name="P54">Birds called somewhere nearby.</text:p>
      <text:p text:style-name="P54"/>
      <text:p text:style-name="P54">The grass moved gently in the wind.</text:p>
      <text:p text:style-name="P54"/>
      <text:p text:style-name="P54">Elias stopped the chair.</text:p>
      <text:p text:style-name="P54"/>
      <text:p text:style-name="P54">The portal remained open behind them.</text:p>
      <text:p text:style-name="P54"/>
      <text:p text:style-name="P54">Opi floated silently overhead.</text:p>
      <text:p text:style-name="P54"/>
      <text:p text:style-name="P54">Waiting.</text:p>
      <text:p text:style-name="P54"/>
      <text:p text:style-name="P54">Watching.</text:p>
      <text:p text:style-name="P54"/>
      <text:p text:style-name="P54">Smiling.</text:p>
      <text:p text:style-name="P54"/>
      <text:p text:style-name="P54">At least as much as a floating metallic orb could smile.</text:p>
      <text:p text:style-name="P54"/>
      <text:p text:style-name="P54">Elias walked around in front of his cousin.</text:p>
      <text:p text:style-name="P54"/>
      <text:p text:style-name="P54">Then folded his arms.</text:p>
      <text:p text:style-name="P54"/>
      <text:p text:style-name="P54">"Okay."</text:p>
      <text:p text:style-name="P54"/>
      <text:p text:style-name="P54">Big Al opened one eye.</text:p>
      <text:p text:style-name="P54"/>
      <text:p text:style-name="P54">Then the other.</text:p>
      <text:p text:style-name="P54"/>
      <text:p text:style-name="P54">And for the first time in his life, Alden "Big Al" Mercer was completely speechless.</text:p>
      <text:p text:style-name="P54"/>
      <text:p text:style-name="P54">==============</text:p>
      <text:p text:style-name="P54"/>
      <text:p text:style-name="P54"/>
      <text:p text:style-name="P54">Big Al stared at the meadow.</text:p>
      <text:p text:style-name="P54"/>
      <text:p text:style-name="P54">Then at the pine trees.</text:p>
      <text:p text:style-name="P54"/>
      <text:p text:style-name="P54">Then at the mountains.</text:p>
      <text:p text:style-name="P54"/>
      <text:p text:style-name="P54">Then very slowly back at Elias.</text:p>
      <text:p text:style-name="P54"/>
      <text:p text:style-name="P54">"No."</text:p>
      <text:p text:style-name="P54"/>
      <text:p text:style-name="P54">Elias nodded.</text:p>
      <text:p text:style-name="P54"/>
      <text:p text:style-name="P54">"No."</text:p>
      <text:p text:style-name="P54"/>
      <text:p text:style-name="P54">"No no no."</text:p>
      <text:p text:style-name="P54"><text:soft-page-break/></text:p>
      <text:p text:style-name="P54">"You may need a larger vocabulary."</text:p>
      <text:p text:style-name="P54"/>
      <text:p text:style-name="P54">Al looked behind him.</text:p>
      <text:p text:style-name="P54"/>
      <text:p text:style-name="P54">The parking lot in Southern California was still visible through the circular opening.</text:p>
      <text:p text:style-name="P54"/>
      <text:p text:style-name="P54">Beyond it, the apartment building.</text:p>
      <text:p text:style-name="P54"/>
      <text:p text:style-name="P54">The stucco wall.</text:p>
      <text:p text:style-name="P54"/>
      <text:p text:style-name="P54">The palm tree.</text:p>
      <text:p text:style-name="P54"/>
      <text:p text:style-name="P54">Sandy's window.</text:p>
      <text:p text:style-name="P54"/>
      <text:p text:style-name="P54">Then he looked forward again.</text:p>
      <text:p text:style-name="P54"/>
      <text:p text:style-name="P54">Grass.</text:p>
      <text:p text:style-name="P54"/>
      <text:p text:style-name="P54">Pine.</text:p>
      <text:p text:style-name="P54"/>
      <text:p text:style-name="P54">Mountains.</text:p>
      <text:p text:style-name="P54"/>
      <text:p text:style-name="P54">Cold clean air.</text:p>
      <text:p text:style-name="P54"/>
      <text:p text:style-name="P54">His mouth opened.</text:p>
      <text:p text:style-name="P54"/>
      <text:p text:style-name="P54">Closed.</text:p>
      <text:p text:style-name="P54"/>
      <text:p text:style-name="P54">Opened again.</text:p>
      <text:p text:style-name="P54"/>
      <text:p text:style-name="P54">Nothing came out.</text:p>
      <text:p text:style-name="P54"/>
      <text:p text:style-name="P54">Opi floated beside Elias, serene and annoyingly calm.</text:p>
      <text:p text:style-name="P54"/>
      <text:p text:style-name="P54">"Your physiological response is within normal parameters."</text:p>
      <text:p text:style-name="P54"/>
      <text:p text:style-name="P54">Al pointed at her.</text:p>
      <text:p text:style-name="P54"/>
      <text:p text:style-name="P54">"Do not medicalize my freak-out."</text:p>
      <text:p text:style-name="P54"/>
      <text:p text:style-name="P54">Elias laughed.</text:p>
      <text:p text:style-name="P54"/>
      <text:p text:style-name="P54">Opi brightened.</text:p>
      <text:p text:style-name="P54"/>
      <text:p text:style-name="P54">"I was attempting reassurance."</text:p>
      <text:p text:style-name="P54"/>
      <text:p text:style-name="P54">"You failed."</text:p>
      <text:p text:style-name="P54"/>
      <text:p text:style-name="P54">"Noted."</text:p>
      <text:p text:style-name="P54"/>
      <text:p text:style-name="P54">Al stared at the portal again.</text:p>
      <text:p text:style-name="P54"/>
      <text:p text:style-name="P54">"That's California."</text:p>
      <text:p text:style-name="P54"/>
      <text:p text:style-name="P54">"Yes."</text:p>
      <text:p text:style-name="P54"/>
      <text:p text:style-name="P54">"And this is Washington."</text:p>
      <text:p text:style-name="P54"/>
      <text:p text:style-name="P54">"Yes."</text:p>
      <text:p text:style-name="P54"/>
      <text:p text:style-name="P54"><text:soft-page-break/>"And that is a hole in the air."</text:p>
      <text:p text:style-name="P54"/>
      <text:p text:style-name="P54">"Technically—"</text:p>
      <text:p text:style-name="P54"/>
      <text:p text:style-name="P54">Elias held up a hand.</text:p>
      <text:p text:style-name="P54"/>
      <text:p text:style-name="P54">"Opi."</text:p>
      <text:p text:style-name="P54"/>
      <text:p text:style-name="P54">"What?"</text:p>
      <text:p text:style-name="P54"/>
      <text:p text:style-name="P54">"Do not technically him right now."</text:p>
      <text:p text:style-name="P54"/>
      <text:p text:style-name="P54">The orb paused.</text:p>
      <text:p text:style-name="P54"/>
      <text:p text:style-name="P54">Al kept staring.</text:p>
      <text:p text:style-name="P54"/>
      <text:p text:style-name="P54">After nearly a minute he shook his head.</text:p>
      <text:p text:style-name="P54"/>
      <text:p text:style-name="P54">"Nope."</text:p>
      <text:p text:style-name="P54"/>
      <text:p text:style-name="P54">Then again.</text:p>
      <text:p text:style-name="P54"/>
      <text:p text:style-name="P54">"Nope."</text:p>
      <text:p text:style-name="P54"/>
      <text:p text:style-name="P54">Then finally he exhaled.</text:p>
      <text:p text:style-name="P54"/>
      <text:p text:style-name="P54">"Okay."</text:p>
      <text:p text:style-name="P54"/>
      <text:p text:style-name="P54">Elias blinked.</text:p>
      <text:p text:style-name="P54"/>
      <text:p text:style-name="P54">"Okay?"</text:p>
      <text:p text:style-name="P54"/>
      <text:p text:style-name="P54">"No."</text:p>
      <text:p text:style-name="P54"/>
      <text:p text:style-name="P54">Al pointed at the portal.</text:p>
      <text:p text:style-name="P54"/>
      <text:p text:style-name="P54">"Not okay. Nothing about that is okay. But I am choosing not to have a stroke."</text:p>
      <text:p text:style-name="P54"/>
      <text:p text:style-name="P54">"Good choice."</text:p>
      <text:p text:style-name="P54"/>
      <text:p text:style-name="P54">"I thought so."</text:p>
      <text:p text:style-name="P54"/>
      <text:p text:style-name="P54">Opi's light warmed.</text:p>
      <text:p text:style-name="P54"/>
      <text:p text:style-name="P54">"Teleportation is completely safe."</text:p>
      <text:p text:style-name="P54"/>
      <text:p text:style-name="P54"/>
      <text:p text:style-name="P54">Al rubbed his face with his one damaged hand.</text:p>
      <text:p text:style-name="P54"/>
      <text:p text:style-name="P54">"I need the idiot version."</text:p>
      <text:p text:style-name="P54"/>
      <text:p text:style-name="P54">Elias crouched slightly so they were eye level.</text:p>
      <text:p text:style-name="P54"/>
      <text:p text:style-name="P54">"Opi can open doors between places."</text:p>
      <text:p text:style-name="P54"/>
      <text:p text:style-name="P54">"Doors."</text:p>
      <text:p text:style-name="P54"/>
      <text:p text:style-name="P54">"Basically."</text:p>
      <text:p text:style-name="P54"/>
      <text:p text:style-name="P54">"Through space."</text:p>
      <text:p text:style-name="P54"/>
      <text:p text:style-name="P54"><text:soft-page-break/>"Basically."</text:p>
      <text:p text:style-name="P54"/>
      <text:p text:style-name="P54"/>
      <text:p text:style-name="P54">He shook his head again.</text:p>
      <text:p text:style-name="P54"/>
      <text:p text:style-name="P54"/>
      <text:p text:style-name="P54">The portal vanished.</text:p>
      <text:p text:style-name="P54"/>
      <text:p text:style-name="P54">No sound.</text:p>
      <text:p text:style-name="P54"/>
      <text:p text:style-name="P54">No flash.</text:p>
      <text:p text:style-name="P54"/>
      <text:p text:style-name="P54">One moment Southern California existed behind them.</text:p>
      <text:p text:style-name="P54"/>
      <text:p text:style-name="P54">The next there was only meadow.</text:p>
      <text:p text:style-name="P54"/>
      <text:p text:style-name="P54">Big Al stared at the empty air.</text:p>
      <text:p text:style-name="P54"/>
      <text:p text:style-name="P54">"That does not help."</text:p>
      <text:p text:style-name="P54"/>
      <text:p text:style-name="P54">"No," Elias said. "It probably doesn't."</text:p>
      <text:p text:style-name="P54"/>
      <text:p text:style-name="P54">---</text:p>
      <text:p text:style-name="P54"/>
      <text:p text:style-name="P54">It took Al several minutes to calm down.</text:p>
      <text:p text:style-name="P54"/>
      <text:p text:style-name="P54">He sat in his chair on the edge of a meadow in Stevens County, Washington, with his cousin standing beside him and a floating alien sphere overhead, trying to reorganize his understanding of reality.</text:p>
      <text:p text:style-name="P54"/>
      <text:p text:style-name="P54">It was not going well.</text:p>
      <text:p text:style-name="P54"/>
      <text:p text:style-name="P54">Finally he looked at Elias.</text:p>
      <text:p text:style-name="P54"/>
      <text:p text:style-name="P54">"Tell me this isn't the only trick."</text:p>
      <text:p text:style-name="P54"/>
      <text:p text:style-name="P54">Elias's expression changed.</text:p>
      <text:p text:style-name="P54"/>
      <text:p text:style-name="P54">Not much.</text:p>
      <text:p text:style-name="P54"/>
      <text:p text:style-name="P54">Just enough.</text:p>
      <text:p text:style-name="P54"/>
      <text:p text:style-name="P54">"No."</text:p>
      <text:p text:style-name="P54"/>
      <text:p text:style-name="P54">Al's humor faded.</text:p>
      <text:p text:style-name="P54"/>
      <text:p text:style-name="P54">"No?"</text:p>
      <text:p text:style-name="P54"/>
      <text:p text:style-name="P54">"No."</text:p>
      <text:p text:style-name="P54"/>
      <text:p text:style-name="P54">Elias looked at Opi.</text:p>
      <text:p text:style-name="P54"/>
      <text:p text:style-name="P54">Then back at Al.</text:p>
      <text:p text:style-name="P54"/>
      <text:p text:style-name="P54">"Not even close."</text:p>
      <text:p text:style-name="P54"/>
      <text:p text:style-name="P54">The meadow became quiet.</text:p>
      <text:p text:style-name="P54"/>
      <text:p text:style-name="P54">Wind moved through the grass.</text:p>
      <text:p text:style-name="P54"/>
      <text:p text:style-name="P54">Al suddenly felt the conversation shift beneath him.</text:p>
      <text:p text:style-name="P54"/>
      <text:p text:style-name="P54"><text:soft-page-break/>This was no longer about teleportation.</text:p>
      <text:p text:style-name="P54"/>
      <text:p text:style-name="P54">This was something else.</text:p>
      <text:p text:style-name="P54"/>
      <text:p text:style-name="P54">Elias stepped closer.</text:p>
      <text:p text:style-name="P54"/>
      <text:p text:style-name="P54">"I want to show you something."</text:p>
      <text:p text:style-name="P54"/>
      <text:p text:style-name="P54">"Of course you do."</text:p>
      <text:p text:style-name="P54"/>
      <text:p text:style-name="P54">"Hold out your hand."</text:p>
      <text:p text:style-name="P54"/>
      <text:p text:style-name="P54">Al looked down at it.</text:p>
      <text:p text:style-name="P54"/>
      <text:p text:style-name="P54">His one hand.</text:p>
      <text:p text:style-name="P54"/>
      <text:p text:style-name="P54">The damaged one.</text:p>
      <text:p text:style-name="P54"/>
      <text:p text:style-name="P54">The fingers were short.</text:p>
      <text:p text:style-name="P54"/>
      <text:p text:style-name="P54">Crooked.</text:p>
      <text:p text:style-name="P54"/>
      <text:p text:style-name="P54">Useful enough for some things.</text:p>
      <text:p text:style-name="P54"/>
      <text:p text:style-name="P54">Useless for many others.</text:p>
      <text:p text:style-name="P54"/>
      <text:p text:style-name="P54">The hand had been part of him so long he rarely thought of it as damaged.</text:p>
      <text:p text:style-name="P54"/>
      <text:p text:style-name="P54">It was just his hand.</text:p>
      <text:p text:style-name="P54"/>
      <text:p text:style-name="P54">The only one he'd ever had.</text:p>
      <text:p text:style-name="P54"/>
      <text:p text:style-name="P54">He looked back up.</text:p>
      <text:p text:style-name="P54"/>
      <text:p text:style-name="P54">"Elias."</text:p>
      <text:p text:style-name="P54"/>
      <text:p text:style-name="P54">"I understand."</text:p>
      <text:p text:style-name="P54"/>
      <text:p text:style-name="P54">"Do you?"</text:p>
      <text:p text:style-name="P54"/>
      <text:p text:style-name="P54">"Yeah."</text:p>
      <text:p text:style-name="P54"/>
      <text:p text:style-name="P54">Al studied his cousin's face.</text:p>
      <text:p text:style-name="P54"/>
      <text:p text:style-name="P54">There was no grin now.</text:p>
      <text:p text:style-name="P54"/>
      <text:p text:style-name="P54">No joke.</text:p>
      <text:p text:style-name="P54"/>
      <text:p text:style-name="P54">No sarcasm.</text:p>
      <text:p text:style-name="P54"/>
      <text:p text:style-name="P54">Just Elias.</text:p>
      <text:p text:style-name="P54"/>
      <text:p text:style-name="P54">Steady.</text:p>
      <text:p text:style-name="P54"/>
      <text:p text:style-name="P54">Nervous.</text:p>
      <text:p text:style-name="P54"/>
      <text:p text:style-name="P54">Hopeful.</text:p>
      <text:p text:style-name="P54"/>
      <text:p text:style-name="P54">Terrified.</text:p>
      <text:p text:style-name="P54"/>
      <text:p text:style-name="P54">That frightened Al more than the portal.</text:p>
      <text:p text:style-name="P54"><text:soft-page-break/></text:p>
      <text:p text:style-name="P54">"Ready?" Elias asked.</text:p>
      <text:p text:style-name="P54"/>
      <text:p text:style-name="P54">Al laughed once.</text:p>
      <text:p text:style-name="P54"/>
      <text:p text:style-name="P54">A short sound.</text:p>
      <text:p text:style-name="P54"/>
      <text:p text:style-name="P54">"Of course not."</text:p>
      <text:p text:style-name="P54"/>
      <text:p text:style-name="P54">Elias nodded.</text:p>
      <text:p text:style-name="P54"/>
      <text:p text:style-name="P54">Then looked at Opi.</text:p>
      <text:p text:style-name="P54"/>
      <text:p text:style-name="P54">"Do it."</text:p>
      <text:p text:style-name="P54"/>
      <text:p text:style-name="P54">Opi's light shifted.</text:p>
      <text:p text:style-name="P54"/>
      <text:p text:style-name="P54">Soft gold.</text:p>
      <text:p text:style-name="P54"/>
      <text:p text:style-name="P54">Then white.</text:p>
      <text:p text:style-name="P54"/>
      <text:p text:style-name="P54">Then something Al couldn't name.</text:p>
      <text:p text:style-name="P54"/>
      <text:p text:style-name="P54">There was no pain.</text:p>
      <text:p text:style-name="P54"/>
      <text:p text:style-name="P54">That was the first surprise.</text:p>
      <text:p text:style-name="P54"/>
      <text:p text:style-name="P54">No pain.</text:p>
      <text:p text:style-name="P54"/>
      <text:p text:style-name="P54">Only warmth.</text:p>
      <text:p text:style-name="P54"/>
      <text:p text:style-name="P54">A deep warmth that moved through his wrist, palm, fingers, bones, nerves, skin.</text:p>
      <text:p text:style-name="P54"/>
      <text:p text:style-name="P54">The second surprise was pressure.</text:p>
      <text:p text:style-name="P54"/>
      <text:p text:style-name="P54">Not unpleasant.</text:p>
      <text:p text:style-name="P54"/>
      <text:p text:style-name="P54">Just full.</text:p>
      <text:p text:style-name="P54"/>
      <text:p text:style-name="P54">Like something long-collapsed inside him was unfolding.</text:p>
      <text:p text:style-name="P54"/>
      <text:p text:style-name="P54">Al stared.</text:p>
      <text:p text:style-name="P54"/>
      <text:p text:style-name="P54">His fingers lengthened.</text:p>
      <text:p text:style-name="P54"/>
      <text:p text:style-name="P54">Straightened.</text:p>
      <text:p text:style-name="P54"/>
      <text:p text:style-name="P54">His palm reshaped.</text:p>
      <text:p text:style-name="P54"/>
      <text:p text:style-name="P54">Bones moved beneath skin without tearing it.</text:p>
      <text:p text:style-name="P54"/>
      <text:p text:style-name="P54">Nails formed.</text:p>
      <text:p text:style-name="P54"/>
      <text:p text:style-name="P54">Knuckles appeared.</text:p>
      <text:p text:style-name="P54"/>
      <text:p text:style-name="P54">Skin smoothed.</text:p>
      <text:p text:style-name="P54"/>
      <text:p text:style-name="P54">Tendons flexed.</text:p>
      <text:p text:style-name="P54"/>
      <text:p text:style-name="P54">A lifetime of wrongness corrected itself in less than 5 seconds.</text:p>
      <text:p text:style-name="P54"/>
      <text:p text:style-name="P54"><text:soft-page-break/>Then it was done.</text:p>
      <text:p text:style-name="P54"/>
      <text:p text:style-name="P54">His hand was whole.</text:p>
      <text:p text:style-name="P54"/>
      <text:p text:style-name="P54">Not artificial.</text:p>
      <text:p text:style-name="P54"/>
      <text:p text:style-name="P54">Not prosthetic.</text:p>
      <text:p text:style-name="P54"/>
      <text:p text:style-name="P54">Not repaired badly.</text:p>
      <text:p text:style-name="P54"/>
      <text:p text:style-name="P54">Whole.</text:p>
      <text:p text:style-name="P54"/>
      <text:p text:style-name="P54">Al did not speak.</text:p>
      <text:p text:style-name="P54"/>
      <text:p text:style-name="P54">He lifted the hand.</text:p>
      <text:p text:style-name="P54"/>
      <text:p text:style-name="P54">Turned it.</text:p>
      <text:p text:style-name="P54"/>
      <text:p text:style-name="P54">Opened the fingers.</text:p>
      <text:p text:style-name="P54"/>
      <text:p text:style-name="P54">Closed them.</text:p>
      <text:p text:style-name="P54"/>
      <text:p text:style-name="P54">Opened them again.</text:p>
      <text:p text:style-name="P54"/>
      <text:p text:style-name="P54">The motion was so simple that the universe should have been embarrassed for denying it to him for forty-seven years.</text:p>
      <text:p text:style-name="P54"/>
      <text:p text:style-name="P54">His breath caught.</text:p>
      <text:p text:style-name="P54"/>
      <text:p text:style-name="P54">Elias said nothing.</text:p>
      <text:p text:style-name="P54"/>
      <text:p text:style-name="P54">Opi said nothing.</text:p>
      <text:p text:style-name="P54"/>
      <text:p text:style-name="P54">For once, both of them were wise enough to shut up.</text:p>
      <text:p text:style-name="P54"/>
      <text:p text:style-name="P54">Al touched his thumb to each finger.</text:p>
      <text:p text:style-name="P54"/>
      <text:p text:style-name="P54">One by one.</text:p>
      <text:p text:style-name="P54"/>
      <text:p text:style-name="P54">Then again.</text:p>
      <text:p text:style-name="P54"/>
      <text:p text:style-name="P54">Then again.</text:p>
      <text:p text:style-name="P54"/>
      <text:p text:style-name="P54">A sound escaped him.</text:p>
      <text:p text:style-name="P54"/>
      <text:p text:style-name="P54">Not quite laughter.</text:p>
      <text:p text:style-name="P54"/>
      <text:p text:style-name="P54">Not quite a sob.</text:p>
      <text:p text:style-name="P54"/>
      <text:p text:style-name="P54">Something in between.</text:p>
      <text:p text:style-name="P54"/>
      <text:p text:style-name="P54">Finally he whispered, "Holy shit."</text:p>
      <text:p text:style-name="P54"/>
      <text:p text:style-name="P54">Elias nodded.</text:p>
      <text:p text:style-name="P54"/>
      <text:p text:style-name="P54">"Yeah."</text:p>
      <text:p text:style-name="P54"/>
      <text:p text:style-name="P54">Al looked at him.</text:p>
      <text:p text:style-name="P54"/>
      <text:p text:style-name="P54">Then at Opi.</text:p>
      <text:p text:style-name="P54"/>
      <text:p text:style-name="P54"><text:soft-page-break/>Then back at the hand.</text:p>
      <text:p text:style-name="P54"/>
      <text:p text:style-name="P54">"Can she..."</text:p>
      <text:p text:style-name="P54"/>
      <text:p text:style-name="P54">The question died.</text:p>
      <text:p text:style-name="P54"/>
      <text:p text:style-name="P54">He couldn't say it.</text:p>
      <text:p text:style-name="P54"/>
      <text:p text:style-name="P54">Couldn't force the words out.</text:p>
      <text:p text:style-name="P54"/>
      <text:p text:style-name="P54">Elias answered anyway.</text:p>
      <text:p text:style-name="P54"/>
      <text:p text:style-name="P54">"Yes."</text:p>
      <text:p text:style-name="P54"/>
      <text:p text:style-name="P54">Al's eyes lifted.</text:p>
      <text:p text:style-name="P54"/>
      <text:p text:style-name="P54">"All of me?"</text:p>
      <text:p text:style-name="P54"/>
      <text:p text:style-name="P54">"Yes."</text:p>
      <text:p text:style-name="P54"/>
      <text:p text:style-name="P54">"Arms?"</text:p>
      <text:p text:style-name="P54"/>
      <text:p text:style-name="P54">"Yes."</text:p>
      <text:p text:style-name="P54"/>
      <text:p text:style-name="P54">"Legs?"</text:p>
      <text:p text:style-name="P54"/>
      <text:p text:style-name="P54">"Yes."</text:p>
      <text:p text:style-name="P54"/>
      <text:p text:style-name="P54">"My back?"</text:p>
      <text:p text:style-name="P54"/>
      <text:p text:style-name="P54">"Yes."</text:p>
      <text:p text:style-name="P54"/>
      <text:p text:style-name="P54">"The rods?"</text:p>
      <text:p text:style-name="P54"/>
      <text:p text:style-name="P54">"She can remove them."</text:p>
      <text:p text:style-name="P54"/>
      <text:p text:style-name="P54">"Pain?"</text:p>
      <text:p text:style-name="P54"/>
      <text:p text:style-name="P54">"Yes."</text:p>
      <text:p text:style-name="P54"/>
      <text:p text:style-name="P54">"Everything?"</text:p>
      <text:p text:style-name="P54"/>
      <text:p text:style-name="P54">Elias looked to Opi.</text:p>
      <text:p text:style-name="P54"/>
      <text:p text:style-name="P54">Opi answered.</text:p>
      <text:p text:style-name="P54"/>
      <text:p text:style-name="P54">"Most of the structural, neurological, musculoskeletal, and systemic consequences of your congenital formation defects and subsequent compensatory damage can be repaired."</text:p>
      <text:p text:style-name="P54"/>
      <text:p text:style-name="P54">Al stared at her.</text:p>
      <text:p text:style-name="P54"/>
      <text:p text:style-name="P54">Elias sighed.</text:p>
      <text:p text:style-name="P54"/>
      <text:p text:style-name="P54">"She means yes."</text:p>
      <text:p text:style-name="P54"/>
      <text:p text:style-name="P54">"I did mean yes," Opi said.</text:p>
      <text:p text:style-name="P54"/>
      <text:p text:style-name="P54">"You used thirty-six words."</text:p>
      <text:p text:style-name="P54"/>
      <text:p text:style-name="P54">"I was being accurate."</text:p>
      <text:p text:style-name="P54"/>
      <text:p text:style-name="P54"><text:soft-page-break/>"Try mercy next time."</text:p>
      <text:p text:style-name="P54"/>
      <text:p text:style-name="P54">Al was still staring at his hand.</text:p>
      <text:p text:style-name="P54"/>
      <text:p text:style-name="P54">Then suddenly he laughed.</text:p>
      <text:p text:style-name="P54"/>
      <text:p text:style-name="P54">Then stopped.</text:p>
      <text:p text:style-name="P54"/>
      <text:p text:style-name="P54">Then laughed again.</text:p>
      <text:p text:style-name="P54"/>
      <text:p text:style-name="P54">Then looked terrified.</text:p>
      <text:p text:style-name="P54"/>
      <text:p text:style-name="P54">The reactions chased one another across his face too quickly to name.</text:p>
      <text:p text:style-name="P54"/>
      <text:p text:style-name="P54">Hope.</text:p>
      <text:p text:style-name="P54"/>
      <text:p text:style-name="P54">Fear.</text:p>
      <text:p text:style-name="P54"/>
      <text:p text:style-name="P54">Disbelief.</text:p>
      <text:p text:style-name="P54"/>
      <text:p text:style-name="P54">Grief.</text:p>
      <text:p text:style-name="P54"/>
      <text:p text:style-name="P54">Anger.</text:p>
      <text:p text:style-name="P54"/>
      <text:p text:style-name="P54">Joy.</text:p>
      <text:p text:style-name="P54"/>
      <text:p text:style-name="P54">All of it.</text:p>
      <text:p text:style-name="P54"/>
      <text:p text:style-name="P54">All at once.</text:p>
      <text:p text:style-name="P54"/>
      <text:p text:style-name="P54">Elias waited.</text:p>
      <text:p text:style-name="P54"/>
      <text:p text:style-name="P54">Eventually Al looked up.</text:p>
      <text:p text:style-name="P54"/>
      <text:p text:style-name="P54">"Why haven't you done it already?"</text:p>
      <text:p text:style-name="P54"/>
      <text:p text:style-name="P54">"Because it is your body."</text:p>
      <text:p text:style-name="P54"/>
      <text:p text:style-name="P54">That answer came from Opi.</text:p>
      <text:p text:style-name="P54"/>
      <text:p text:style-name="P54">Immediate.</text:p>
      <text:p text:style-name="P54"/>
      <text:p text:style-name="P54">Certain.</text:p>
      <text:p text:style-name="P54"/>
      <text:p text:style-name="P54">Velhari.</text:p>
      <text:p text:style-name="P54"/>
      <text:p text:style-name="P54">Al looked at her.</text:p>
      <text:p text:style-name="P54"/>
      <text:p text:style-name="P54">She continued.</text:p>
      <text:p text:style-name="P54"/>
      <text:p text:style-name="P54">"No one may make this decision for you."</text:p>
      <text:p text:style-name="P54"/>
      <text:p text:style-name="P54">Elias nodded.</text:p>
      <text:p text:style-name="P54"/>
      <text:p text:style-name="P54">"And because there's a but."</text:p>
      <text:p text:style-name="P54"/>
      <text:p text:style-name="P54">Al swallowed.</text:p>
      <text:p text:style-name="P54"/>
      <text:p text:style-name="P54">"There's a but ?"</text:p>
      <text:p text:style-name="P54"/>
      <text:p text:style-name="P54">"Yeah."</text:p>
      <text:p text:style-name="P54"><text:soft-page-break/></text:p>
      <text:p text:style-name="P54">Elias crouched in front of him again.</text:p>
      <text:p text:style-name="P54"/>
      <text:p text:style-name="P54">"Al, if you agree to this, it will smash your old life to smithereens."</text:p>
      <text:p text:style-name="P54"/>
      <text:p text:style-name="P54">Al looked at his new hand.</text:p>
      <text:p text:style-name="P54"/>
      <text:p text:style-name="P54">Then slowly back to him.</text:p>
      <text:p text:style-name="P54"/>
      <text:p text:style-name="P54">"What old life?"</text:p>
      <text:p text:style-name="P54"/>
      <text:p text:style-name="P54">"The one you understand."</text:p>
      <text:p text:style-name="P54"/>
      <text:p text:style-name="P54">That landed.</text:p>
      <text:p text:style-name="P54"/>
      <text:p text:style-name="P54">Elias continued.</text:p>
      <text:p text:style-name="P54"/>
      <text:p text:style-name="P54">"You can't just go back to work Monday and pretend nothing happened."</text:p>
      <text:p text:style-name="P54"/>
      <text:p text:style-name="P54">"No."</text:p>
      <text:p text:style-name="P54"/>
      <text:p text:style-name="P54">"You can't roll into your office with arms and legs and say you had a good weekend."</text:p>
      <text:p text:style-name="P54"/>
      <text:p text:style-name="P54">Despite everything, Al laughed.</text:p>
      <text:p text:style-name="P54"/>
      <text:p text:style-name="P54">"That would be a conversation."</text:p>
      <text:p text:style-name="P54"/>
      <text:p text:style-name="P54">"It would be ten thousand conversations."</text:p>
      <text:p text:style-name="P54"/>
      <text:p text:style-name="P54">"You'd need to move. Far away from everyone who knows the old you."</text:p>
      <text:p text:style-name="P54"/>
      <text:p text:style-name="P54">Al's smile faded.</text:p>
      <text:p text:style-name="P54"/>
      <text:p text:style-name="P54">"Why?"</text:p>
      <text:p text:style-name="P54"/>
      <text:p text:style-name="P54">"Because if people put two and two together, they won't call this medical treatment."</text:p>
      <text:p text:style-name="P54"/>
      <text:p text:style-name="P54">Elias pointed at the hand.</text:p>
      <text:p text:style-name="P54"/>
      <text:p text:style-name="P54">"They'll call it a miracle."</text:p>
      <text:p text:style-name="P54"/>
      <text:p text:style-name="P54">Al said nothing.</text:p>
      <text:p text:style-name="P54"/>
      <text:p text:style-name="P54">"And you know exactly how much trouble that will cause."</text:p>
      <text:p text:style-name="P54"/>
      <text:p text:style-name="P54">Al looked down.</text:p>
      <text:p text:style-name="P54"/>
      <text:p text:style-name="P54">He did know.</text:p>
      <text:p text:style-name="P54"/>
      <text:p text:style-name="P54">Everyone would want answers.</text:p>
      <text:p text:style-name="P54"/>
      <text:p text:style-name="P54">Doctors.</text:p>
      <text:p text:style-name="P54"/>
      <text:p text:style-name="P54">News stations.</text:p>
      <text:p text:style-name="P54"/>
      <text:p text:style-name="P54">Churches.</text:p>
      <text:p text:style-name="P54"/>
      <text:p text:style-name="P54">Governments.</text:p>
      <text:p text:style-name="P54"/>
      <text:p text:style-name="P54">Desperate people.</text:p>
      <text:p text:style-name="P54"/>
      <text:p text:style-name="P54"><text:soft-page-break/>Crazy people.</text:p>
      <text:p text:style-name="P54"/>
      <text:p text:style-name="P54">Greedy people.</text:p>
      <text:p text:style-name="P54"/>
      <text:p text:style-name="P54">Dangerous people.</text:p>
      <text:p text:style-name="P54"/>
      <text:p text:style-name="P54">The thought spread outward, ugly and fast.</text:p>
      <text:p text:style-name="P54"/>
      <text:p text:style-name="P54">Elias let him see it.</text:p>
      <text:p text:style-name="P54"/>
      <text:p text:style-name="P54">Then added quietly:</text:p>
      <text:p text:style-name="P54"/>
      <text:p text:style-name="P54">"And that's not the worst part."</text:p>
      <text:p text:style-name="P54"/>
      <text:p text:style-name="P54">Al looked up.</text:p>
      <text:p text:style-name="P54"/>
      <text:p text:style-name="P54">"What is?"</text:p>
      <text:p text:style-name="P54"/>
      <text:p text:style-name="P54">"Sandy."</text:p>
      <text:p text:style-name="P54"/>
      <text:p text:style-name="P54">The name froze the air between them.</text:p>
      <text:p text:style-name="P54"/>
      <text:p text:style-name="P54">Elias did not soften it.</text:p>
      <text:p text:style-name="P54"/>
      <text:p text:style-name="P54">"What do you think she will think?"</text:p>
      <text:p text:style-name="P54"/>
      <text:p text:style-name="P54">Al's hand slowly closed.</text:p>
      <text:p text:style-name="P54"/>
      <text:p text:style-name="P54">"What do you think she will feel?"</text:p>
      <text:p text:style-name="P54"/>
      <text:p text:style-name="P54">"Eli—"</text:p>
      <text:p text:style-name="P54"/>
      <text:p text:style-name="P54">"What do you think she will do when the man she married becomes someone else?"</text:p>
      <text:p text:style-name="P54"/>
      <text:p text:style-name="P54">Al flinched.</text:p>
      <text:p text:style-name="P54"/>
      <text:p text:style-name="P54">Not physically.</text:p>
      <text:p text:style-name="P54"/>
      <text:p text:style-name="P54">Deeper than that.</text:p>
      <text:p text:style-name="P54"/>
      <text:p text:style-name="P54">Elias saw it and hated himself a little.</text:p>
      <text:p text:style-name="P54"/>
      <text:p text:style-name="P54">But he kept going.</text:p>
      <text:p text:style-name="P54"/>
      <text:p text:style-name="P54">Because someone had to.</text:p>
      <text:p text:style-name="P54"/>
      <text:p text:style-name="P54">"You and Sandy have a life. A real one. She loves you. But she loves the you she knows. The you she built that life with."</text:p>
      <text:p text:style-name="P54"/>
      <text:p text:style-name="P54">Al's jaw tightened.</text:p>
      <text:p text:style-name="P54"/>
      <text:p text:style-name="P54">"Opi can fix my body."</text:p>
      <text:p text:style-name="P54"/>
      <text:p text:style-name="P54">"Yes."</text:p>
      <text:p text:style-name="P54"/>
      <text:p text:style-name="P54">"But she cannot make Sandy okay with it."</text:p>
      <text:p text:style-name="P54"/>
      <text:p text:style-name="P54">"No."</text:p>
      <text:p text:style-name="P54"/>
      <text:p text:style-name="P54">Opi's light dimmed slightly.</text:p>
      <text:p text:style-name="P54"/>
      <text:p text:style-name="P54"><text:soft-page-break/>"I cannot repair every consequence of transformation."</text:p>
      <text:p text:style-name="P54"/>
      <text:p text:style-name="P54">Elias glanced at her.</text:p>
      <text:p text:style-name="P54"/>
      <text:p text:style-name="P54">"That's a good sentence."</text:p>
      <text:p text:style-name="P54"/>
      <text:p text:style-name="P54">"I have been practicing."</text:p>
      <text:p text:style-name="P54"/>
      <text:p text:style-name="P54">Al didn't laugh.</text:p>
      <text:p text:style-name="P54"/>
      <text:p text:style-name="P54">Not this time.</text:p>
      <text:p text:style-name="P54"/>
      <text:p text:style-name="P54">He stared across the meadow.</text:p>
      <text:p text:style-name="P54"/>
      <text:p text:style-name="P54">At the mountains.</text:p>
      <text:p text:style-name="P54"/>
      <text:p text:style-name="P54">At the grass.</text:p>
      <text:p text:style-name="P54"/>
      <text:p text:style-name="P54">At a world impossibly far from the apartment he had left minutes ago.</text:p>
      <text:p text:style-name="P54"/>
      <text:p text:style-name="P54">Finally he said, "You think she'll leave me."</text:p>
      <text:p text:style-name="P54"/>
      <text:p text:style-name="P54">"I have no idea."</text:p>
      <text:p text:style-name="P54"/>
      <text:p text:style-name="P54">"That's not an answer."</text:p>
      <text:p text:style-name="P54"/>
      <text:p text:style-name="P54">"It's the only honest one."</text:p>
      <text:p text:style-name="P54"/>
      <text:p text:style-name="P54">Al looked at him.</text:p>
      <text:p text:style-name="P54"/>
      <text:p text:style-name="P54">Elias held his gaze.</text:p>
      <text:p text:style-name="P54"/>
      <text:p text:style-name="P54">"I think it will be chaos."</text:p>
      <text:p text:style-name="P54"/>
      <text:p text:style-name="P54">"For both of you."</text:p>
      <text:p text:style-name="P54"/>
      <text:p text:style-name="P54">"For all of you."</text:p>
      <text:p text:style-name="P54"/>
      <text:p text:style-name="P54">"For everyone close to you."</text:p>
      <text:p text:style-name="P54"/>
      <text:p text:style-name="P54">Al looked down at the hand again.</text:p>
      <text:p text:style-name="P54"/>
      <text:p text:style-name="P54">Perfect.</text:p>
      <text:p text:style-name="P54"/>
      <text:p text:style-name="P54">Impossible.</text:p>
      <text:p text:style-name="P54"/>
      <text:p text:style-name="P54">His.</text:p>
      <text:p text:style-name="P54"/>
      <text:p text:style-name="P54">Elias's voice softened.</text:p>
      <text:p text:style-name="P54"/>
      <text:p text:style-name="P54">"So you need to think."</text:p>
      <text:p text:style-name="P54"/>
      <text:p text:style-name="P54">Al let out a breath.</text:p>
      <text:p text:style-name="P54"/>
      <text:p text:style-name="P54">"A lot."</text:p>
      <text:p text:style-name="P54"/>
      <text:p text:style-name="P54">"Yeah."</text:p>
      <text:p text:style-name="P54"/>
      <text:p text:style-name="P54">"A lot a lot."</text:p>
      <text:p text:style-name="P54"/>
      <text:p text:style-name="P54">"Probably more than that."</text:p>
      <text:p text:style-name="P54"><text:soft-page-break/></text:p>
      <text:p text:style-name="P54">Opi floated closer.</text:p>
      <text:p text:style-name="P54"/>
      <text:p text:style-name="P54">"We can perform a demonstration for Sandy when you are ready."</text:p>
      <text:p text:style-name="P54"/>
      <text:p text:style-name="P54">Al looked at her.</text:p>
      <text:p text:style-name="P54"/>
      <text:p text:style-name="P54">"A demonstration?"</text:p>
      <text:p text:style-name="P54"/>
      <text:p text:style-name="P54">"Something limited. Clear. Reversible in its social implications."</text:p>
      <text:p text:style-name="P54"/>
      <text:p text:style-name="P54">Elias translated.</text:p>
      <text:p text:style-name="P54"/>
      <text:p text:style-name="P54">"Something that proves you're not on crack."</text:p>
      <text:p text:style-name="P54"/>
      <text:p text:style-name="P54">Al laughed despite himself.</text:p>
      <text:p text:style-name="P54"/>
      <text:p text:style-name="P54">"Thank you. I understood that version."</text:p>
      <text:p text:style-name="P54"/>
      <text:p text:style-name="P54">"Most humans do," Opi said.</text:p>
      <text:p text:style-name="P54"/>
      <text:p text:style-name="P54">Elias smiled.</text:p>
      <text:p text:style-name="P54"/>
      <text:p text:style-name="P54">"Then after that, you and Sandy talk. Really talk. Then you decide what you want your new life to look like."</text:p>
      <text:p text:style-name="P54"/>
      <text:p text:style-name="P54">Al's expression changed at the phrase.</text:p>
      <text:p text:style-name="P54"/>
      <text:p text:style-name="P54">New life.</text:p>
      <text:p text:style-name="P54"/>
      <text:p text:style-name="P54">Not improved life.</text:p>
      <text:p text:style-name="P54"/>
      <text:p text:style-name="P54">Not fixed life.</text:p>
      <text:p text:style-name="P54"/>
      <text:p text:style-name="P54">New life.</text:p>
      <text:p text:style-name="P54"/>
      <text:p text:style-name="P54">"That's a hell of a thing to say to somebody."</text:p>
      <text:p text:style-name="P54"/>
      <text:p text:style-name="P54">"I know."</text:p>
      <text:p text:style-name="P54"/>
      <text:p text:style-name="P54">"You bring me through a hole in the universe, introduce me to a floating alien, fix my hand, and then tell me to be careful."</text:p>
      <text:p text:style-name="P54"/>
      <text:p text:style-name="P54">"Pretty much."</text:p>
      <text:p text:style-name="P54"/>
      <text:p text:style-name="P54">Al shook his head.</text:p>
      <text:p text:style-name="P54"/>
      <text:p text:style-name="P54">"Your sales technique needs work."</text:p>
      <text:p text:style-name="P54"/>
      <text:p text:style-name="P54">Opi brightened.</text:p>
      <text:p text:style-name="P54"/>
      <text:p text:style-name="P54">"I told him that."</text:p>
      <text:p text:style-name="P54"/>
      <text:p text:style-name="P54">"Thank you, alien bowling ball."</text:p>
      <text:p text:style-name="P54"/>
      <text:p text:style-name="P54">"You are welcome."</text:p>
      <text:p text:style-name="P54"/>
      <text:p text:style-name="P54">For a long moment the three of them stood in the meadow.</text:p>
      <text:p text:style-name="P54"/>
      <text:p text:style-name="P54">The impossible hand.</text:p>
      <text:p text:style-name="P54"/>
      <text:p text:style-name="P54"><text:soft-page-break/>The impossible offer.</text:p>
      <text:p text:style-name="P54"/>
      <text:p text:style-name="P54">The impossible cost.</text:p>
      <text:p text:style-name="P54"/>
      <text:p text:style-name="P54">Then Big Al looked at Elias.</text:p>
      <text:p text:style-name="P54"/>
      <text:p text:style-name="P54">Really looked at him.</text:p>
      <text:p text:style-name="P54"/>
      <text:p text:style-name="P54">And for the first time that day, his voice shook.</text:p>
      <text:p text:style-name="P54"/>
      <text:p text:style-name="P54">"If I say yes?"</text:p>
      <text:p text:style-name="P54"/>
      <text:p text:style-name="P54">Elias took a breath.</text:p>
      <text:p text:style-name="P54"/>
      <text:p text:style-name="P54">"Then we start figuring out how to give you a life big enough for the new you."</text:p>
      <text:p text:style-name="P54"/>
      <text:p text:style-name="P54">Al looked toward the mountains.</text:p>
      <text:p text:style-name="P54"/>
      <text:p text:style-name="P54">Then down at his hand.</text:p>
      <text:p text:style-name="P54"/>
      <text:p text:style-name="P54">Then at the place where the portal had been.</text:p>
      <text:p text:style-name="P54"/>
      <text:p text:style-name="P54">He had woken that morning expecting a normal day.</text:p>
      <text:p text:style-name="P54"/>
      <text:p text:style-name="P54">Now his entire life had split into before and after.</text:p>
      <text:p text:style-name="P54"/>
      <text:p text:style-name="P54">And the strangest part was not the alien.</text:p>
      <text:p text:style-name="P54"/>
      <text:p text:style-name="P54">Or the teleportation.</text:p>
      <text:p text:style-name="P54"/>
      <text:p text:style-name="P54">Or even the hand.</text:p>
      <text:p text:style-name="P54"/>
      <text:p text:style-name="P54">The strangest part was that for the first time in forty-seven years, Alden Mercer had to imagine a future without limits.</text:p>
      <text:p text:style-name="P54"/>
      <text:p text:style-name="P54">He was not sure he knew how.</text:p>
      <text:p text:style-name="P54"/>
      <text:p text:style-name="P61"><text:span text:style-name="T3">=================</text:span><text:line-break/><text:line-break/><text:span text:style-name="T3">Before they took Big Al back to his wife, Elias explained reluctantly that it probably would be a good idea to put his hand back in the orginal condition. <text:s/>Otherwise he wasn't going to be sleeping tonight when his wife saw the alteration.</text:span><text:line-break/><text:line-break/><text:span text:style-name="T3">After they bundled Big Al back to southern California with his original hand, before they left Elias simply said Good Luck Cuz. <text:s/>Call me if you need any advice or help. <text:s/>I'll wait to hear from you about what the next step should be.</text:span></text:p>
      <text:p text:style-name="P54"/>
      <text:p text:style-name="P54">===========</text:p>
      <text:p text:style-name="P54"/>
      <text:p text:style-name="P54"/>
      <text:p text:style-name="P54">The text arrived at 7:14 the following morning.</text:p>
      <text:p text:style-name="P54"/>
      <text:p text:style-name="P54">Elias was halfway through his first coffee.</text:p>
      <text:p text:style-name="P54"/>
      <text:p text:style-name="P54">Big Al:</text:p>
      <text:p text:style-name="P54">Okay. Let's do this.</text:p>
      <text:p text:style-name="P54"/>
      <text:p text:style-name="P54">Elias stared at the message.</text:p>
      <text:p text:style-name="P54"/>
      <text:p text:style-name="P54">Then laughed.</text:p>
      <text:p text:style-name="P54"/>
      <text:p text:style-name="P54"><text:soft-page-break/>Opi looked up from whatever impossible calculation occupied her attention.</text:p>
      <text:p text:style-name="P54"/>
      <text:p text:style-name="P54">"What?"</text:p>
      <text:p text:style-name="P54"/>
      <text:p text:style-name="P54">"He lasted less than twenty-four hours."</text:p>
      <text:p text:style-name="P54"/>
      <text:p text:style-name="P54">"That is longer than I expected."</text:p>
      <text:p text:style-name="P54"/>
      <text:p text:style-name="P54">A moment later another message arrived.</text:p>
      <text:p text:style-name="P54"/>
      <text:p text:style-name="P54">Big Al:</text:p>
      <text:p text:style-name="P61"><text:span text:style-name="T3">Sandy says if I don't do it she's going to kill me herself.</text:span><text:line-break/><text:span text:style-name="T3">But she needs to see real proof that she isnt married to a lunatic first.</text:span></text:p>
      <text:p text:style-name="P54"/>
      <text:p text:style-name="P54">Opi brightened.</text:p>
      <text:p text:style-name="P54"/>
      <text:p text:style-name="P54">"A supportive spouse."</text:p>
      <text:p text:style-name="P54"/>
      <text:p text:style-name="P54">---</text:p>
      <text:p text:style-name="P54"/>
      <text:p text:style-name="P54">By late afternoon they were back in Southern California.</text:p>
      <text:p text:style-name="P54"/>
      <text:p text:style-name="P54">This time nobody bothered with surprises.</text:p>
      <text:p text:style-name="P54"/>
      <text:p text:style-name="P54">The portal opened in Big Al's living room.</text:p>
      <text:p text:style-name="P54"/>
      <text:p text:style-name="P54">Sandy stared at it.</text:p>
      <text:p text:style-name="P54"/>
      <text:p text:style-name="P54">Then at Opi.</text:p>
      <text:p text:style-name="P54"/>
      <text:p text:style-name="P54">Then at Elias.</text:p>
      <text:p text:style-name="P54"/>
      <text:p text:style-name="P54">Then back at the portal.</text:p>
      <text:p text:style-name="P54"/>
      <text:p text:style-name="P54">Unlike her husband, she immediately skipped several stages of disbelief.</text:p>
      <text:p text:style-name="P54"/>
      <text:p text:style-name="P54">"Alien?"</text:p>
      <text:p text:style-name="P54"/>
      <text:p text:style-name="P54">"Yes," Elias said.</text:p>
      <text:p text:style-name="P54"/>
      <text:p text:style-name="P54">"Actual alien?"</text:p>
      <text:p text:style-name="P54"/>
      <text:p text:style-name="P54">"Yes."</text:p>
      <text:p text:style-name="P54"/>
      <text:p text:style-name="P54">"Good."</text:p>
      <text:p text:style-name="P54"/>
      <text:p text:style-name="P54">Elias blinked.</text:p>
      <text:p text:style-name="P54"/>
      <text:p text:style-name="P54">"Good?"</text:p>
      <text:p text:style-name="P54"/>
      <text:p text:style-name="P54">"That saves time."</text:p>
      <text:p text:style-name="P54"/>
      <text:p text:style-name="P54">Opi brightened.</text:p>
      <text:p text:style-name="P54"/>
      <text:p text:style-name="P54">"I like her."</text:p>
      <text:p text:style-name="P54"/>
      <text:p text:style-name="P54">"So does everybody," Big Al said.</text:p>
      <text:p text:style-name="P54"/>
      <text:p text:style-name="P54">---</text:p>
      <text:p text:style-name="P54"/>
      <text:p text:style-name="P54">The demonstration proceeded almost exactly as it had in Stevens County.</text:p>
      <text:p text:style-name="P54"><text:soft-page-break/></text:p>
      <text:p text:style-name="P54">Sandy watched.</text:p>
      <text:p text:style-name="P54"/>
      <text:p text:style-name="P54">Questioned.</text:p>
      <text:p text:style-name="P54"/>
      <text:p text:style-name="P54">Doubted.</text:p>
      <text:p text:style-name="P54"/>
      <text:p text:style-name="P54">Demanded evidence.</text:p>
      <text:p text:style-name="P54"/>
      <text:p text:style-name="P54">Then demanded more evidence.</text:p>
      <text:p text:style-name="P54"/>
      <text:p text:style-name="P54">Then attempted to explain what she was seeing.</text:p>
      <text:p text:style-name="P54"/>
      <text:p text:style-name="P54">Then abandoned the effort.</text:p>
      <text:p text:style-name="P54"/>
      <text:p text:style-name="P54">Eventually Opi repaired an old shoulder injury Sandy had lived with for nearly fifteen years.</text:p>
      <text:p text:style-name="P54"/>
      <text:p text:style-name="P54">The pain vanished instantly.</text:p>
      <text:p text:style-name="P54"/>
      <text:p text:style-name="P54">Sandy rotated her arm.</text:p>
      <text:p text:style-name="P54"/>
      <text:p text:style-name="P54">Then rotated it again.</text:p>
      <text:p text:style-name="P54"/>
      <text:p text:style-name="P54">Then again.</text:p>
      <text:p text:style-name="P54"/>
      <text:p text:style-name="P54">For nearly a minute she said nothing.</text:p>
      <text:p text:style-name="P54"/>
      <text:p text:style-name="P54">Finally:</text:p>
      <text:p text:style-name="P54"/>
      <text:p text:style-name="P54">"Oh."</text:p>
      <text:p text:style-name="P54"/>
      <text:p text:style-name="P54">Elias smiled.</text:p>
      <text:p text:style-name="P54"/>
      <text:p text:style-name="P54">"Yeah."</text:p>
      <text:p text:style-name="P54"/>
      <text:p text:style-name="P54">"Oh."</text:p>
      <text:p text:style-name="P54"/>
      <text:p text:style-name="P54">"That was my reaction too."</text:p>
      <text:p text:style-name="P54"/>
      <text:p text:style-name="P54">"No."</text:p>
      <text:p text:style-name="P54"/>
      <text:p text:style-name="P54">She continued moving the shoulder.</text:p>
      <text:p text:style-name="P54"/>
      <text:p text:style-name="P54">"You don't understand."</text:p>
      <text:p text:style-name="P54"/>
      <text:p text:style-name="P54">"Probably not."</text:p>
      <text:p text:style-name="P54"/>
      <text:p text:style-name="P54">"The pain is gone."</text:p>
      <text:p text:style-name="P54"/>
      <text:p text:style-name="P54">The room became quiet.</text:p>
      <text:p text:style-name="P54"/>
      <text:p text:style-name="P54">Because everybody understood exactly what she meant.</text:p>
      <text:p text:style-name="P54"/>
      <text:p text:style-name="P54">---</text:p>
      <text:p text:style-name="P54"/>
      <text:p text:style-name="P54">An hour later the excitement finally subsided.</text:p>
      <text:p text:style-name="P54"/>
      <text:p text:style-name="P54">Big Al sat silently in his wheelchair.</text:p>
      <text:p text:style-name="P54"/>
      <text:p text:style-name="P54">Sandy sat beside him.</text:p>
      <text:p text:style-name="P54"/>
      <text:p text:style-name="P54"><text:soft-page-break/>Their hands intertwined.</text:p>
      <text:p text:style-name="P54"/>
      <text:p text:style-name="P54">Neither spoke.</text:p>
      <text:p text:style-name="P54"/>
      <text:p text:style-name="P54">Neither quite knew what to say.</text:p>
      <text:p text:style-name="P54"/>
      <text:p text:style-name="P54">The future had arrived.</text:p>
      <text:p text:style-name="P54"/>
      <text:p text:style-name="P54">It was sitting in their living room.</text:p>
      <text:p text:style-name="P54"/>
      <text:p text:style-name="P54">Floating, technically.</text:p>
      <text:p text:style-name="P54"/>
      <text:p text:style-name="P54">But still.</text:p>
      <text:p text:style-name="P54"/>
      <text:p text:style-name="P54">---</text:p>
      <text:p text:style-name="P54"/>
      <text:p text:style-name="P54">Elias eventually stood.</text:p>
      <text:p text:style-name="P54"/>
      <text:p text:style-name="P54">"We should go."</text:p>
      <text:p text:style-name="P54"/>
      <text:p text:style-name="P54">Neither Al nor Sandy reacted.</text:p>
      <text:p text:style-name="P54"/>
      <text:p text:style-name="P54">Both remained deep in thought.</text:p>
      <text:p text:style-name="P54"/>
      <text:p text:style-name="P54">Opi floated slightly forward.</text:p>
      <text:p text:style-name="P54"/>
      <text:p text:style-name="P54">"There are practical matters."</text:p>
      <text:p text:style-name="P54"/>
      <text:p text:style-name="P54">That got their attention.</text:p>
      <text:p text:style-name="P54"/>
      <text:p text:style-name="P54">"Such as?" Sandy asked.</text:p>
      <text:p text:style-name="P54"/>
      <text:p text:style-name="P54">Opi's light shifted.</text:p>
      <text:p text:style-name="P54"/>
      <text:p text:style-name="P54">"Documentation."</text:p>
      <text:p text:style-name="P54"/>
      <text:p text:style-name="P54">"Identity."</text:p>
      <text:p text:style-name="P54"/>
      <text:p text:style-name="P54">"Financial assets."</text:p>
      <text:p text:style-name="P54"/>
      <text:p text:style-name="P54">"Employment."</text:p>
      <text:p text:style-name="P54"/>
      <text:p text:style-name="P54">"Housing."</text:p>
      <text:p text:style-name="P54"/>
      <text:p text:style-name="P54">Big Al frowned.</text:p>
      <text:p text:style-name="P54"/>
      <text:p text:style-name="P54">"You can fix those?"</text:p>
      <text:p text:style-name="P54"/>
      <text:p text:style-name="P54">"Yes."</text:p>
      <text:p text:style-name="P54"/>
      <text:p text:style-name="P54">The answer came immediately.</text:p>
      <text:p text:style-name="P54"/>
      <text:p text:style-name="P54">Sandy looked skeptical.</text:p>
      <text:p text:style-name="P54"/>
      <text:p text:style-name="P54">"All of them?"</text:p>
      <text:p text:style-name="P54"/>
      <text:p text:style-name="P54">"Yes."</text:p>
      <text:p text:style-name="P54"/>
      <text:p text:style-name="P54">"How?"</text:p>
      <text:p text:style-name="P54"/>
      <text:p text:style-name="P54">Opi paused.</text:p>
      <text:p text:style-name="P54"><text:soft-page-break/></text:p>
      <text:p text:style-name="P54">"The detailed explanation would require several days."</text:p>
      <text:p text:style-name="P54"/>
      <text:p text:style-name="P54">"Pass."</text:p>
      <text:p text:style-name="P54"/>
      <text:p text:style-name="P54">"A wise decision."</text:p>
      <text:p text:style-name="P54"/>
      <text:p text:style-name="P54">---</text:p>
      <text:p text:style-name="P54"/>
      <text:p text:style-name="P54">Big Al looked down at his chair.</text:p>
      <text:p text:style-name="P54"/>
      <text:p text:style-name="P54">Then back at Opi.</text:p>
      <text:p text:style-name="P54"/>
      <text:p text:style-name="P54">"What about records?"</text:p>
      <text:p text:style-name="P54"/>
      <text:p text:style-name="P54">"Medical records can be modified."</text:p>
      <text:p text:style-name="P54"/>
      <text:p text:style-name="P54">"Government records can be modified."</text:p>
      <text:p text:style-name="P54"/>
      <text:p text:style-name="P54">"Employment records can be modified."</text:p>
      <text:p text:style-name="P54"/>
      <text:p text:style-name="P54">The orb tilted slightly.</text:p>
      <text:p text:style-name="P54"/>
      <text:p text:style-name="P54">"History is surprisingly editable."</text:p>
      <text:p text:style-name="P54"/>
      <text:p text:style-name="P54">Elias snorted.</text:p>
      <text:p text:style-name="P54"/>
      <text:p text:style-name="P54">"That sentence should concern everyone."</text:p>
      <text:p text:style-name="P54"/>
      <text:p text:style-name="P54"/>
      <text:p text:style-name="P54">---</text:p>
      <text:p text:style-name="P54"/>
      <text:p text:style-name="P54">For a few moments nobody spoke.</text:p>
      <text:p text:style-name="P54"/>
      <text:p text:style-name="P54">Then Opi continued.</text:p>
      <text:p text:style-name="P54"/>
      <text:p text:style-name="P54">"There is one complication."</text:p>
      <text:p text:style-name="P54"/>
      <text:p text:style-name="P54">The room became still.</text:p>
      <text:p text:style-name="P54"/>
      <text:p text:style-name="P54">Sandy immediately noticed the wording.</text:p>
      <text:p text:style-name="P54"/>
      <text:p text:style-name="P54">"One?"</text:p>
      <text:p text:style-name="P54"/>
      <text:p text:style-name="P54">"One major complication."</text:p>
      <text:p text:style-name="P54"/>
      <text:p text:style-name="P54">"Okay."</text:p>
      <text:p text:style-name="P54"/>
      <text:p text:style-name="P54">Opi's light softened.</text:p>
      <text:p text:style-name="P54"/>
      <text:p text:style-name="P54">"Your family."</text:p>
      <text:p text:style-name="P54"/>
      <text:p text:style-name="P54">The silence was immediate.</text:p>
      <text:p text:style-name="P54"/>
      <text:p text:style-name="P54">Big Al looked at Sandy.</text:p>
      <text:p text:style-name="P54"/>
      <text:p text:style-name="P54">Sandy looked at Big Al.</text:p>
      <text:p text:style-name="P54"/>
      <text:p text:style-name="P54">Nobody liked where this was going.</text:p>
      <text:p text:style-name="P54"/>
      <text:p text:style-name="P54">---</text:p>
      <text:p text:style-name="P54"><text:soft-page-break/></text:p>
      <text:p text:style-name="P54">Opi continued gently.</text:p>
      <text:p text:style-name="P54"/>
      <text:p text:style-name="P54">"People who know Alden Mercer will immediately recognize that something impossible has occurred."</text:p>
      <text:p text:style-name="P54"/>
      <text:p text:style-name="P54">"No kidding," Big Al said.</text:p>
      <text:p text:style-name="P54"/>
      <text:p text:style-name="P54">The orb ignored him.</text:p>
      <text:p text:style-name="P54"/>
      <text:p text:style-name="P54">"Sandy's family cannot see the restored version of Alden."</text:p>
      <text:p text:style-name="P54"/>
      <text:p text:style-name="P54">The words landed heavily.</text:p>
      <text:p text:style-name="P54"/>
      <text:p text:style-name="P54">Sandy looked away first.</text:p>
      <text:p text:style-name="P54"/>
      <text:p text:style-name="P54">Because she knew Opi was right.</text:p>
      <text:p text:style-name="P54"/>
      <text:p text:style-name="P54">"They'd figure it out."</text:p>
      <text:p text:style-name="P54"/>
      <text:p text:style-name="P54">"Yes."</text:p>
      <text:p text:style-name="P54"/>
      <text:p text:style-name="P54">"They'd tell people."</text:p>
      <text:p text:style-name="P54"/>
      <text:p text:style-name="P54">"Yes."</text:p>
      <text:p text:style-name="P54"/>
      <text:p text:style-name="P54">"They wouldn't mean any harm."</text:p>
      <text:p text:style-name="P54"/>
      <text:p text:style-name="P54">"I know."</text:p>
      <text:p text:style-name="P54"/>
      <text:p text:style-name="P54">The room became quiet again.</text:p>
      <text:p text:style-name="P54"/>
      <text:p text:style-name="P54">Sometimes the truth was unpleasant.</text:p>
      <text:p text:style-name="P54"/>
      <text:p text:style-name="P54">Even when spoken kindly.</text:p>
      <text:p text:style-name="P54"/>
      <text:p text:style-name="P54">---</text:p>
      <text:p text:style-name="P54"/>
      <text:p text:style-name="P54">Elias finally stepped in.</text:p>
      <text:p text:style-name="P54"/>
      <text:p text:style-name="P54">"Look."</text:p>
      <text:p text:style-name="P54"/>
      <text:p text:style-name="P54">Everyone turned toward him.</text:p>
      <text:p text:style-name="P54"/>
      <text:p text:style-name="P54">"I've been thinking about this."</text:p>
      <text:p text:style-name="P54"/>
      <text:p text:style-name="P54">Opi brightened.</text:p>
      <text:p text:style-name="P54"/>
      <text:p text:style-name="P54">"Come to Stevens County."</text:p>
      <text:p text:style-name="P54"/>
      <text:p text:style-name="P54">Big Al blinked.</text:p>
      <text:p text:style-name="P54"/>
      <text:p text:style-name="P54">"What?"</text:p>
      <text:p text:style-name="P54"/>
      <text:p text:style-name="P54">"Come stay with me."</text:p>
      <text:p text:style-name="P54"/>
      <text:p text:style-name="P54">Sandy looked surprised.</text:p>
      <text:p text:style-name="P54"/>
      <text:p text:style-name="P54">"For how long?"</text:p>
      <text:p text:style-name="P54"/>
      <text:p text:style-name="P54">"A while."</text:p>
      <text:p text:style-name="P54"/>
      <text:p text:style-name="P54"><text:soft-page-break/>The answer was honest.</text:p>
      <text:p text:style-name="P54"/>
      <text:p text:style-name="P54">Not precise.</text:p>
      <text:p text:style-name="P54"/>
      <text:p text:style-name="P54">Honest.</text:p>
      <text:p text:style-name="P54"/>
      <text:p text:style-name="P54">"Long enough to figure things out."</text:p>
      <text:p text:style-name="P54"/>
      <text:p text:style-name="P61"><text:span text:style-name="T3">Elias turned to Opi and said </text:span><text:line-break/><text:span text:style-name="T3">"I am guessing even if your create a new version there is going to be some learning and exercsise involved ?</text:span></text:p>
      <text:p text:style-name="P54">I cant imagine a guy who has never walked before is going to be able to come running with me next week.</text:p>
      <text:p text:style-name="P54"/>
      <text:p text:style-name="P54">Opi : YOU are correct.</text:p>
      <text:p text:style-name="P54"/>
      <text:p text:style-name="P54">Sandy : <text:s/>So that means I have to teach another baby how to walk ?</text:p>
      <text:p text:style-name="P54"/>
      <text:p text:style-name="P54">Big Al snorted at that.</text:p>
      <text:p text:style-name="P54"/>
      <text:p text:style-name="P54">---</text:p>
      <text:p text:style-name="P54"/>
      <text:p text:style-name="P54">Elias pointed at the couple.</text:p>
      <text:p text:style-name="P54"/>
      <text:p text:style-name="P54">"You don't have to decide everything today."</text:p>
      <text:p text:style-name="P54"/>
      <text:p text:style-name="P54">"Or tomorrow."</text:p>
      <text:p text:style-name="P54"/>
      <text:p text:style-name="P54">"Or next week."</text:p>
      <text:p text:style-name="P54"/>
      <text:p text:style-name="P54">The humor disappeared.</text:p>
      <text:p text:style-name="P54"/>
      <text:p text:style-name="P54">"What you are being offered is bigger than a medical procedure."</text:p>
      <text:p text:style-name="P54"/>
      <text:p text:style-name="P54">Nobody argued.</text:p>
      <text:p text:style-name="P54"/>
      <text:p text:style-name="P54">Because nobody could.</text:p>
      <text:p text:style-name="P54"/>
      <text:p text:style-name="P54">"It changes everything."</text:p>
      <text:p text:style-name="P54"/>
      <text:p text:style-name="P54">He pointed at Al's wheelchair.</text:p>
      <text:p text:style-name="P54"/>
      <text:p text:style-name="P54">"The chair."</text:p>
      <text:p text:style-name="P54"/>
      <text:p text:style-name="P54">"The pain."</text:p>
      <text:p text:style-name="P54"/>
      <text:p text:style-name="P54">"The job."</text:p>
      <text:p text:style-name="P54"/>
      <text:p text:style-name="P54">"The future."</text:p>
      <text:p text:style-name="P54"/>
      <text:p text:style-name="P54">Then toward Sandy.</text:p>
      <text:p text:style-name="P54"/>
      <text:p text:style-name="P54">"The marriage."</text:p>
      <text:p text:style-name="P54"/>
      <text:p text:style-name="P54">"The family."</text:p>
      <text:p text:style-name="P54"/>
      <text:p text:style-name="P54">"The plans."</text:p>
      <text:p text:style-name="P54"/>
      <text:p text:style-name="P54">"Everything."</text:p>
      <text:p text:style-name="P54"/>
      <text:p text:style-name="P54">---</text:p>
      <text:p text:style-name="P54"><text:soft-page-break/></text:p>
      <text:p text:style-name="P54">For a long moment nobody spoke.</text:p>
      <text:p text:style-name="P54"/>
      <text:p text:style-name="P54">Finally Sandy squeezed her husband's hand.</text:p>
      <text:p text:style-name="P54"/>
      <text:p text:style-name="P54">"What do you want?"</text:p>
      <text:p text:style-name="P54"/>
      <text:p text:style-name="P54">The question wasn't directed at Elias.</text:p>
      <text:p text:style-name="P54"/>
      <text:p text:style-name="P54">Or Opi.</text:p>
      <text:p text:style-name="P54"/>
      <text:p text:style-name="P54">Only Big Al.</text:p>
      <text:p text:style-name="P54"/>
      <text:p text:style-name="P54">His answer came surprisingly quickly.</text:p>
      <text:p text:style-name="P54"/>
      <text:p text:style-name="P54">"I want a chance."</text:p>
      <text:p text:style-name="P54"/>
      <text:p text:style-name="P54">Sandy nodded slowly.</text:p>
      <text:p text:style-name="P54"/>
      <text:p text:style-name="P54">"So do I."</text:p>
      <text:p text:style-name="P54"/>
      <text:p text:style-name="P54">The room fell silent once more.</text:p>
      <text:p text:style-name="P54"/>
      <text:p text:style-name="P54">Not uncomfortable.</text:p>
      <text:p text:style-name="P54"/>
      <text:p text:style-name="P54">Not fearful.</text:p>
      <text:p text:style-name="P54"/>
      <text:p text:style-name="P54">Just thoughtful.</text:p>
      <text:p text:style-name="P54"/>
      <text:p text:style-name="P54">The kind of silence that appeared when an old life was ending and a new one had not quite begun.</text:p>
      <text:p text:style-name="P54"/>
      <text:p text:style-name="P54">Elias glanced at Opi.</text:p>
      <text:p text:style-name="P54"/>
      <text:p text:style-name="P54">The orb's light glowed softly.</text:p>
      <text:p text:style-name="P54"/>
      <text:p text:style-name="P54">Satisfied.</text:p>
      <text:p text:style-name="P54"/>
      <text:p text:style-name="P54">Hopeful.</text:p>
      <text:p text:style-name="P54"/>
      <text:p text:style-name="P54">Very Velhari.</text:p>
      <text:p text:style-name="P54"/>
      <text:p text:style-name="P54">For once neither of them spoke.</text:p>
      <text:p text:style-name="P54"/>
      <text:p text:style-name="P54">There was nothing left to say.</text:p>
      <text:p text:style-name="P54"/>
      <text:p text:style-name="P54">The decision belonged to Al and Sandy now.</text:p>
      <text:p text:style-name="P54"/>
      <text:p text:style-name="P54">And that was exactly how it should be.</text:p>
      <text:p text:style-name="P54"/>
      <text:p text:style-name="P66"/>
      <text:p text:style-name="P23"/>
      <text:p text:style-name="P56"/>
      <text:p text:style-name="P41"><text:span text:style-name="T71">Chapter 31 <text:s/></text:span>Alden &amp; Sandy Mercer</text:p>
      <text:p text:style-name="P56"/>
      <text:p text:style-name="P54"/>
      <text:p text:style-name="P54">The actual process of creating the new Alden Mercer proved disappointingly anti-climactic.</text:p>
      <text:p text:style-name="P54"/>
      <text:p text:style-name="P54">Once the date had been chosen, they packed up everything they wanted to keep.</text:p>
      <text:p text:style-name="P54"/>
      <text:p text:style-name="P54">Furniture.</text:p>
      <text:p text:style-name="P54"/>
      <text:p text:style-name="P54"><text:soft-page-break/>Clothes.</text:p>
      <text:p text:style-name="P54"/>
      <text:p text:style-name="P54">Photographs.</text:p>
      <text:p text:style-name="P54"/>
      <text:p text:style-name="P54">Kitchen supplies.</text:p>
      <text:p text:style-name="P54"/>
      <text:p text:style-name="P54">Books.</text:p>
      <text:p text:style-name="P54"/>
      <text:p text:style-name="P54">Tools.</text:p>
      <text:p text:style-name="P54"/>
      <text:p text:style-name="P54">Memories.</text:p>
      <text:p text:style-name="P54"/>
      <text:p text:style-name="P54">An entire life reduced to a collection of objects piled into a Southern California living room.</text:p>
      <text:p text:style-name="P54"/>
      <text:p text:style-name="P54">Then Opi simply moved all of it.</text:p>
      <text:p text:style-name="P54"/>
      <text:p text:style-name="P54">People included.</text:p>
      <text:p text:style-name="P54"/>
      <text:p text:style-name="P54">One moment they were south of LAX.</text:p>
      <text:p text:style-name="P54"/>
      <text:p text:style-name="P54">The next they were standing in Stevens County.</text:p>
      <text:p text:style-name="P54"/>
      <text:p text:style-name="P54">---</text:p>
      <text:p text:style-name="P54"/>
      <text:p text:style-name="P54">The cabin sat near the edge of one of the meadows on Elias's property.</text:p>
      <text:p text:style-name="P54"/>
      <text:p text:style-name="P54">Small.</text:p>
      <text:p text:style-name="P54"/>
      <text:p text:style-name="P54">Comfortable.</text:p>
      <text:p text:style-name="P54"/>
      <text:p text:style-name="P54">Private.</text:p>
      <text:p text:style-name="P54"/>
      <text:p text:style-name="P54">Built almost entirely to Sandy's specifications.</text:p>
      <text:p text:style-name="P54"/>
      <text:p text:style-name="P54">Opi had politely ignored several suggestions from Elias.</text:p>
      <text:p text:style-name="P54"/>
      <text:p text:style-name="P54">"This wall should go here."</text:p>
      <text:p text:style-name="P54"/>
      <text:p text:style-name="P54">"No."</text:p>
      <text:p text:style-name="P54"/>
      <text:p text:style-name="P54">"Why?"</text:p>
      <text:p text:style-name="P54"/>
      <text:p text:style-name="P54">"Because Sandy is correct."</text:p>
      <text:p text:style-name="P54"/>
      <text:p text:style-name="P54">"I haven't even finished."</text:p>
      <text:p text:style-name="P54"/>
      <text:p text:style-name="P54">"You were going to suggest something stupid."</text:p>
      <text:p text:style-name="P54"/>
      <text:p text:style-name="P54">Elias had eventually given up.</text:p>
      <text:p text:style-name="P54"/>
      <text:p text:style-name="P54">The result was considerably nicer than anything he would have designed.</text:p>
      <text:p text:style-name="P54"/>
      <text:p text:style-name="P54">He suspected Opi enjoyed that.</text:p>
      <text:p text:style-name="P54"/>
      <text:p text:style-name="P54">---</text:p>
      <text:p text:style-name="P54"/>
      <text:p text:style-name="P54">Almost as soon as they finished settling in, Alden turned toward them.</text:p>
      <text:p text:style-name="P54"/>
      <text:p text:style-name="P54">"Can we do this right now?"</text:p>
      <text:p text:style-name="P54"/>
      <text:p text:style-name="P54">There was no hesitation in his voice.</text:p>
      <text:p text:style-name="P54"><text:soft-page-break/></text:p>
      <text:p text:style-name="P54">No fear.</text:p>
      <text:p text:style-name="P54"/>
      <text:p text:style-name="P54">No uncertainty.</text:p>
      <text:p text:style-name="P54"/>
      <text:p text:style-name="P54">Just eagerness.</text:p>
      <text:p text:style-name="P54"/>
      <text:p text:style-name="P54">The kind of eagerness usually associated with children on Christmas morning.</text:p>
      <text:p text:style-name="P54"/>
      <text:p text:style-name="P54">Elias looked at Opi.</text:p>
      <text:p text:style-name="P54"/>
      <text:p text:style-name="P54">Opi looked at Elias.</text:p>
      <text:p text:style-name="P54"/>
      <text:p text:style-name="P54">Then both looked at Sandy.</text:p>
      <text:p text:style-name="P54"/>
      <text:p text:style-name="P54">She smiled.</text:p>
      <text:p text:style-name="P54"/>
      <text:p text:style-name="P54">"We're ready."</text:p>
      <text:p text:style-name="P54"/>
      <text:p text:style-name="P54">---</text:p>
      <text:p text:style-name="P54"/>
      <text:p text:style-name="P54">Alden sat in the center of the living room.</text:p>
      <text:p text:style-name="P54"/>
      <text:p text:style-name="P54">His wheelchair beneath him.</text:p>
      <text:p text:style-name="P54"/>
      <text:p text:style-name="P54">The chair that had carried him through almost his entire life.</text:p>
      <text:p text:style-name="P54"/>
      <text:p text:style-name="P54">The chair he would never need again.</text:p>
      <text:p text:style-name="P54"/>
      <text:p text:style-name="P54">For a few moments nobody spoke.</text:p>
      <text:p text:style-name="P54"/>
      <text:p text:style-name="P54">Then Alden looked up at Opi.</text:p>
      <text:p text:style-name="P54"/>
      <text:p text:style-name="P54">"One question."</text:p>
      <text:p text:style-name="P54"/>
      <text:p text:style-name="P54">"Yes?"</text:p>
      <text:p text:style-name="P54"/>
      <text:p text:style-name="P54">"What am I going to look like?"</text:p>
      <text:p text:style-name="P54"/>
      <text:p text:style-name="P54">The orb brightened.</text:p>
      <text:p text:style-name="P54"/>
      <text:p text:style-name="P54">"A reasonable question."</text:p>
      <text:p text:style-name="P54"/>
      <text:p text:style-name="P54">"Thank you."</text:p>
      <text:p text:style-name="P54"/>
      <text:p text:style-name="P54">Opi became silent for several seconds.</text:p>
      <text:p text:style-name="P54"/>
      <text:p text:style-name="P54">Processing.</text:p>
      <text:p text:style-name="P54"/>
      <text:p text:style-name="P54">Comparing.</text:p>
      <text:p text:style-name="P54"/>
      <text:p text:style-name="P54">Modeling.</text:p>
      <text:p text:style-name="P54"/>
      <text:p text:style-name="P54">Finally she answered.</text:p>
      <text:p text:style-name="P54"/>
      <text:p text:style-name="P54">"Based upon the available genetic information from your father, I estimate approximately six feet tall."</text:p>
      <text:p text:style-name="P54"/>
      <text:p text:style-name="P54">Alden laughed.</text:p>
      <text:p text:style-name="P54"/>
      <text:p text:style-name="P54">"Six feet?"</text:p>
      <text:p text:style-name="P54"/>
      <text:p text:style-name="P54"><text:soft-page-break/>"Approximately."</text:p>
      <text:p text:style-name="P54"/>
      <text:p text:style-name="P54">"You're kidding."</text:p>
      <text:p text:style-name="P54"/>
      <text:p text:style-name="P54">"I do not generally joke about anthropometric projections."</text:p>
      <text:p text:style-name="P54"/>
      <text:p text:style-name="P54">Elias sighed.</text:p>
      <text:p text:style-name="P54"/>
      <text:p text:style-name="P54">"Translation?"</text:p>
      <text:p text:style-name="P54"/>
      <text:p text:style-name="P54">"About six feet."</text:p>
      <text:p text:style-name="P54"/>
      <text:p text:style-name="P54">"Thank you."</text:p>
      <text:p text:style-name="P54"/>
      <text:p text:style-name="P54">---</text:p>
      <text:p text:style-name="P54"/>
      <text:p text:style-name="P54">For a moment Alden became quiet.</text:p>
      <text:p text:style-name="P54"/>
      <text:p text:style-name="P54">Thinking.</text:p>
      <text:p text:style-name="P54"/>
      <text:p text:style-name="P54">Remembering.</text:p>
      <text:p text:style-name="P54"/>
      <text:p text:style-name="P54">His father had been a tall man for a Mercer.</text:p>
      <text:p text:style-name="P54"/>
      <text:p text:style-name="P61"><text:span text:style-name="T3">Tough looking. <text:s/>With a deep voice that seemed to operate in slow motion. <text:s/></text:span><text:line-break/><text:span text:style-name="T3">It took his father twice as long to finish a sentence as a normal man.</text:span></text:p>
      <text:p text:style-name="P54"/>
      <text:p text:style-name="P61"><text:span text:style-name="T3">Alden had a very rough childhood - one of the roughest Elias had ever seen. <text:s/></text:span><text:line-break/><text:span text:style-name="T3">Father - massive PTSD from 2 tours in Viet Nam as a radio operator in an attack helicopter squadron.</text:span></text:p>
      <text:p text:style-name="P54"/>
      <text:p text:style-name="P61"><text:span text:style-name="T3">When the internet came into wide use Alden had tracked down some of the men who had served with his father wanting to know more - they told him a story about how his father had fallen for the girl who cleaned their barracks each day - a young woman named Trần Ngọc Anh. <text:s/>One day at noon she had come into the barracks with bombs strapped to her torso by the VC and the other soldiers had to kill her.</text:span><text:line-break/><text:line-break/><text:span text:style-name="T3">After that story the old veteran told Alden that there was a lot more that was even worse and he was sure that Alden's father would never want him to know about any of it.</text:span></text:p>
      <text:p text:style-name="P54"/>
      <text:p text:style-name="P54">Alden gave up trying to find out more about his dad after that.</text:p>
      <text:p text:style-name="P54"/>
      <text:p text:style-name="P54">The rest of Alden's life wasn't exactly an improvement - both Aldens father and mother had died in an automobile crash when he <text:s/>was 12 years old leaving him and 4 other siblings as orphans. <text:s/>Elias was then just 22 years old, a poor broke college student, with no job no house and no car, yet he seriously considered taking them all in, very religious foster family had stepped up and taken them all in. It all worked out in the end (mostly).</text:p>
      <text:p text:style-name="P54"/>
      <text:p text:style-name="P54">One more disaster in a life that already seemed to attract them.</text:p>
      <text:p text:style-name="P54"/>
      <text:p text:style-name="P54">Of all the people Elias Mercer had ever met in his long life, his own cousin was both the most unlucky and at the same time, the most positive person he had ever met. He was far more extraordinary than anyone Elias had ever met. And Elias was convinced that nobody on the entire planet deserved what was going to happen next more than Alden.</text:p>
      <text:p text:style-name="P54"/>
      <text:p text:style-name="P54">Alden looked around the room.</text:p>
      <text:p text:style-name="P54"/>
      <text:p text:style-name="P54">At Sandy.</text:p>
      <text:p text:style-name="P54"/>
      <text:p text:style-name="P54">At Elias.</text:p>
      <text:p text:style-name="P54"/>
      <text:p text:style-name="P54">At Opi.</text:p>
      <text:p text:style-name="P54"/>
      <text:p text:style-name="P54"><text:soft-page-break/>Then finally down at the wheelchair.</text:p>
      <text:p text:style-name="P54"/>
      <text:p text:style-name="P54">His wheelchair.</text:p>
      <text:p text:style-name="P54"/>
      <text:p text:style-name="P54">The thing he hated.</text:p>
      <text:p text:style-name="P54"/>
      <text:p text:style-name="P54">The thing he loved.</text:p>
      <text:p text:style-name="P54"/>
      <text:p text:style-name="P54">The thing that had become part of him.</text:p>
      <text:p text:style-name="P54"/>
      <text:p text:style-name="P54">The thing he was about to lose forever.</text:p>
      <text:p text:style-name="P54"/>
      <text:p text:style-name="P54">His hand rested briefly on the armrest.</text:p>
      <text:p text:style-name="P54"/>
      <text:p text:style-name="P54">Then he smiled.</text:p>
      <text:p text:style-name="P54"/>
      <text:p text:style-name="P54">"Okay."</text:p>
      <text:p text:style-name="P54"/>
      <text:p text:style-name="P54">His voice was steady.</text:p>
      <text:p text:style-name="P54"/>
      <text:p text:style-name="P54">"I'm ready."</text:p>
      <text:p text:style-name="P54"/>
      <text:p text:style-name="P54">---</text:p>
      <text:p text:style-name="P54"/>
      <text:p text:style-name="P54">Opi's light shifted.</text:p>
      <text:p text:style-name="P54"/>
      <text:p text:style-name="P54">White.</text:p>
      <text:p text:style-name="P54"/>
      <text:p text:style-name="P54">Brilliant.</text:p>
      <text:p text:style-name="P54"/>
      <text:p text:style-name="P54">For less than a second.</text:p>
      <text:p text:style-name="P54"/>
      <text:p text:style-name="P54">Less.</text:p>
      <text:p text:style-name="P54"/>
      <text:p text:style-name="P54">Far less.</text:p>
      <text:p text:style-name="P54"/>
      <text:p text:style-name="P54">Then it was over.</text:p>
      <text:p text:style-name="P54"/>
      <text:p text:style-name="P54">No pain.</text:p>
      <text:p text:style-name="P54"/>
      <text:p text:style-name="P54">No sound.</text:p>
      <text:p text:style-name="P54"/>
      <text:p text:style-name="P54">No drama.</text:p>
      <text:p text:style-name="P54"/>
      <text:p text:style-name="P54">No transformation sequence.</text:p>
      <text:p text:style-name="P54"/>
      <text:p text:style-name="P54">No cosmic energy.</text:p>
      <text:p text:style-name="P54"/>
      <text:p text:style-name="P54">One instant.</text:p>
      <text:p text:style-name="P54"/>
      <text:p text:style-name="P54">That was all.</text:p>
      <text:p text:style-name="P54"/>
      <text:p text:style-name="P54">One instant between two versions of reality.</text:p>
      <text:p text:style-name="P54"/>
      <text:p text:style-name="P54">---</text:p>
      <text:p text:style-name="P54"/>
      <text:p text:style-name="P54">The wheelchair collapsed sideways.</text:p>
      <text:p text:style-name="P54"/>
      <text:p text:style-name="P54">Empty.</text:p>
      <text:p text:style-name="P54"/>
      <text:p text:style-name="P54">Because Alden Mercer no longer fit inside it.</text:p>
      <text:p text:style-name="P54"><text:soft-page-break/></text:p>
      <text:p text:style-name="P54"/>
      <text:p text:style-name="P54">For a moment nobody moved.</text:p>
      <text:p text:style-name="P54"/>
      <text:p text:style-name="P54">Nobody spoke.</text:p>
      <text:p text:style-name="P54"/>
      <text:p text:style-name="P54">Nobody breathed.</text:p>
      <text:p text:style-name="P54"/>
      <text:p text:style-name="P54">Where Alden Mercer had been sitting now stood a man a little over six feet tall.</text:p>
      <text:p text:style-name="P54"/>
      <text:p text:style-name="P54">narrow shouldered.</text:p>
      <text:p text:style-name="P54"/>
      <text:p text:style-name="P54">Straight backed.</text:p>
      <text:p text:style-name="P54"/>
      <text:p text:style-name="P54">Two arms.</text:p>
      <text:p text:style-name="P54"/>
      <text:p text:style-name="P54">Two legs.</text:p>
      <text:p text:style-name="P54"/>
      <text:p text:style-name="P54">No titanium rods.</text:p>
      <text:p text:style-name="P54"/>
      <text:p text:style-name="P54">No twisted spine.</text:p>
      <text:p text:style-name="P54"/>
      <text:p text:style-name="P54">No wheelchair.</text:p>
      <text:p text:style-name="P54"/>
      <text:p text:style-name="P54">Nothing broken.</text:p>
      <text:p text:style-name="P54"/>
      <text:p text:style-name="P54">Nothing missing.</text:p>
      <text:p text:style-name="P54"/>
      <text:p text:style-name="P54">Nothing damaged.</text:p>
      <text:p text:style-name="P54"/>
      <text:p text:style-name="P54">The room became completely silent.</text:p>
      <text:p text:style-name="P54"/>
      <text:p text:style-name="P54">Even Opi.</text:p>
      <text:p text:style-name="P54"/>
      <text:p text:style-name="P54">Which was rare.</text:p>
      <text:p text:style-name="P54"/>
      <text:p text:style-name="P54">---</text:p>
      <text:p text:style-name="P54"/>
      <text:p text:style-name="P54">Alden looked down.</text:p>
      <text:p text:style-name="P54"/>
      <text:p text:style-name="P54">Then at his hands.</text:p>
      <text:p text:style-name="P54"/>
      <text:p text:style-name="P54">Then at his feet.</text:p>
      <text:p text:style-name="P54"/>
      <text:p text:style-name="P54">Then back at his hands.</text:p>
      <text:p text:style-name="P54"/>
      <text:p text:style-name="P54">The sequence repeated several times.</text:p>
      <text:p text:style-name="P54"/>
      <text:p text:style-name="P54">As though his brain was refusing to update.</text:p>
      <text:p text:style-name="P54"/>
      <text:p text:style-name="P54">Finally he flexed his fingers.</text:p>
      <text:p text:style-name="P54"/>
      <text:p text:style-name="P54">All ten of them.</text:p>
      <text:p text:style-name="P54"/>
      <text:p text:style-name="P54">Then laughed.</text:p>
      <text:p text:style-name="P54"/>
      <text:p text:style-name="P54">A single startled laugh.</text:p>
      <text:p text:style-name="P54"/>
      <text:p text:style-name="P54">The kind that escaped before a person could stop it.</text:p>
      <text:p text:style-name="P54"/>
      <text:p text:style-name="P54">"Oh my God."</text:p>
      <text:p text:style-name="P54"><text:soft-page-break/></text:p>
      <text:p text:style-name="P54">His voice sounded different.</text:p>
      <text:p text:style-name="P54"/>
      <text:p text:style-name="P54">Stronger.</text:p>
      <text:p text:style-name="P54"/>
      <text:p text:style-name="P54">Deeper. Almost as deep as his fathers had been - and he talked much slower too.</text:p>
      <text:p text:style-name="P54"/>
      <text:p text:style-name="P54">Everything sounded different.</text:p>
      <text:p text:style-name="P54"/>
      <text:p text:style-name="P54">---</text:p>
      <text:p text:style-name="P54"/>
      <text:p text:style-name="P54">Then he took a step.</text:p>
      <text:p text:style-name="P54"/>
      <text:p text:style-name="P54">A real step.</text:p>
      <text:p text:style-name="P54"/>
      <text:p text:style-name="P54">Not a wheelchair.</text:p>
      <text:p text:style-name="P54"/>
      <text:p text:style-name="P54">Not a transfer.</text:p>
      <text:p text:style-name="P54"/>
      <text:p text:style-name="P54">Not a carefully planned maneuver.</text:p>
      <text:p text:style-name="P54"/>
      <text:p text:style-name="P54">Just a step.</text:p>
      <text:p text:style-name="P54"/>
      <text:p text:style-name="P54">Then another.</text:p>
      <text:p text:style-name="P54"/>
      <text:p text:style-name="P54">Then another.</text:p>
      <text:p text:style-name="P54"/>
      <text:p text:style-name="P54">The movement looked awkward.</text:p>
      <text:p text:style-name="P54"/>
      <text:p text:style-name="P54">Almost ridiculous.</text:p>
      <text:p text:style-name="P54"/>
      <text:p text:style-name="P54">Like a giraffe learning to ice skate.</text:p>
      <text:p text:style-name="P54"/>
      <text:p text:style-name="P54">But he was walking.</text:p>
      <text:p text:style-name="P54"/>
      <text:p text:style-name="P54">Actually walking.</text:p>
      <text:p text:style-name="P54"/>
      <text:p text:style-name="P54">For the first time in his life.</text:p>
      <text:p text:style-name="P54"/>
      <text:p text:style-name="P54">---</text:p>
      <text:p text:style-name="P54"/>
      <text:p text:style-name="P54">Sandy still hadn't moved.</text:p>
      <text:p text:style-name="P54"/>
      <text:p text:style-name="P54">She simply stared.</text:p>
      <text:p text:style-name="P54"/>
      <text:p text:style-name="P54">Her hands covered her mouth.</text:p>
      <text:p text:style-name="P54"/>
      <text:p text:style-name="P54">Tears streamed down her face.</text:p>
      <text:p text:style-name="P54"/>
      <text:p text:style-name="P54">But she wasn't crying.</text:p>
      <text:p text:style-name="P54"/>
      <text:p text:style-name="P54">Not exactly.</text:p>
      <text:p text:style-name="P54"/>
      <text:p text:style-name="P54">She appeared too shocked to cry properly.</text:p>
      <text:p text:style-name="P54"/>
      <text:p text:style-name="P54">Alden finally turned toward her.</text:p>
      <text:p text:style-name="P54"/>
      <text:p text:style-name="P54">The smile immediately vanished.</text:p>
      <text:p text:style-name="P54"/>
      <text:p text:style-name="P54">Because suddenly this became real.</text:p>
      <text:p text:style-name="P54"/>
      <text:p text:style-name="P54"><text:soft-page-break/>Really real.</text:p>
      <text:p text:style-name="P54"/>
      <text:p text:style-name="P54">"Sandy?"</text:p>
      <text:p text:style-name="P54"/>
      <text:p text:style-name="P54">Her voice emerged several seconds later.</text:p>
      <text:p text:style-name="P54"/>
      <text:p text:style-name="P54">"My God."</text:p>
      <text:p text:style-name="P54"/>
      <text:p text:style-name="P54">Alden swallowed.</text:p>
      <text:p text:style-name="P54"/>
      <text:p text:style-name="P54">"Sandy?"</text:p>
      <text:p text:style-name="P54"/>
      <text:p text:style-name="P54">She slowly walked toward him.</text:p>
      <text:p text:style-name="P54"/>
      <text:p text:style-name="P54">Once.</text:p>
      <text:p text:style-name="P54"/>
      <text:p text:style-name="P54">Twice.</text:p>
      <text:p text:style-name="P54"/>
      <text:p text:style-name="P54">Three steps.</text:p>
      <text:p text:style-name="P54"/>
      <text:p text:style-name="P54">Then stopped directly in front of him.</text:p>
      <text:p text:style-name="P54"/>
      <text:p text:style-name="P54">And then his six foot tall wife looked up.</text:p>
      <text:p text:style-name="P54"/>
      <text:p text:style-name="P54">Actually up.</text:p>
      <text:p text:style-name="P54"/>
      <text:p text:style-name="P54">Not down.</text:p>
      <text:p text:style-name="P54"/>
      <text:p text:style-name="P54">Up.</text:p>
      <text:p text:style-name="P54"/>
      <text:p text:style-name="P54">The realization hit both of them simultaneously.</text:p>
      <text:p text:style-name="P54"/>
      <text:p text:style-name="P54">For forty-seven years Sandy had looked down at her husband.</text:p>
      <text:p text:style-name="P54"/>
      <text:p text:style-name="P54">Now she wasn't.</text:p>
      <text:p text:style-name="P54"/>
      <text:p text:style-name="P54">Now she was looking slightly upward.</text:p>
      <text:p text:style-name="P54"/>
      <text:p text:style-name="P54">Not much.</text:p>
      <text:p text:style-name="P54"/>
      <text:p text:style-name="P54">An inch.</text:p>
      <text:p text:style-name="P54"/>
      <text:p text:style-name="P54">Maybe two.</text:p>
      <text:p text:style-name="P54"/>
      <text:p text:style-name="P54">But enough.</text:p>
      <text:p text:style-name="P54"/>
      <text:p text:style-name="P54">Definitely enough.</text:p>
      <text:p text:style-name="P54"/>
      <text:p text:style-name="P54">---</text:p>
      <text:p text:style-name="P54"/>
      <text:p text:style-name="P54">The silence stretched.</text:p>
      <text:p text:style-name="P54"/>
      <text:p text:style-name="P54">Finally Sandy narrowed her eyes.</text:p>
      <text:p text:style-name="P54"/>
      <text:p text:style-name="P54">Studied him carefully.</text:p>
      <text:p text:style-name="P54"/>
      <text:p text:style-name="P54">Very carefully.</text:p>
      <text:p text:style-name="P54"/>
      <text:p text:style-name="P54">Then walked around him.</text:p>
      <text:p text:style-name="P54"/>
      <text:p text:style-name="P54">Once.</text:p>
      <text:p text:style-name="P54"><text:soft-page-break/></text:p>
      <text:p text:style-name="P54">Twice.</text:p>
      <text:p text:style-name="P54"/>
      <text:p text:style-name="P54">A complete circle.</text:p>
      <text:p text:style-name="P54"/>
      <text:p text:style-name="P54">Like she was inspecting livestock at a county fair.</text:p>
      <text:p text:style-name="P54"/>
      <text:p text:style-name="P54">Alden looked at Elias.</text:p>
      <text:p text:style-name="P54"/>
      <text:p text:style-name="P54">"Elias."</text:p>
      <text:p text:style-name="P54"/>
      <text:p text:style-name="P54">"Yeah?"</text:p>
      <text:p text:style-name="P54"/>
      <text:p text:style-name="P54">"Help."</text:p>
      <text:p text:style-name="P54"/>
      <text:p text:style-name="P54">"No."</text:p>
      <text:p text:style-name="P54"/>
      <text:p text:style-name="P54">---</text:p>
      <text:p text:style-name="P54"/>
      <text:p text:style-name="P54">Sandy completed another lap.</text:p>
      <text:p text:style-name="P54"/>
      <text:p text:style-name="P54">Then another.</text:p>
      <text:p text:style-name="P54"/>
      <text:p text:style-name="P54">Finally she stopped directly in front of him.</text:p>
      <text:p text:style-name="P54"/>
      <text:p text:style-name="P54">The room held its breath.</text:p>
      <text:p text:style-name="P54"/>
      <text:p text:style-name="P54">Alden held his breath.</text:p>
      <text:p text:style-name="P54"/>
      <text:p text:style-name="P54">Elias held his breath.</text:p>
      <text:p text:style-name="P54"/>
      <text:p text:style-name="P54">Even Opi appeared interested.</text:p>
      <text:p text:style-name="P54"/>
      <text:p text:style-name="P54">Sandy reached out.</text:p>
      <text:p text:style-name="P54"/>
      <text:p text:style-name="P54">Touched his face.</text:p>
      <text:p text:style-name="P54"/>
      <text:p text:style-name="P54">Then nodded.</text:p>
      <text:p text:style-name="P54"/>
      <text:p text:style-name="P54">"Huh."</text:p>
      <text:p text:style-name="P54"/>
      <text:p text:style-name="P54">Alden blinked.</text:p>
      <text:p text:style-name="P54"/>
      <text:p text:style-name="P54">"Huh?"</text:p>
      <text:p text:style-name="P54"/>
      <text:p text:style-name="P54">"Yep."</text:p>
      <text:p text:style-name="P54"/>
      <text:p text:style-name="P54">Another nod.</text:p>
      <text:p text:style-name="P54"/>
      <text:p text:style-name="P54">"Huh."</text:p>
      <text:p text:style-name="P54"/>
      <text:p text:style-name="P54">The confusion became painful.</text:p>
      <text:p text:style-name="P54"/>
      <text:p text:style-name="P54">"What does that mean?"</text:p>
      <text:p text:style-name="P54"/>
      <text:p text:style-name="P54">Sandy smiled.</text:p>
      <text:p text:style-name="P54"/>
      <text:p text:style-name="P54">A slow smile.</text:p>
      <text:p text:style-name="P54"/>
      <text:p text:style-name="P54">Dangerous.</text:p>
      <text:p text:style-name="P54"/>
      <text:p text:style-name="P54"><text:soft-page-break/>Married.</text:p>
      <text:p text:style-name="P54"/>
      <text:p text:style-name="P54">Experienced.</text:p>
      <text:p text:style-name="P54"/>
      <text:p text:style-name="P54">The kind of smile wives developed after years of practice.</text:p>
      <text:p text:style-name="P54"/>
      <text:p text:style-name="P54">"It means you still have the same ugly face."</text:p>
      <text:p text:style-name="P54"/>
      <text:p text:style-name="P54">The room exploded.</text:p>
      <text:p text:style-name="P54"/>
      <text:p text:style-name="P54">Elias doubled over laughing.</text:p>
      <text:p text:style-name="P54"/>
      <text:p text:style-name="P54">Opi immediately began laughing as well.</text:p>
      <text:p text:style-name="P54"/>
      <text:p text:style-name="P54">Alden stared.</text:p>
      <text:p text:style-name="P54"/>
      <text:p text:style-name="P54">Offended.</text:p>
      <text:p text:style-name="P54"/>
      <text:p text:style-name="P54">Genuinely offended.</text:p>
      <text:p text:style-name="P54"/>
      <text:p text:style-name="P54">"Sandy!"</text:p>
      <text:p text:style-name="P54"/>
      <text:p text:style-name="P54">"What?"</text:p>
      <text:p text:style-name="P54"/>
      <text:p text:style-name="P54">"You could have said handsome."</text:p>
      <text:p text:style-name="P54"/>
      <text:p text:style-name="P54">"I have known you too long for that."</text:p>
      <text:p text:style-name="P54"/>
      <text:p text:style-name="P54">More laughter.</text:p>
      <text:p text:style-name="P54"/>
      <text:p text:style-name="P54">---</text:p>
      <text:p text:style-name="P54"/>
      <text:p text:style-name="P54">Sandy reached up.</text:p>
      <text:p text:style-name="P54"/>
      <text:p text:style-name="P54">Placed both hands on his cheeks.</text:p>
      <text:p text:style-name="P54"/>
      <text:p text:style-name="P54">Studied him again.</text:p>
      <text:p text:style-name="P54"/>
      <text:p text:style-name="P54">"Still got the giant head too."</text:p>
      <text:p text:style-name="P54"/>
      <text:p text:style-name="P54">Alden pointed accusingly at Elias.</text:p>
      <text:p text:style-name="P54"/>
      <text:p text:style-name="P54">"This is your fault."</text:p>
      <text:p text:style-name="P54"/>
      <text:p text:style-name="P54">"It absolutely is."</text:p>
      <text:p text:style-name="P54"/>
      <text:p text:style-name="P54">"I don't know how I'm going to get even with you but I swear I'll figure something out."</text:p>
      <text:p text:style-name="P54"/>
      <text:p text:style-name="P54">Even Sandy laughed at that.</text:p>
      <text:p text:style-name="P54"/>
      <text:p text:style-name="P54">---</text:p>
      <text:p text:style-name="P54"/>
      <text:p text:style-name="P54">Then she wrapped her arms around him.</text:p>
      <text:p text:style-name="P54"/>
      <text:p text:style-name="P54">Tightly.</text:p>
      <text:p text:style-name="P54"/>
      <text:p text:style-name="P54">Very tightly.</text:p>
      <text:p text:style-name="P54"/>
      <text:p text:style-name="P54">For a long moment neither spoke.</text:p>
      <text:p text:style-name="P54"/>
      <text:p text:style-name="P54">No jokes.</text:p>
      <text:p text:style-name="P54"><text:soft-page-break/></text:p>
      <text:p text:style-name="P54">No laughter.</text:p>
      <text:p text:style-name="P54"/>
      <text:p text:style-name="P54">No teasing.</text:p>
      <text:p text:style-name="P54"/>
      <text:p text:style-name="P54">Just silence.</text:p>
      <text:p text:style-name="P54"/>
      <text:p text:style-name="P54">The good kind.</text:p>
      <text:p text:style-name="P54"/>
      <text:p text:style-name="P54">The kind shared by people who had survived a very long road together.</text:p>
      <text:p text:style-name="P54"/>
      <text:p text:style-name="P54">Eventually Sandy leaned back slightly.</text:p>
      <text:p text:style-name="P54"/>
      <text:p text:style-name="P54">Her eyes were still wet.</text:p>
      <text:p text:style-name="P54"/>
      <text:p text:style-name="P54">"So."</text:p>
      <text:p text:style-name="P54"/>
      <text:p text:style-name="P54">Alden smiled.</text:p>
      <text:p text:style-name="P54"/>
      <text:p text:style-name="P54">"So."</text:p>
      <text:p text:style-name="P54"/>
      <text:p text:style-name="P54">"You realize we're going to have to buy all new clothes."</text:p>
      <text:p text:style-name="P54"/>
      <text:p text:style-name="P54">The smile widened.</text:p>
      <text:p text:style-name="P54"/>
      <text:p text:style-name="P54">"Yeah."</text:p>
      <text:p text:style-name="P54"/>
      <text:p text:style-name="P54">"All of them."</text:p>
      <text:p text:style-name="P54"/>
      <text:p text:style-name="P54">"Yeah."</text:p>
      <text:p text:style-name="P54"/>
      <text:p text:style-name="P54">She looked him up and down again.</text:p>
      <text:p text:style-name="P54"/>
      <text:p text:style-name="P54">Then grinned.</text:p>
      <text:p text:style-name="P54"/>
      <text:p text:style-name="P54">"And for the first time in our marriage, I'm stealing your shirts."</text:p>
      <text:p text:style-name="P54"/>
      <text:p text:style-name="P54">That broke whatever restraint remained.</text:p>
      <text:p text:style-name="P54"/>
      <text:p text:style-name="P54">Everybody laughed again.</text:p>
      <text:p text:style-name="P54"/>
      <text:p text:style-name="P54">Including Alden.</text:p>
      <text:p text:style-name="P54"/>
      <text:p text:style-name="P54">Especially Alden.</text:p>
      <text:p text:style-name="P54"/>
      <text:p text:style-name="P54">Because for the first time in his life, he had absolutely no idea what tomorrow looked like.</text:p>
      <text:p text:style-name="P54"/>
      <text:p text:style-name="P54">------------</text:p>
      <text:p text:style-name="P54"/>
      <text:p text:style-name="P54"/>
      <text:p text:style-name="P54">As the day wore down Alden got tired of experimenting and headed for the new house for dinner. </text:p>
      <text:p text:style-name="P54"/>
      <text:p text:style-name="P54">Sandy spent most of the day organizing their new home while Alden spent most of his learning how to operate an entirely new body.</text:p>
      <text:p text:style-name="P54"/>
      <text:p text:style-name="P54">The process proved less graceful than he had imagined.</text:p>
      <text:p text:style-name="P54"/>
      <text:p text:style-name="P54">At one point he attempted to jump off the front porch.</text:p>
      <text:p text:style-name="P54"/>
      <text:p text:style-name="P54">He landed directly on his ass.</text:p>
      <text:p text:style-name="P54"/>
      <text:p text:style-name="P54"><text:soft-page-break/>To be fair, Alden had spent forty-seven years watching other people perform activities that required legs. Actually doing them turned out to be a different matter entirely.</text:p>
      <text:p text:style-name="P54"/>
      <text:p text:style-name="P54">Opi had warned him about that beforehand.</text:p>
      <text:p text:style-name="P54"/>
      <text:p text:style-name="P54">"Your nervous system will adapt quickly," she had explained.</text:p>
      <text:p text:style-name="P54"/>
      <text:p text:style-name="P54">Quickly, it turned out, was not the same thing as instantly.</text:p>
      <text:p text:style-name="P54"/>
      <text:p text:style-name="P54">By late afternoon Alden was sore, frustrated, and exhausted.</text:p>
      <text:p text:style-name="P54"/>
      <text:p text:style-name="P54">Which was impressive considering he was now probably the healthiest human being in Stevens County.</text:p>
      <text:p text:style-name="P54"/>
      <text:p text:style-name="P54">After dinner he and Sandy settled onto the couch and watched a movie.</text:p>
      <text:p text:style-name="P54"/>
      <text:p text:style-name="P54">Alden paid almost no attention to it.</text:p>
      <text:p text:style-name="P54"/>
      <text:p text:style-name="P54">As the evening wore on he became increasingly nervous.</text:p>
      <text:p text:style-name="P54"/>
      <text:p text:style-name="P54">He was about to spend his first night as a completely different man.</text:p>
      <text:p text:style-name="P54"/>
      <text:p text:style-name="P54">With the woman he loved.</text:p>
      <text:p text:style-name="P54"/>
      <text:p text:style-name="P54">What he didn't know was that Sandy was nervous too.</text:p>
      <text:p text:style-name="P54"/>
      <text:p text:style-name="P54">Days earlier, during the planning stages, she had managed to corner Opi privately.</text:p>
      <text:p text:style-name="P54"/>
      <text:p text:style-name="P54">"I need to ask you something."</text:p>
      <text:p text:style-name="P54"/>
      <text:p text:style-name="P54">"You may."</text:p>
      <text:p text:style-name="P54"/>
      <text:p text:style-name="P54">Sandy hesitated.</text:p>
      <text:p text:style-name="P54"/>
      <text:p text:style-name="P54">"What happens if he gets this amazing new body and suddenly realizes he can do better than me?"</text:p>
      <text:p text:style-name="P54"/>
      <text:p text:style-name="P54">Opi had remained silent for several seconds.</text:p>
      <text:p text:style-name="P54"/>
      <text:p text:style-name="P54">Not because she was surprised.</text:p>
      <text:p text:style-name="P54"/>
      <text:p text:style-name="P54">Quite the opposite.</text:p>
      <text:p text:style-name="P54"/>
      <text:p text:style-name="P54">She had predicted the conversation long before Sandy herself knew she was going to have it.</text:p>
      <text:p text:style-name="P54"/>
      <text:p text:style-name="P54">"There are several things I can do," Opi had finally replied.</text:p>
      <text:p text:style-name="P54"/>
      <text:p text:style-name="P54">When Opi finished, Sandy had been delighted with the results.</text:p>
      <text:p text:style-name="P54"/>
      <text:p text:style-name="P54">She wasn't transformed into a movie star.</text:p>
      <text:p text:style-name="P54"/>
      <text:p text:style-name="P54">That wasn't the point.</text:p>
      <text:p text:style-name="P54"/>
      <text:p text:style-name="P54">The years simply seemed lighter.</text:p>
      <text:p text:style-name="P54"/>
      <text:p text:style-name="P54">The stiffness in her joints disappeared.</text:p>
      <text:p text:style-name="P54"/>
      <text:p text:style-name="P54">Old aches vanished.</text:p>
      <text:p text:style-name="P54"/>
      <text:p text:style-name="P54">Her muscles felt strong again.</text:p>
      <text:p text:style-name="P54"/>
      <text:p text:style-name="P54">For the first time in years she felt thirty instead of fifty.</text:p>
      <text:p text:style-name="P54"/>
      <text:p text:style-name="P54"><text:soft-page-break/>And that had done wonders for her confidence.</text:p>
      <text:p text:style-name="P54"/>
      <text:p text:style-name="P54">Later that evening Alden walked into the bedroom and immediately encountered a new problem.</text:p>
      <text:p text:style-name="P54"/>
      <text:p text:style-name="P54">He had exactly one set of clothes.</text:p>
      <text:p text:style-name="P54"/>
      <text:p text:style-name="P54">None of them were pajamas.</text:p>
      <text:p text:style-name="P54"/>
      <text:p text:style-name="P54">He considered the issue for several seconds.</text:p>
      <text:p text:style-name="P54"/>
      <text:p text:style-name="P54">Then he glanced toward the bed.</text:p>
      <text:p text:style-name="P54"/>
      <text:p text:style-name="P54">Sandy was watching him with extraordinary interest.</text:p>
      <text:p text:style-name="P54"/>
      <text:p text:style-name="P54">"The hell with it," Alden muttered.</text:p>
      <text:p text:style-name="P54"/>
      <text:p text:style-name="P54">He started undressing.</text:p>
      <text:p text:style-name="P54"/>
      <text:p text:style-name="P54">Sandy's eyes grew wider.</text:p>
      <text:p text:style-name="P54"/>
      <text:p text:style-name="P54">Then wider still.</text:p>
      <text:p text:style-name="P54"/>
      <text:p text:style-name="P54">Finally she placed one hand dramatically against her chest and, in what she imagined was a perfect 1940s Hollywood starlet voice, announced:</text:p>
      <text:p text:style-name="P54"/>
      <text:p text:style-name="P54">"Ohhhhh, Big Al, honey..."</text:p>
      <text:p text:style-name="P54"/>
      <text:p text:style-name="P54">She paused for effect.</text:p>
      <text:p text:style-name="P54"/>
      <text:p text:style-name="P54">"It appears more than a few things got upgraded."</text:p>
      <text:p text:style-name="P54"/>
      <text:p text:style-name="P54">Alden turned crimson.</text:p>
      <text:p text:style-name="P54"/>
      <text:p text:style-name="P54">But at the same time every lingering doubt he'd carried for days simply evaporated.</text:p>
      <text:p text:style-name="P54"/>
      <text:p text:style-name="P54">They were going to be fine.</text:p>
      <text:p text:style-name="P54"/>
      <text:p text:style-name="P54">More than fine.</text:p>
      <text:p text:style-name="P54"/>
      <text:p text:style-name="P54">Unfortunately for Alden, at that exact moment Elias happened to be walking behind the cabin on his way back to the house.</text:p>
      <text:p text:style-name="P54"/>
      <text:p text:style-name="P54">The bedroom window was open.</text:p>
      <text:p text:style-name="P54"/>
      <text:p text:style-name="P54">Sandy's performance carried remarkably well.</text:p>
      <text:p text:style-name="P54"/>
      <text:p text:style-name="P54">Elias heard every word.</text:p>
      <text:p text:style-name="P54"/>
      <text:p text:style-name="P54">He laughed so hard he nearly fell over.</text:p>
      <text:p text:style-name="P54"/>
      <text:p text:style-name="P54">Big Al would endure the consequences for the better part of the next week.</text:p>
      <text:p text:style-name="P54"/>
      <text:p text:style-name="P54">Elias considered it one of the finest moments of his life.</text:p>
      <text:p text:style-name="P66"/>
      <text:p text:style-name="P23"/>
      <text:p text:style-name="P56"/>
      <text:p text:style-name="P56"/>
      <text:p text:style-name="P56"><text:span text:style-name="T71">Chapter 32 <text:s text:c="2"/></text:span>Factory Brainstorming 9</text:p>
      <text:p text:style-name="P56"/>
      <text:p text:style-name="P54"/>
      <text:p text:style-name="P54">The following morning Elias was running again.</text:p>
      <text:p text:style-name="P54"><text:soft-page-break/></text:p>
      <text:p text:style-name="P54">Which meant he was thinking again.</text:p>
      <text:p text:style-name="P54"/>
      <text:p text:style-name="P54">Which meant Opi's day was about to become worse.</text:p>
      <text:p text:style-name="P54"/>
      <text:p text:style-name="P54">Halfway through the run he stopped.</text:p>
      <text:p text:style-name="P54"/>
      <text:p text:style-name="P54">"Oh."</text:p>
      <text:p text:style-name="P54"/>
      <text:p text:style-name="P54">The answer was so obvious he almost laughed.</text:p>
      <text:p text:style-name="P54"/>
      <text:p text:style-name="P54">The husband factory.</text:p>
      <text:p text:style-name="P54"/>
      <text:p text:style-name="P54">They had been talking about it for days.</text:p>
      <text:p text:style-name="P54"/>
      <text:p text:style-name="P54">Health.</text:p>
      <text:p text:style-name="P54"/>
      <text:p text:style-name="P54">Income.</text:p>
      <text:p text:style-name="P54">actory."</text:p>
      <text:p text:style-name="P54"/>
      <text:p text:style-name="P54">"Husband factory."</text:p>
      <text:p text:style-name="P54"/>
      <text:p text:style-name="P54">The orb dimmed.</text:p>
      <text:p text:style-name="P54"/>
      <text:p text:style-name="P54">"I already dislike where this is going."</text:p>
      <text:p text:style-name="P54"/>
      <text:p text:style-name="P54">"Attraction matters."</text:p>
      <text:p text:style-name="P54"/>
      <text:p text:style-name="P54">"Yes."</text:p>
      <text:p text:style-name="P54"/>
      <text:p text:style-name="P54">"Health matters."</text:p>
      <text:p text:style-name="P54"/>
      <text:p text:style-name="P54">"Yes."</text:p>
      <text:p text:style-name="P54"/>
      <text:p text:style-name="P54">"Money matters."</text:p>
      <text:p text:style-name="P54"/>
      <text:p text:style-name="P54">"Yes."</text:p>
      <text:p text:style-name="P54"/>
      <text:p text:style-name="P54">"Skills matter."</text:p>
      <text:p text:style-name="P54"/>
      <text:p text:style-name="P54">"Yes."</text:p>
      <text:p text:style-name="P54"/>
      <text:p text:style-name="P54">"Confidence matters."</text:p>
      <text:p text:style-name="P54"/>
      <text:p text:style-name="P54">"Yes."</text:p>
      <text:p text:style-name="P54"/>
      <text:p text:style-name="P54">Elias pointed.</text:p>
      <text:p text:style-name="P54"/>
      <text:p text:style-name="P54">"But physical appearance also matters."</text:p>
      <text:p text:style-name="P54"/>
      <text:p text:style-name="P54">The orb became quiet.</text:p>
      <text:p text:style-name="P54"/>
      <text:p text:style-name="P54">"That is difficult to dispute."</text:p>
      <text:p text:style-name="P54"/>
      <text:p text:style-name="P54">"Exactly."</text:p>
      <text:p text:style-name="P54"/>
      <text:p text:style-name="P54">He leaned forward.</text:p>
      <text:p text:style-name="P54"/>
      <text:p text:style-name="P54">"So let's say we fix everything else."</text:p>
      <text:p text:style-name="P54"/>
      <text:p text:style-name="P54">"Very well."</text:p>
      <text:p text:style-name="P54"><text:soft-page-break/></text:p>
      <text:p text:style-name="P54">"We make these guys healthy."</text:p>
      <text:p text:style-name="P54"/>
      <text:p text:style-name="P54">"Yes."</text:p>
      <text:p text:style-name="P54"/>
      <text:p text:style-name="P54">"Educated."</text:p>
      <text:p text:style-name="P54"/>
      <text:p text:style-name="P54">"Yes."</text:p>
      <text:p text:style-name="P54"/>
      <text:p text:style-name="P54">"Financially secure."</text:p>
      <text:p text:style-name="P54"/>
      <text:p text:style-name="P54">"Yes."</text:p>
      <text:p text:style-name="P54"/>
      <text:p text:style-name="P54">"Emotionally stable."</text:p>
      <text:p text:style-name="P54"/>
      <text:p text:style-name="P54">"Yes."</text:p>
      <text:p text:style-name="P54"/>
      <text:p text:style-name="P54">"Purpose-driven."</text:p>
      <text:p text:style-name="P54"/>
      <text:p text:style-name="P54">"Yes."</text:p>
      <text:p text:style-name="P54"/>
      <text:p text:style-name="P54">"Great."</text:p>
      <text:p text:style-name="P54"/>
      <text:p text:style-name="P54">He paused.</text:p>
      <text:p text:style-name="P54"/>
      <text:p text:style-name="P54">"They still aren't exactly movie stars."</text:p>
      <text:p text:style-name="P54"/>
      <text:p text:style-name="P54">The orb flickered.</text:p>
      <text:p text:style-name="P54"/>
      <text:p text:style-name="P54">"Most humans are not."</text:p>
      <text:p text:style-name="P54"/>
      <text:p text:style-name="P54">"Exactly."</text:p>
      <text:p text:style-name="P54"/>
      <text:p text:style-name="P54">"So here's my question."</text:p>
      <text:p text:style-name="P54"/>
      <text:p text:style-name="P54">The orb already knew.</text:p>
      <text:p text:style-name="P54"/>
      <text:p text:style-name="P54">Which was annoying.</text:p>
      <text:p text:style-name="P54"/>
      <text:p text:style-name="P54">"Can you improve appearance?"</text:p>
      <text:p text:style-name="P54"/>
      <text:p text:style-name="P54">A pause.</text:p>
      <text:p text:style-name="P54"/>
      <text:p text:style-name="P54">Then:</text:p>
      <text:p text:style-name="P54"/>
      <text:p text:style-name="P54">"Of course."</text:p>
      <text:p text:style-name="P54"/>
      <text:p text:style-name="P54">Elias blinked.</text:p>
      <text:p text:style-name="P54"/>
      <text:p text:style-name="P54">"No hesitation?"</text:p>
      <text:p text:style-name="P54"/>
      <text:p text:style-name="P54">"None."</text:p>
      <text:p text:style-name="P54"/>
      <text:p text:style-name="P54">"Really?"</text:p>
      <text:p text:style-name="P54"/>
      <text:p text:style-name="P54">The orb rotated.</text:p>
      <text:p text:style-name="P54"/>
      <text:p text:style-name="P54">"Elias."</text:p>
      <text:p text:style-name="P54"/>
      <text:p text:style-name="P54">"Yes?"</text:p>
      <text:p text:style-name="P54"/>
      <text:p text:style-name="P54"><text:soft-page-break/>"I can regrow limbs."</text:p>
      <text:p text:style-name="P54"/>
      <text:p text:style-name="P54">"Fair."</text:p>
      <text:p text:style-name="P54"/>
      <text:p text:style-name="P54">"I can repair spinal injuries."</text:p>
      <text:p text:style-name="P54"/>
      <text:p text:style-name="P54">"Fair."</text:p>
      <text:p text:style-name="P54"/>
      <text:p text:style-name="P54">"I can cure most diseases."</text:p>
      <text:p text:style-name="P54"/>
      <text:p text:style-name="P54">"Fair."</text:p>
      <text:p text:style-name="P54"/>
      <text:p text:style-name="P54">"I can construct personalized educational systems."</text:p>
      <text:p text:style-name="P54"/>
      <text:p text:style-name="P54">"Fair."</text:p>
      <text:p text:style-name="P54"/>
      <text:p text:style-name="P54">"I can teleport."</text:p>
      <text:p text:style-name="P54"/>
      <text:p text:style-name="P54">"Fair."</text:p>
      <text:p text:style-name="P54"/>
      <text:p text:style-name="P54">"Making someone's skin healthier is not especially challenging."</text:p>
      <text:p text:style-name="P54"/>
      <text:p text:style-name="P54">Elias nodded.</text:p>
      <text:p text:style-name="P54"/>
      <text:p text:style-name="P54">"Good point."</text:p>
      <text:p text:style-name="P54"/>
      <text:p text:style-name="P54">The orb projected a list.</text:p>
      <text:p text:style-name="P54"/>
      <text:p text:style-name="P54">Skin quality.</text:p>
      <text:p text:style-name="P54"/>
      <text:p text:style-name="P54">Dental health.</text:p>
      <text:p text:style-name="P54"/>
      <text:p text:style-name="P54">Facial symmetry.</text:p>
      <text:p text:style-name="P54"/>
      <text:p text:style-name="P54">Posture.</text:p>
      <text:p text:style-name="P54"/>
      <text:p text:style-name="P54">Body composition.</text:p>
      <text:p text:style-name="P54"/>
      <text:p text:style-name="P54">Hair restoration.</text:p>
      <text:p text:style-name="P54"/>
      <text:p text:style-name="P54">Vision correction.</text:p>
      <text:p text:style-name="P54"/>
      <text:p text:style-name="P54">Age-related deterioration.</text:p>
      <text:p text:style-name="P54"/>
      <text:p text:style-name="P54">Scarring.</text:p>
      <text:p text:style-name="P54"/>
      <text:p text:style-name="P54">Inflammation.</text:p>
      <text:p text:style-name="P54"/>
      <text:p text:style-name="P54">Sleep quality.</text:p>
      <text:p text:style-name="P54"/>
      <text:p text:style-name="P54">The list continued.</text:p>
      <text:p text:style-name="P54"/>
      <text:p text:style-name="P54">Elias stared.</text:p>
      <text:p text:style-name="P54"/>
      <text:p text:style-name="P54">"Okay."</text:p>
      <text:p text:style-name="P54"/>
      <text:p text:style-name="P54">"That's a lot."</text:p>
      <text:p text:style-name="P54"/>
      <text:p text:style-name="P54">"Yes."</text:p>
      <text:p text:style-name="P54"/>
      <text:p text:style-name="P54">"And all of this is allowed?"</text:p>
      <text:p text:style-name="P54"><text:soft-page-break/></text:p>
      <text:p text:style-name="P54">That immediately changed the mood.</text:p>
      <text:p text:style-name="P54"/>
      <text:p text:style-name="P54">The Hand.</text:p>
      <text:p text:style-name="P54"/>
      <text:p text:style-name="P54">QEQO.</text:p>
      <text:p text:style-name="P54"/>
      <text:p text:style-name="P54">Question Everything.</text:p>
      <text:p text:style-name="P54"/>
      <text:p text:style-name="P54">Question Often.</text:p>
      <text:p text:style-name="P54"/>
      <text:p text:style-name="P54">The rule applied again.</text:p>
      <text:p text:style-name="P54"/>
      <text:p text:style-name="P54">Opi became thoughtful.</text:p>
      <text:p text:style-name="P54"/>
      <text:p text:style-name="P54">"Based upon historical patterns?"</text:p>
      <text:p text:style-name="P54"/>
      <text:p text:style-name="P54">"Yes."</text:p>
      <text:p text:style-name="P54"/>
      <text:p text:style-name="P54">"I believe so."</text:p>
      <text:p text:style-name="P54"/>
      <text:p text:style-name="P54">"Why?"</text:p>
      <text:p text:style-name="P54"/>
      <text:p text:style-name="P54">"Because we are not altering genetics."</text:p>
      <text:p text:style-name="P54"/>
      <text:p text:style-name="P54">The answer came instantly.</text:p>
      <text:p text:style-name="P54"/>
      <text:p text:style-name="P54">"We are not changing reproductive inheritance."</text:p>
      <text:p text:style-name="P54"/>
      <text:p text:style-name="P54">"We are not creating new traits."</text:p>
      <text:p text:style-name="P54"/>
      <text:p text:style-name="P54">"We are not redesigning humanity."</text:p>
      <text:p text:style-name="P54"/>
      <text:p text:style-name="P54">The orb brightened.</text:p>
      <text:p text:style-name="P54"/>
      <text:p text:style-name="P54">"We are improving presentation."</text:p>
      <text:p text:style-name="P54"/>
      <text:p text:style-name="P54">Elias laughed.</text:p>
      <text:p text:style-name="P54"/>
      <text:p text:style-name="P54">"Presentation?"</text:p>
      <text:p text:style-name="P54"/>
      <text:p text:style-name="P54">"Presentation."</text:p>
      <text:p text:style-name="P54"/>
      <text:p text:style-name="P54">"That's your technical term?"</text:p>
      <text:p text:style-name="P54"/>
      <text:p text:style-name="P54">"It is now."</text:p>
      <text:p text:style-name="P54"/>
      <text:p text:style-name="P54">The orb projected two images.</text:p>
      <text:p text:style-name="P54"/>
      <text:p text:style-name="P54">One showed a man who was exhausted, overweight, poorly groomed, and chronically unhealthy.</text:p>
      <text:p text:style-name="P54"/>
      <text:p text:style-name="P54">The second showed the same man healthy, rested, physically fit, and confident.</text:p>
      <text:p text:style-name="P54"/>
      <text:p text:style-name="P54">"Which image represents a violation of evolutionary processes?"</text:p>
      <text:p text:style-name="P54"/>
      <text:p text:style-name="P54">Elias looked.</text:p>
      <text:p text:style-name="P54"/>
      <text:p text:style-name="P54">"Neither."</text:p>
      <text:p text:style-name="P54"/>
      <text:p text:style-name="P54">"Correct."</text:p>
      <text:p text:style-name="P54"/>
      <text:p text:style-name="P54"><text:soft-page-break/>The images vanished.</text:p>
      <text:p text:style-name="P54"/>
      <text:p text:style-name="P54">"However."</text:p>
      <text:p text:style-name="P54"/>
      <text:p text:style-name="P54">"There it is."</text:p>
      <text:p text:style-name="P54"/>
      <text:p text:style-name="P54">The orb ignored him.</text:p>
      <text:p text:style-name="P54"/>
      <text:p text:style-name="P54">"There are limits."</text:p>
      <text:p text:style-name="P54"/>
      <text:p text:style-name="P54">"What kind of limits?"</text:p>
      <text:p text:style-name="P54"/>
      <text:p text:style-name="P54">For the first time, Opi looked serious.</text:p>
      <text:p text:style-name="P54"/>
      <text:p text:style-name="P54">"Identity."</text:p>
      <text:p text:style-name="P54"/>
      <text:p text:style-name="P54">That wasn't the answer he expected.</text:p>
      <text:p text:style-name="P54"/>
      <text:p text:style-name="P54">"What?"</text:p>
      <text:p text:style-name="P54"/>
      <text:p text:style-name="P54">The orb floated closer.</text:p>
      <text:p text:style-name="P54"/>
      <text:p text:style-name="P54">"Humans possess a self-image."</text:p>
      <text:p text:style-name="P54"/>
      <text:p text:style-name="P54">"Okay."</text:p>
      <text:p text:style-name="P54"/>
      <text:p text:style-name="P54">"They spend decades becoming accustomed to their appearance."</text:p>
      <text:p text:style-name="P54"/>
      <text:p text:style-name="P54">"Okay."</text:p>
      <text:p text:style-name="P54"/>
      <text:p text:style-name="P54">"If changes become too extreme..."</text:p>
      <text:p text:style-name="P54"/>
      <text:p text:style-name="P54">The lights dimmed.</text:p>
      <text:p text:style-name="P54"/>
      <text:p text:style-name="P54">"...psychological adaptation becomes increasingly difficult."</text:p>
      <text:p text:style-name="P54"/>
      <text:p text:style-name="P54">Elias thought about that.</text:p>
      <text:p text:style-name="P54"/>
      <text:p text:style-name="P54">"So if somebody wakes up looking like a completely different person..."</text:p>
      <text:p text:style-name="P54"/>
      <text:p text:style-name="P54">"Problems frequently emerge."</text:p>
      <text:p text:style-name="P54"/>
      <text:p text:style-name="P54">"Interesting."</text:p>
      <text:p text:style-name="P54"/>
      <text:p text:style-name="P54">The orb nodded.</text:p>
      <text:p text:style-name="P54"/>
      <text:p text:style-name="P54">"The brain expects continuity."</text:p>
      <text:p text:style-name="P54"/>
      <text:p text:style-name="P54">"Humans are more attached to their identity than they realize."</text:p>
      <text:p text:style-name="P54"/>
      <text:p text:style-name="P54">Elias considered that.</text:p>
      <text:p text:style-name="P54"/>
      <text:p text:style-name="P54">"Okay."</text:p>
      <text:p text:style-name="P54"/>
      <text:p text:style-name="P54">"So nobody gets turned into Brad Pitt."</text:p>
      <text:p text:style-name="P54"/>
      <text:p text:style-name="P54">The orb immediately answered.</text:p>
      <text:p text:style-name="P54"/>
      <text:p text:style-name="P54">"Absolutely not."</text:p>
      <text:p text:style-name="P54"/>
      <text:p text:style-name="P54">Elias laughed.</text:p>
      <text:p text:style-name="P54"><text:soft-page-break/></text:p>
      <text:p text:style-name="P54">"You've already had this conversation with someone."</text:p>
      <text:p text:style-name="P54"/>
      <text:p text:style-name="P54">"Seven times."</text:p>
      <text:p text:style-name="P54"/>
      <text:p text:style-name="P54">"Only seven?"</text:p>
      <text:p text:style-name="P54"/>
      <text:p text:style-name="P54">"This week."</text:p>
      <text:p text:style-name="P54"/>
      <text:p text:style-name="P54">He nodded.</text:p>
      <text:p text:style-name="P54"/>
      <text:p text:style-name="P54">That sounded about right.</text:p>
      <text:p text:style-name="P54"/>
      <text:p text:style-name="P54">The orb continued.</text:p>
      <text:p text:style-name="P54"/>
      <text:p text:style-name="P54">"Most individuals do not actually want perfection."</text:p>
      <text:p text:style-name="P54"/>
      <text:p text:style-name="P54">"No?"</text:p>
      <text:p text:style-name="P54"/>
      <text:p text:style-name="P54">"No."</text:p>
      <text:p text:style-name="P54"/>
      <text:p text:style-name="P54">"They want improvement."</text:p>
      <text:p text:style-name="P54"/>
      <text:p text:style-name="P54">That surprised him.</text:p>
      <text:p text:style-name="P54"/>
      <text:p text:style-name="P54">"Really?"</text:p>
      <text:p text:style-name="P54"/>
      <text:p text:style-name="P54">"Consistently."</text:p>
      <text:p text:style-name="P54"/>
      <text:p text:style-name="P54">The orb projected another graph.</text:p>
      <text:p text:style-name="P54"/>
      <text:p text:style-name="P54">"Healthy skin."</text:p>
      <text:p text:style-name="P54"/>
      <text:p text:style-name="P54">"Healthy weight."</text:p>
      <text:p text:style-name="P54"/>
      <text:p text:style-name="P54">"Good posture."</text:p>
      <text:p text:style-name="P54"/>
      <text:p text:style-name="P54">"Healthy teeth."</text:p>
      <text:p text:style-name="P54"/>
      <text:p text:style-name="P54">"Healthy hair."</text:p>
      <text:p text:style-name="P54"/>
      <text:p text:style-name="P54">"Energy."</text:p>
      <text:p text:style-name="P54"/>
      <text:p text:style-name="P54">"Confidence."</text:p>
      <text:p text:style-name="P54"/>
      <text:p text:style-name="P54">The list looked remarkably ordinary.</text:p>
      <text:p text:style-name="P54"/>
      <text:p text:style-name="P54">"No laser eyes?"</text:p>
      <text:p text:style-name="P54"/>
      <text:p text:style-name="P54">"No."</text:p>
      <text:p text:style-name="P54"/>
      <text:p text:style-name="P54">"Six-foot-eight?"</text:p>
      <text:p text:style-name="P54"/>
      <text:p text:style-name="P54">"No."</text:p>
      <text:p text:style-name="P54"/>
      <text:p text:style-name="P54">"Supermodel jawline?"</text:p>
      <text:p text:style-name="P54"/>
      <text:p text:style-name="P54">"No."</text:p>
      <text:p text:style-name="P54"/>
      <text:p text:style-name="P54">The orb brightened.</text:p>
      <text:p text:style-name="P54"/>
      <text:p text:style-name="P54"><text:soft-page-break/>"Most people simply want to become the best version of themselves."</text:p>
      <text:p text:style-name="P54"/>
      <text:p text:style-name="P54">Elias smiled.</text:p>
      <text:p text:style-name="P54"/>
      <text:p text:style-name="P54">That actually made sense.</text:p>
      <text:p text:style-name="P54"/>
      <text:p text:style-name="P54">"So."</text:p>
      <text:p text:style-name="P54"/>
      <text:p text:style-name="P54">He leaned back.</text:p>
      <text:p text:style-name="P54"/>
      <text:p text:style-name="P54">"Husband factory plus appearance upgrades. So a beauty salon."</text:p>
      <text:p text:style-name="P54"/>
      <text:p text:style-name="P54">The orb groaned.</text:p>
      <text:p text:style-name="P54"/>
      <text:p text:style-name="P54">"I refuse to become a beauty salon."</text:p>
      <text:p text:style-name="P54"/>
      <text:p text:style-name="P54">"You're already a husband factory."</text:p>
      <text:p text:style-name="P54"/>
      <text:p text:style-name="P54">"I am not."</text:p>
      <text:p text:style-name="P54"/>
      <text:p text:style-name="P54">"You absolutely are."</text:p>
      <text:p text:style-name="P54"/>
      <text:p text:style-name="P54">"I am not."</text:p>
      <text:p text:style-name="P54"/>
      <text:p text:style-name="P54">"You are."</text:p>
      <text:p text:style-name="P54"/>
      <text:p text:style-name="P54">The orb floated away.</text:p>
      <text:p text:style-name="P54"/>
      <text:p text:style-name="P54">A clear sign the argument was over.</text:p>
      <text:p text:style-name="P54"/>
      <text:p text:style-name="P54">Which, Elias had learned, usually meant he had won.</text:p>
      <text:p text:style-name="P54"/>
      <text:p text:style-name="P54">Or at least annoyed her enough that she didn't wish to continue.</text:p>
      <text:p text:style-name="P54"/>
      <text:p text:style-name="P54">Either outcome was acceptable.</text:p>
      <text:p text:style-name="P54"/>
      <text:p text:style-name="P54">As she disappeared through the wall, her voice echoed back toward the porch.</text:p>
      <text:p text:style-name="P54"/>
      <text:p text:style-name="P54">"For the record."</text:p>
      <text:p text:style-name="P54"/>
      <text:p text:style-name="P54">"What?"</text:p>
      <text:p text:style-name="P54"/>
      <text:p text:style-name="P54">"I am not adding a spa package."</text:p>
      <text:p text:style-name="P54"/>
      <text:p text:style-name="P54">Elias grinned.</text:p>
      <text:p text:style-name="P54"/>
      <text:p text:style-name="P54">"Yet."</text:p>
      <text:p text:style-name="P54"/>
      <text:p text:style-name="P54">The wall remained silent.</text:p>
      <text:p text:style-name="P54"/>
      <text:p text:style-name="P54">Which was not technically confirmation.</text:p>
      <text:p text:style-name="P54"/>
      <text:p text:style-name="P54">But it was close enough.</text:p>
      <text:p text:style-name="P54"/>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geneva"/>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70</meta:editing-cycles>
    <meta:creation-date>2013-12-23T23:15:00</meta:creation-date>
    <dc:date>2026-06-05T19:18:41.875000000</dc:date>
    <meta:editing-duration>PT17H47M26S</meta:editing-duration>
    <meta:generator>LibreOffice/5.0.3.2$Windows_x86 LibreOffice_project/e5f16313668ac592c1bfb310f4390624e3dbfb75</meta:generator>
    <meta:document-statistic meta:table-count="0" meta:image-count="0" meta:object-count="0" meta:page-count="327" meta:paragraph-count="9258" meta:word-count="49939" meta:character-count="307296" meta:non-whitespace-character-count="2657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